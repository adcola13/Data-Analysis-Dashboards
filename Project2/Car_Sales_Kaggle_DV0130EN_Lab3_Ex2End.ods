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dia/image1.png" manifest:media-type="image/png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dia/image1.png" manifest:media-type="image/png"/>
  <manifest:file-entry manifest:full-path="Object 6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  <style:font-face style:name="Arial" svg:font-family="Arial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_54_0_37__32_-_32_Accent1" style:data-style-name="N0">
      <style:table-cell-properties fo:background-color="#8EA9DB"/>
      <style:text-properties fo:font-weight="bold" style:font-weight-asian="bold" style:font-weight-complex="bold"/>
    </style:style>
    <style:style style:name="ce4" style:family="table-cell" style:parent-style-name="_54_0_37__32_-_32_Accent2" style:data-style-name="N0">
      <style:table-cell-properties fo:background-color="#F4B084"/>
      <style:text-properties fo:font-weight="bold" style:font-weight-asian="bold" style:font-weight-complex="bold"/>
    </style:style>
    <style:style style:name="ce5" style:family="table-cell" style:parent-style-name="_54_0_37__32_-_32_Accent6" style:data-style-name="N0">
      <style:table-cell-properties fo:background-color="#A9D08E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19">
      <style:table-cell-properties fo:border="thin solid #000000"/>
    </style:style>
    <style:style style:name="ce8" style:family="table-cell" style:parent-style-name="_54_0_37__32_-_32_Accent6" style:data-style-name="N30">
      <style:table-cell-properties fo:background-color="#A9D08E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_54_0_37__32_-_32_Accent1" style:data-style-name="N36">
      <style:table-cell-properties fo:background-color="#8EA9DB"/>
      <style:text-properties fo:font-weight="bold" style:font-weight-asian="bold" style:font-weight-complex="bold"/>
    </style:style>
    <style:style style:name="ce10" style:family="table-cell" style:parent-style-name="Default" style:data-style-name="N36"/>
    <style:style style:name="ce11" style:family="table-cell" style:parent-style-name="Default" style:data-style-name="N1">
      <style:table-cell-properties fo:border="thin solid #000000"/>
    </style:style>
    <style:style style:name="ce12" style:family="table-cell" style:parent-style-name="Default" style:data-style-name="N37">
      <style:table-cell-properties fo:border="thin solid #000000"/>
    </style:style>
    <style:style style:name="ce13" style:family="table-cell" style:parent-style-name="Percent" style:data-style-name="N13">
      <style:table-cell-properties fo:border="thin solid #000000"/>
    </style:style>
    <style:style style:name="ce14" style:family="table-cell" style:parent-style-name="Default" style:data-style-name="N38"/>
    <style:style style:name="ce15" style:family="table-cell" style:parent-style-name="Default" style:data-style-name="N0">
      <style:text-properties style:font-name="Wingdings" style:font-name-asian="Wingdings" style:font-name-complex="Wingdings" style:font-charset="x-symbol"/>
    </style:style>
    <style:style style:name="ce16" style:family="table-cell" style:parent-style-name="Default" style:data-style-name="N0"/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39"/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8575cm" style:use-optimal-column-width="true"/>
    </style:style>
    <style:style style:name="co3" style:family="table-column">
      <style:table-column-properties fo:break-before="auto" style:column-width="3.78354166666667cm" style:use-optimal-column-width="true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3.59833333333333cm" style:use-optimal-column-width="true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75166666666667cm"/>
    </style:style>
    <style:style style:name="co11" style:family="table-column">
      <style:table-column-properties fo:break-before="auto" style:column-width="2.72520833333333cm"/>
    </style:style>
    <style:style style:name="co12" style:family="table-column">
      <style:table-column-properties fo:break-before="auto" style:column-width="3.30729166666667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190625cm"/>
    </style:style>
    <style:style style:name="co15" style:family="table-column">
      <style:table-column-properties fo:break-before="auto" style:column-width="1.29645833333333cm"/>
    </style:style>
    <style:style style:name="co16" style:family="table-column">
      <style:table-column-properties fo:break-before="auto" style:column-width="2.27541666666667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 style:use-optimal-column-width="true"/>
    </style:style>
    <style:style style:name="co20" style:family="table-column">
      <style:table-column-properties fo:break-before="auto" style:column-width="1.37583333333333cm" style:use-optimal-column-width="true"/>
    </style:style>
    <style:style style:name="co21" style:family="table-column">
      <style:table-column-properties fo:break-before="auto" style:column-width="2.11666666666667cm" style:use-optimal-column-width="true"/>
    </style:style>
    <style:style style:name="co22" style:family="table-column">
      <style:table-column-properties fo:break-before="auto" style:column-width="1.45520833333333cm" style:use-optimal-column-width="true"/>
    </style:style>
    <style:style style:name="co23" style:family="table-column">
      <style:table-column-properties fo:break-before="auto" style:column-width="3.04270833333333cm" style:use-optimal-column-width="true"/>
    </style:style>
    <style:style style:name="co24" style:family="table-column">
      <style:table-column-properties fo:break-before="auto" style:column-width="1.69333333333333cm"/>
    </style:style>
    <style:style style:name="co25" style:family="table-column">
      <style:table-column-properties fo:break-before="auto" style:column-width="2.59291666666667cm" style:use-optimal-column-width="true"/>
    </style:style>
    <style:style style:name="co26" style:family="table-column">
      <style:table-column-properties fo:break-before="auto" style:column-width="4.97416666666667cm" style:use-optimal-column-width="true"/>
    </style:style>
    <style:style style:name="co27" style:family="table-column">
      <style:table-column-properties fo:break-before="auto" style:column-width="4.41854166666667cm" style:use-optimal-column-width="true"/>
    </style:style>
    <style:style style:name="co28" style:family="table-column">
      <style:table-column-properties fo:break-before="auto" style:column-width="1.85208333333333cm" style:use-optimal-column-width="true"/>
    </style:style>
    <style:style style:name="co29" style:family="table-column">
      <style:table-column-properties fo:break-before="auto" style:column-width="3.14854166666667cm" style:use-optimal-column-width="true"/>
    </style:style>
    <style:style style:name="co30" style:family="table-column">
      <style:table-column-properties fo:break-before="auto" style:column-width="4.02166666666667cm" style:use-optimal-column-width="true"/>
    </style:style>
    <style:style style:name="co31" style:family="table-column">
      <style:table-column-properties fo:break-before="auto" style:column-width="1.11125cm" style:use-optimal-column-width="true"/>
    </style:style>
    <style:style style:name="co32" style:family="table-column">
      <style:table-column-properties fo:break-before="auto" style:column-width="1.296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0" style:family="table-cell" style:parent-style-name="Percent" style:data-style-name="N13">
      <style:table-cell-properties fo:border="thin solid #000000"/>
      <style:map style:condition="of:is-true-formula(NOT(ISERROR(SEARCH(&quot;POOR&quot;;[.G2]))))" style:apply-style-name="cf2" style:base-cell-address="Car_sales.G2"/>
      <style:map style:condition="of:is-true-formula(NOT(ISERROR(SEARCH(&quot;GOOD&quot;;[.G2]))))" style:apply-style-name="cf1" style:base-cell-address="Car_sales.G2"/>
    </style:style>
    <style:style style:name="ce21" style:family="table-cell" style:parent-style-name="Percent" style:data-style-name="N13">
      <style:table-cell-properties fo:border="thin solid #000000"/>
      <style:map style:condition="of:is-true-formula(NOT(ISERROR(SEARCH(&quot;POOR&quot;;[.G2]))))" style:apply-style-name="cf2" style:base-cell-address="Column,_Pie,_Sunburst_Chart.G2"/>
      <style:map style:condition="of:is-true-formula(NOT(ISERROR(SEARCH(&quot;GOOD&quot;;[.G2]))))" style:apply-style-name="cf1" style:base-cell-address="Column,_Pie,_Sunburst_Chart.G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_s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16357" table:default-cell-style-name="ce1"/>
        <table:table-row table:style-name="ro1">
          <table:table-cell office:value-type="string" table:style-name="ce3">
            <text:p>Manufacturer</text:p>
          </table:table-cell>
          <table:table-cell office:value-type="string" table:style-name="ce3">
            <text:p>Model</text:p>
          </table:table-cell>
          <table:table-cell office:value-type="string" table:style-name="ce3">
            <text:p>Unit Sales</text:p>
          </table:table-cell>
          <table:table-cell office:value-type="string" table:style-name="ce9">
            <text:p>Price</text:p>
          </table:table-cell>
          <table:table-cell office:value-type="string" table:style-name="ce3">
            <text:p>Year Resale Value</text:p>
          </table:table-cell>
          <table:table-cell office:value-type="string" table:style-name="ce3">
            <text:p>Retention %</text:p>
          </table:table-cell>
          <table:table-cell office:value-type="string" table:style-name="ce3">
            <text:p>Retention Value</text:p>
          </table:table-cell>
          <table:table-cell office:value-type="string" table:style-name="ce3">
            <text:p>Engine Size</text:p>
          </table:table-cell>
          <table:table-cell office:value-type="string" table:style-name="ce3">
            <text:p>Horsepower</text:p>
          </table:table-cell>
          <table:table-cell office:value-type="string" table:style-name="ce3">
            <text:p>HP Level</text:p>
          </table:table-cell>
          <table:table-cell office:value-type="string" table:style-name="ce3">
            <text:p>Vehicle_type</text:p>
          </table:table-cell>
          <table:table-cell office:value-type="string" table:style-name="ce3">
            <text:p>Fuel Efficiency</text:p>
          </table:table-cell>
          <table:table-cell office:value-type="string" table:style-name="ce3">
            <text:p>Power Perf Factor</text:p>
          </table:table-cell>
          <table:table-cell office:value-type="string" table:style-name="ce3">
            <text:p>Wheelbase</text:p>
          </table:table-cell>
          <table:table-cell office:value-type="string" table:style-name="ce3">
            <text:p>Width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Curb Weight</text:p>
          </table:table-cell>
          <table:table-cell office:value-type="string" table:style-name="ce3">
            <text:p>Fuel Capacity</text:p>
          </table:table-cell>
          <table:table-cell office:value-type="string" table:style-name="ce3">
            <text:p>Latest Launch</text:p>
          </table:table-cell>
          <table:table-cell table:number-columns-repeated="16365" table:style-name="ce2"/>
        </table:table-row>
        <table:table-row table:style-name="ro1">
          <table:table-cell office:value-type="string" table:style-name="ce4">
            <text:p>Acura</text:p>
          </table:table-cell>
          <table:table-cell office:value-type="string" table:style-name="ce5">
            <text:p>Integra</text:p>
          </table:table-cell>
          <table:table-cell office:value-type="float" office:value="16919" table:style-name="ce11">
            <text:p>16919</text:p>
          </table:table-cell>
          <table:table-cell office:value-type="currency" office:value="21500" table:style-name="ce12">
            <text:p>$21,500</text:p>
          </table:table-cell>
          <table:table-cell office:value-type="currency" office:value="16360" table:style-name="ce12">
            <text:p>$16,360</text:p>
          </table:table-cell>
          <table:table-cell office:value-type="percentage" office:value="0.76093023255813952" table:formula="of:=SUM([.E2]/[.D2])" table:style-name="ce13">
            <text:p>76%</text:p>
          </table:table-cell>
          <table:table-cell office:value-type="string" office:string-value="GOOD" table:formula="of:=IF([.F2]&gt;69%; &quot;GOOD&quot;; &quot;POOR&quot;)" table:style-name="ce20">
            <text:p>GOOD</text:p>
          </table:table-cell>
          <table:table-cell office:value-type="float" office:value="1.8" table:style-name="ce6">
            <text:p>1.8</text:p>
          </table:table-cell>
          <table:table-cell office:value-type="float" office:value="140" table:style-name="ce6">
            <text:p>140</text:p>
          </table:table-cell>
          <table:table-cell office:value-type="string" office:string-value="Medium HP" table:formula="of:=COM.MICROSOFT.IFS([.I2]&gt;299;&quot;High HP&quot;;[.I2]&gt;99;&quot;Medium HP&quot;;[.I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8" table:style-name="ce6">
            <text:p>28</text:p>
          </table:table-cell>
          <table:table-cell office:value-type="float" office:value="58.280149520000002" table:style-name="ce6">
            <text:p>58.28014952</text:p>
          </table:table-cell>
          <table:table-cell office:value-type="float" office:value="101.2" table:style-name="ce6">
            <text:p>101.2</text:p>
          </table:table-cell>
          <table:table-cell office:value-type="float" office:value="67.3" table:style-name="ce6">
            <text:p>67.3</text:p>
          </table:table-cell>
          <table:table-cell office:value-type="float" office:value="172.4" table:style-name="ce6">
            <text:p>172.4</text:p>
          </table:table-cell>
          <table:table-cell office:value-type="float" office:value="2.6389999999999998" table:style-name="ce6">
            <text:p>2.639</text:p>
          </table:table-cell>
          <table:table-cell office:value-type="float" office:value="13.2" table:style-name="ce6">
            <text:p>13.2</text:p>
          </table:table-cell>
          <table:table-cell office:value-type="date" office:date-value="2012-02-02T00:00:00" table:style-name="ce7">
            <text:p>2/2/201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Acura</text:p>
          </table:table-cell>
          <table:table-cell office:value-type="string" table:style-name="ce5">
            <text:p>TL</text:p>
          </table:table-cell>
          <table:table-cell office:value-type="float" office:value="39384" table:style-name="ce11">
            <text:p>39384</text:p>
          </table:table-cell>
          <table:table-cell office:value-type="currency" office:value="28400" table:style-name="ce12">
            <text:p>$28,400</text:p>
          </table:table-cell>
          <table:table-cell office:value-type="currency" office:value="19875" table:style-name="ce12">
            <text:p>$19,875</text:p>
          </table:table-cell>
          <table:table-cell office:value-type="percentage" office:value="0.69982394366197187" table:formula="of:=SUM([.E3]/[.D3])" table:style-name="ce13">
            <text:p>70%</text:p>
          </table:table-cell>
          <table:table-cell office:value-type="string" office:string-value="GOOD" table:formula="of:=IF([.F3]&gt;69%; &quot;GOOD&quot;; &quot;POOR&quot;)" table:style-name="ce20">
            <text:p>GOOD</text:p>
          </table:table-cell>
          <table:table-cell office:value-type="float" office:value="3.2" table:style-name="ce6">
            <text:p>3.2</text:p>
          </table:table-cell>
          <table:table-cell office:value-type="float" office:value="225" table:style-name="ce6">
            <text:p>225</text:p>
          </table:table-cell>
          <table:table-cell office:value-type="string" office:string-value="Medium HP" table:formula="of:=COM.MICROSOFT.IFS([.I3]&gt;299;&quot;High HP&quot;;[.I3]&gt;99;&quot;Medium HP&quot;;[.I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91.370777660000002" table:style-name="ce6">
            <text:p>91.37077766</text:p>
          </table:table-cell>
          <table:table-cell office:value-type="float" office:value="108.1" table:style-name="ce6">
            <text:p>108.1</text:p>
          </table:table-cell>
          <table:table-cell office:value-type="float" office:value="70.3" table:style-name="ce6">
            <text:p>70.3</text:p>
          </table:table-cell>
          <table:table-cell office:value-type="float" office:value="192.9" table:style-name="ce6">
            <text:p>192.9</text:p>
          </table:table-cell>
          <table:table-cell office:value-type="float" office:value="3.5169999999999999" table:style-name="ce6">
            <text:p>3.517</text:p>
          </table:table-cell>
          <table:table-cell office:value-type="float" office:value="17.2" table:style-name="ce6">
            <text:p>17.2</text:p>
          </table:table-cell>
          <table:table-cell office:value-type="date" office:date-value="2011-06-03T00:00:00" table:style-name="ce7">
            <text:p>6/3/201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Acura</text:p>
          </table:table-cell>
          <table:table-cell office:value-type="string" table:style-name="ce5">
            <text:p>RL</text:p>
          </table:table-cell>
          <table:table-cell office:value-type="float" office:value="8588" table:style-name="ce11">
            <text:p>8588</text:p>
          </table:table-cell>
          <table:table-cell office:value-type="currency" office:value="42000" table:style-name="ce12">
            <text:p>$42,000</text:p>
          </table:table-cell>
          <table:table-cell office:value-type="currency" office:value="29725" table:style-name="ce12">
            <text:p>$29,725</text:p>
          </table:table-cell>
          <table:table-cell office:value-type="percentage" office:value="0.70773809523809528" table:formula="of:=SUM([.E4]/[.D4])" table:style-name="ce13">
            <text:p>71%</text:p>
          </table:table-cell>
          <table:table-cell office:value-type="string" office:string-value="GOOD" table:formula="of:=IF([.F4]&gt;69%; &quot;GOOD&quot;; &quot;POOR&quot;)" table:style-name="ce20">
            <text:p>GOOD</text:p>
          </table:table-cell>
          <table:table-cell office:value-type="float" office:value="3.5" table:style-name="ce6">
            <text:p>3.5</text:p>
          </table:table-cell>
          <table:table-cell office:value-type="float" office:value="210" table:style-name="ce6">
            <text:p>210</text:p>
          </table:table-cell>
          <table:table-cell office:value-type="string" office:string-value="Medium HP" table:formula="of:=COM.MICROSOFT.IFS([.I4]&gt;299;&quot;High HP&quot;;[.I4]&gt;99;&quot;Medium HP&quot;;[.I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91.389779329999996" table:style-name="ce6">
            <text:p>91.38977933</text:p>
          </table:table-cell>
          <table:table-cell office:value-type="float" office:value="114.6" table:style-name="ce6">
            <text:p>114.6</text:p>
          </table:table-cell>
          <table:table-cell office:value-type="float" office:value="71.400000000000006" table:style-name="ce6">
            <text:p>71.4</text:p>
          </table:table-cell>
          <table:table-cell office:value-type="float" office:value="196.6" table:style-name="ce6">
            <text:p>196.6</text:p>
          </table:table-cell>
          <table:table-cell office:value-type="float" office:value="3.85" table:style-name="ce6">
            <text:p>3.85</text:p>
          </table:table-cell>
          <table:table-cell office:value-type="float" office:value="18" table:style-name="ce6">
            <text:p>18</text:p>
          </table:table-cell>
          <table:table-cell office:value-type="date" office:date-value="2011-03-10T00:00:00" table:style-name="ce7">
            <text:p>3/10/201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Audi</text:p>
          </table:table-cell>
          <table:table-cell office:value-type="string" table:style-name="ce5">
            <text:p>A4</text:p>
          </table:table-cell>
          <table:table-cell office:value-type="float" office:value="20397" table:style-name="ce11">
            <text:p>20397</text:p>
          </table:table-cell>
          <table:table-cell office:value-type="currency" office:value="23990" table:style-name="ce12">
            <text:p>$23,990</text:p>
          </table:table-cell>
          <table:table-cell office:value-type="currency" office:value="22255" table:style-name="ce12">
            <text:p>$22,255</text:p>
          </table:table-cell>
          <table:table-cell office:value-type="percentage" office:value="0.92767819924968742" table:formula="of:=SUM([.E5]/[.D5])" table:style-name="ce13">
            <text:p>93%</text:p>
          </table:table-cell>
          <table:table-cell office:value-type="string" office:string-value="GOOD" table:formula="of:=IF([.F5]&gt;69%; &quot;GOOD&quot;; &quot;POOR&quot;)" table:style-name="ce20">
            <text:p>GOOD</text:p>
          </table:table-cell>
          <table:table-cell office:value-type="float" office:value="1.8" table:style-name="ce6">
            <text:p>1.8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5]&gt;299;&quot;High HP&quot;;[.I5]&gt;99;&quot;Medium HP&quot;;[.I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62.777639200000003" table:style-name="ce6">
            <text:p>62.7776392</text:p>
          </table:table-cell>
          <table:table-cell office:value-type="float" office:value="102.6" table:style-name="ce6">
            <text:p>102.6</text:p>
          </table:table-cell>
          <table:table-cell office:value-type="float" office:value="68.2" table:style-name="ce6">
            <text:p>68.2</text:p>
          </table:table-cell>
          <table:table-cell office:value-type="float" office:value="178" table:style-name="ce6">
            <text:p>178</text:p>
          </table:table-cell>
          <table:table-cell office:value-type="float" office:value="2.9980000000000002" table:style-name="ce6">
            <text:p>2.998</text:p>
          </table:table-cell>
          <table:table-cell office:value-type="float" office:value="16.399999999999999" table:style-name="ce6">
            <text:p>16.4</text:p>
          </table:table-cell>
          <table:table-cell office:value-type="date" office:date-value="2011-10-08T00:00:00" table:style-name="ce7">
            <text:p>10/8/2011</text:p>
          </table:table-cell>
          <table:table-cell table:style-name="ce1"/>
          <table:table-cell table:style-name="ce2"/>
          <table:table-cell table:style-name="ce1"/>
          <table:table-cell table:style-name="ce14"/>
          <table:table-cell table:number-columns-repeated="16361"/>
        </table:table-row>
        <table:table-row table:style-name="ro1">
          <table:table-cell office:value-type="string" table:style-name="ce4">
            <text:p>Audi</text:p>
          </table:table-cell>
          <table:table-cell office:value-type="string" table:style-name="ce5">
            <text:p>A6</text:p>
          </table:table-cell>
          <table:table-cell office:value-type="float" office:value="18780" table:style-name="ce11">
            <text:p>18780</text:p>
          </table:table-cell>
          <table:table-cell office:value-type="currency" office:value="33950" table:style-name="ce12">
            <text:p>$33,950</text:p>
          </table:table-cell>
          <table:table-cell office:value-type="currency" office:value="23555" table:style-name="ce12">
            <text:p>$23,555</text:p>
          </table:table-cell>
          <table:table-cell office:value-type="percentage" office:value="0.6938144329896907" table:formula="of:=SUM([.E6]/[.D6])" table:style-name="ce13">
            <text:p>69%</text:p>
          </table:table-cell>
          <table:table-cell office:value-type="string" office:string-value="GOOD" table:formula="of:=IF([.F6]&gt;69%; &quot;GOOD&quot;; &quot;POOR&quot;)" table:style-name="ce20">
            <text:p>GOOD</text:p>
          </table:table-cell>
          <table:table-cell office:value-type="float" office:value="2.8" table:style-name="ce6">
            <text:p>2.8</text:p>
          </table:table-cell>
          <table:table-cell office:value-type="float" office:value="200" table:style-name="ce6">
            <text:p>200</text:p>
          </table:table-cell>
          <table:table-cell office:value-type="string" office:string-value="Medium HP" table:formula="of:=COM.MICROSOFT.IFS([.I6]&gt;299;&quot;High HP&quot;;[.I6]&gt;99;&quot;Medium HP&quot;;[.I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84.565105020000004" table:style-name="ce6">
            <text:p>84.56510502</text:p>
          </table:table-cell>
          <table:table-cell office:value-type="float" office:value="108.7" table:style-name="ce6">
            <text:p>108.7</text:p>
          </table:table-cell>
          <table:table-cell office:value-type="float" office:value="76.099999999999994" table:style-name="ce6">
            <text:p>76.1</text:p>
          </table:table-cell>
          <table:table-cell office:value-type="float" office:value="192" table:style-name="ce6">
            <text:p>192</text:p>
          </table:table-cell>
          <table:table-cell office:value-type="float" office:value="3.5609999999999999" table:style-name="ce6">
            <text:p>3.561</text:p>
          </table:table-cell>
          <table:table-cell office:value-type="float" office:value="18.5" table:style-name="ce6">
            <text:p>18.5</text:p>
          </table:table-cell>
          <table:table-cell office:value-type="date" office:date-value="2011-08-09T00:00:00" table:style-name="ce7">
            <text:p>8/9/2011</text:p>
          </table:table-cell>
          <table:table-cell table:number-columns-repeated="3" table:style-name="ce1"/>
          <table:table-cell table:style-name="ce14"/>
          <table:table-cell table:number-columns-repeated="16361"/>
        </table:table-row>
        <table:table-row table:style-name="ro1">
          <table:table-cell office:value-type="string" table:style-name="ce4">
            <text:p>Audi</text:p>
          </table:table-cell>
          <table:table-cell office:value-type="string" table:style-name="ce5">
            <text:p>A8</text:p>
          </table:table-cell>
          <table:table-cell office:value-type="float" office:value="1380" table:style-name="ce11">
            <text:p>1380</text:p>
          </table:table-cell>
          <table:table-cell office:value-type="currency" office:value="62000" table:style-name="ce12">
            <text:p>$62,000</text:p>
          </table:table-cell>
          <table:table-cell office:value-type="currency" office:value="39000" table:style-name="ce12">
            <text:p>$39,000</text:p>
          </table:table-cell>
          <table:table-cell office:value-type="percentage" office:value="0.62903225806451613" table:formula="of:=SUM([.E7]/[.D7])" table:style-name="ce13">
            <text:p>63%</text:p>
          </table:table-cell>
          <table:table-cell office:value-type="string" office:string-value="POOR" table:formula="of:=IF([.F7]&gt;69%; &quot;GOOD&quot;; &quot;POOR&quot;)" table:style-name="ce20">
            <text:p>POOR</text:p>
          </table:table-cell>
          <table:table-cell office:value-type="float" office:value="4.2" table:style-name="ce6">
            <text:p>4.2</text:p>
          </table:table-cell>
          <table:table-cell office:value-type="float" office:value="310" table:style-name="ce6">
            <text:p>310</text:p>
          </table:table-cell>
          <table:table-cell office:value-type="string" office:string-value="High HP" table:formula="of:=COM.MICROSOFT.IFS([.I7]&gt;299;&quot;High HP&quot;;[.I7]&gt;99;&quot;Medium HP&quot;;[.I7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134.65685819999999" table:style-name="ce6">
            <text:p>134.6568582</text:p>
          </table:table-cell>
          <table:table-cell office:value-type="float" office:value="113" table:style-name="ce6">
            <text:p>113</text:p>
          </table:table-cell>
          <table:table-cell office:value-type="float" office:value="74" table:style-name="ce6">
            <text:p>74</text:p>
          </table:table-cell>
          <table:table-cell office:value-type="float" office:value="198.2" table:style-name="ce6">
            <text:p>198.2</text:p>
          </table:table-cell>
          <table:table-cell office:value-type="float" office:value="3.9020000000000001" table:style-name="ce6">
            <text:p>3.902</text:p>
          </table:table-cell>
          <table:table-cell office:value-type="float" office:value="23.7" table:style-name="ce6">
            <text:p>23.7</text:p>
          </table:table-cell>
          <table:table-cell office:value-type="date" office:date-value="2012-02-27T00:00:00" table:style-name="ce7">
            <text:p>2/27/2012</text:p>
          </table:table-cell>
          <table:table-cell table:number-columns-repeated="3" table:style-name="ce1"/>
          <table:table-cell table:style-name="ce14"/>
          <table:table-cell table:number-columns-repeated="16361"/>
        </table:table-row>
        <table:table-row table:style-name="ro1">
          <table:table-cell office:value-type="string" table:style-name="ce4">
            <text:p>BMW</text:p>
          </table:table-cell>
          <table:table-cell office:value-type="string" table:style-name="ce5">
            <text:p>323i</text:p>
          </table:table-cell>
          <table:table-cell office:value-type="float" office:value="19747" table:style-name="ce11">
            <text:p>19747</text:p>
          </table:table-cell>
          <table:table-cell office:value-type="currency" office:value="26990" table:style-name="ce12">
            <text:p>$26,990</text:p>
          </table:table-cell>
          <table:table-cell office:value-type="currency" office:value="24500" table:style-name="ce12">
            <text:p>$24,500</text:p>
          </table:table-cell>
          <table:table-cell office:value-type="percentage" office:value="0.9077436087439793" table:formula="of:=SUM([.E8]/[.D8])" table:style-name="ce13">
            <text:p>91%</text:p>
          </table:table-cell>
          <table:table-cell office:value-type="string" office:string-value="GOOD" table:formula="of:=IF([.F8]&gt;69%; &quot;GOOD&quot;; &quot;POOR&quot;)" table:style-name="ce20">
            <text:p>GOOD</text:p>
          </table:table-cell>
          <table:table-cell office:value-type="float" office:value="2.5" table:style-name="ce6">
            <text:p>2.5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8]&gt;299;&quot;High HP&quot;;[.I8]&gt;99;&quot;Medium HP&quot;;[.I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71.191206710000003" table:style-name="ce6">
            <text:p>71.19120671</text:p>
          </table:table-cell>
          <table:table-cell office:value-type="float" office:value="107.3" table:style-name="ce6">
            <text:p>107.3</text:p>
          </table:table-cell>
          <table:table-cell office:value-type="float" office:value="68.400000000000006" table:style-name="ce6">
            <text:p>68.4</text:p>
          </table:table-cell>
          <table:table-cell office:value-type="float" office:value="176" table:style-name="ce6">
            <text:p>176</text:p>
          </table:table-cell>
          <table:table-cell office:value-type="float" office:value="3.1789999999999998" table:style-name="ce6">
            <text:p>3.179</text:p>
          </table:table-cell>
          <table:table-cell office:value-type="float" office:value="16.600000000000001" table:style-name="ce6">
            <text:p>16.6</text:p>
          </table:table-cell>
          <table:table-cell office:value-type="date" office:date-value="2011-06-28T00:00:00" table:style-name="ce7">
            <text:p>6/28/2011</text:p>
          </table:table-cell>
          <table:table-cell table:number-columns-repeated="3" table:style-name="ce1"/>
          <table:table-cell table:style-name="ce14"/>
          <table:table-cell table:number-columns-repeated="16361"/>
        </table:table-row>
        <table:table-row table:style-name="ro1">
          <table:table-cell office:value-type="string" table:style-name="ce4">
            <text:p>BMW</text:p>
          </table:table-cell>
          <table:table-cell office:value-type="string" table:style-name="ce5">
            <text:p>328i</text:p>
          </table:table-cell>
          <table:table-cell office:value-type="float" office:value="9231" table:style-name="ce11">
            <text:p>9231</text:p>
          </table:table-cell>
          <table:table-cell office:value-type="currency" office:value="33400" table:style-name="ce12">
            <text:p>$33,400</text:p>
          </table:table-cell>
          <table:table-cell office:value-type="currency" office:value="28675" table:style-name="ce12">
            <text:p>$28,675</text:p>
          </table:table-cell>
          <table:table-cell office:value-type="percentage" office:value="0.85853293413173648" table:formula="of:=SUM([.E9]/[.D9])" table:style-name="ce13">
            <text:p>86%</text:p>
          </table:table-cell>
          <table:table-cell office:value-type="string" office:string-value="GOOD" table:formula="of:=IF([.F9]&gt;69%; &quot;GOOD&quot;; &quot;POOR&quot;)" table:style-name="ce20">
            <text:p>GOOD</text:p>
          </table:table-cell>
          <table:table-cell office:value-type="float" office:value="2.8" table:style-name="ce6">
            <text:p>2.8</text:p>
          </table:table-cell>
          <table:table-cell office:value-type="float" office:value="193" table:style-name="ce6">
            <text:p>193</text:p>
          </table:table-cell>
          <table:table-cell office:value-type="string" office:string-value="Medium HP" table:formula="of:=COM.MICROSOFT.IFS([.I9]&gt;299;&quot;High HP&quot;;[.I9]&gt;99;&quot;Medium HP&quot;;[.I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81.877068559999998" table:style-name="ce6">
            <text:p>81.87706856</text:p>
          </table:table-cell>
          <table:table-cell office:value-type="float" office:value="107.3" table:style-name="ce6">
            <text:p>107.3</text:p>
          </table:table-cell>
          <table:table-cell office:value-type="float" office:value="68.5" table:style-name="ce6">
            <text:p>68.5</text:p>
          </table:table-cell>
          <table:table-cell office:value-type="float" office:value="176" table:style-name="ce6">
            <text:p>176</text:p>
          </table:table-cell>
          <table:table-cell office:value-type="float" office:value="3.1970000000000001" table:style-name="ce6">
            <text:p>3.197</text:p>
          </table:table-cell>
          <table:table-cell office:value-type="float" office:value="16.600000000000001" table:style-name="ce6">
            <text:p>16.6</text:p>
          </table:table-cell>
          <table:table-cell office:value-type="date" office:date-value="2012-01-29T00:00:00" table:style-name="ce7">
            <text:p>1/29/2012</text:p>
          </table:table-cell>
          <table:table-cell table:number-columns-repeated="3" table:style-name="ce1"/>
          <table:table-cell table:style-name="ce14"/>
          <table:table-cell table:number-columns-repeated="16361"/>
        </table:table-row>
        <table:table-row table:style-name="ro1">
          <table:table-cell office:value-type="string" table:style-name="ce4">
            <text:p>BMW</text:p>
          </table:table-cell>
          <table:table-cell office:value-type="string" table:style-name="ce5">
            <text:p>528i</text:p>
          </table:table-cell>
          <table:table-cell office:value-type="float" office:value="17527" table:style-name="ce11">
            <text:p>17527</text:p>
          </table:table-cell>
          <table:table-cell office:value-type="currency" office:value="38900" table:style-name="ce12">
            <text:p>$38,900</text:p>
          </table:table-cell>
          <table:table-cell office:value-type="currency" office:value="36125" table:style-name="ce12">
            <text:p>$36,125</text:p>
          </table:table-cell>
          <table:table-cell office:value-type="percentage" office:value="0.92866323907455017" table:formula="of:=SUM([.E10]/[.D10])" table:style-name="ce13">
            <text:p>93%</text:p>
          </table:table-cell>
          <table:table-cell office:value-type="string" office:string-value="GOOD" table:formula="of:=IF([.F10]&gt;69%; &quot;GOOD&quot;; &quot;POOR&quot;)" table:style-name="ce20">
            <text:p>GOOD</text:p>
          </table:table-cell>
          <table:table-cell office:value-type="float" office:value="2.8" table:style-name="ce6">
            <text:p>2.8</text:p>
          </table:table-cell>
          <table:table-cell office:value-type="float" office:value="193" table:style-name="ce6">
            <text:p>193</text:p>
          </table:table-cell>
          <table:table-cell office:value-type="string" office:string-value="Medium HP" table:formula="of:=COM.MICROSOFT.IFS([.I10]&gt;299;&quot;High HP&quot;;[.I10]&gt;99;&quot;Medium HP&quot;;[.I1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83.998723799999993" table:style-name="ce6">
            <text:p>83.9987238</text:p>
          </table:table-cell>
          <table:table-cell office:value-type="float" office:value="111.4" table:style-name="ce6">
            <text:p>111.4</text:p>
          </table:table-cell>
          <table:table-cell office:value-type="float" office:value="70.900000000000006" table:style-name="ce6">
            <text:p>70.9</text:p>
          </table:table-cell>
          <table:table-cell office:value-type="float" office:value="188" table:style-name="ce6">
            <text:p>188</text:p>
          </table:table-cell>
          <table:table-cell office:value-type="float" office:value="3.472" table:style-name="ce6">
            <text:p>3.472</text:p>
          </table:table-cell>
          <table:table-cell office:value-type="float" office:value="18.5" table:style-name="ce6">
            <text:p>18.5</text:p>
          </table:table-cell>
          <table:table-cell office:value-type="date" office:date-value="2011-04-04T00:00:00" table:style-name="ce7">
            <text:p>4/4/2011</text:p>
          </table:table-cell>
          <table:table-cell table:number-columns-repeated="3" table:style-name="ce1"/>
          <table:table-cell table:style-name="ce14"/>
          <table:table-cell table:number-columns-repeated="16361"/>
        </table:table-row>
        <table:table-row table:style-name="ro1">
          <table:table-cell office:value-type="string" table:style-name="ce4">
            <text:p>Buick</text:p>
          </table:table-cell>
          <table:table-cell office:value-type="string" table:style-name="ce5">
            <text:p>Century</text:p>
          </table:table-cell>
          <table:table-cell office:value-type="float" office:value="91561" table:style-name="ce11">
            <text:p>91561</text:p>
          </table:table-cell>
          <table:table-cell office:value-type="currency" office:value="21975" table:style-name="ce12">
            <text:p>$21,975</text:p>
          </table:table-cell>
          <table:table-cell office:value-type="currency" office:value="12475" table:style-name="ce12">
            <text:p>$12,475</text:p>
          </table:table-cell>
          <table:table-cell office:value-type="percentage" office:value="0.56769055745164965" table:formula="of:=SUM([.E11]/[.D11])" table:style-name="ce13">
            <text:p>57%</text:p>
          </table:table-cell>
          <table:table-cell office:value-type="string" office:string-value="POOR" table:formula="of:=IF([.F11]&gt;69%; &quot;GOOD&quot;; &quot;POOR&quot;)" table:style-name="ce20">
            <text:p>POOR</text:p>
          </table:table-cell>
          <table:table-cell office:value-type="float" office:value="3.1" table:style-name="ce6">
            <text:p>3.1</text:p>
          </table:table-cell>
          <table:table-cell office:value-type="float" office:value="175" table:style-name="ce6">
            <text:p>175</text:p>
          </table:table-cell>
          <table:table-cell office:value-type="string" office:string-value="Medium HP" table:formula="of:=COM.MICROSOFT.IFS([.I11]&gt;299;&quot;High HP&quot;;[.I11]&gt;99;&quot;Medium HP&quot;;[.I1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71.181451319999994" table:style-name="ce6">
            <text:p>71.18145132</text:p>
          </table:table-cell>
          <table:table-cell office:value-type="float" office:value="109" table:style-name="ce6">
            <text:p>109</text:p>
          </table:table-cell>
          <table:table-cell office:value-type="float" office:value="72.7" table:style-name="ce6">
            <text:p>72.7</text:p>
          </table:table-cell>
          <table:table-cell office:value-type="float" office:value="194.6" table:style-name="ce6">
            <text:p>194.6</text:p>
          </table:table-cell>
          <table:table-cell office:value-type="float" office:value="3.3679999999999999" table:style-name="ce6">
            <text:p>3.368</text:p>
          </table:table-cell>
          <table:table-cell office:value-type="float" office:value="17.5" table:style-name="ce6">
            <text:p>17.5</text:p>
          </table:table-cell>
          <table:table-cell office:value-type="date" office:date-value="2011-11-02T00:00:00" table:style-name="ce7">
            <text:p>11/2/2011</text:p>
          </table:table-cell>
          <table:table-cell table:number-columns-repeated="3" table:style-name="ce1"/>
          <table:table-cell table:style-name="ce14"/>
          <table:table-cell table:number-columns-repeated="16361"/>
        </table:table-row>
        <table:table-row table:style-name="ro1">
          <table:table-cell office:value-type="string" table:style-name="ce4">
            <text:p>Buick</text:p>
          </table:table-cell>
          <table:table-cell office:value-type="string" table:style-name="ce5">
            <text:p>Regal</text:p>
          </table:table-cell>
          <table:table-cell office:value-type="float" office:value="39350" table:style-name="ce11">
            <text:p>39350</text:p>
          </table:table-cell>
          <table:table-cell office:value-type="currency" office:value="25300" table:style-name="ce12">
            <text:p>$25,300</text:p>
          </table:table-cell>
          <table:table-cell office:value-type="currency" office:value="13740" table:style-name="ce12">
            <text:p>$13,740</text:p>
          </table:table-cell>
          <table:table-cell office:value-type="percentage" office:value="0.54308300395256914" table:formula="of:=SUM([.E12]/[.D12])" table:style-name="ce13">
            <text:p>54%</text:p>
          </table:table-cell>
          <table:table-cell office:value-type="string" office:string-value="POOR" table:formula="of:=IF([.F12]&gt;69%; &quot;GOOD&quot;; &quot;POOR&quot;)" table:style-name="ce20">
            <text:p>POOR</text:p>
          </table:table-cell>
          <table:table-cell office:value-type="float" office:value="3.8" table:style-name="ce6">
            <text:p>3.8</text:p>
          </table:table-cell>
          <table:table-cell office:value-type="float" office:value="240" table:style-name="ce6">
            <text:p>240</text:p>
          </table:table-cell>
          <table:table-cell office:value-type="string" office:string-value="Medium HP" table:formula="of:=COM.MICROSOFT.IFS([.I12]&gt;299;&quot;High HP&quot;;[.I12]&gt;99;&quot;Medium HP&quot;;[.I1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95.636702529999994" table:style-name="ce6">
            <text:p>95.63670253</text:p>
          </table:table-cell>
          <table:table-cell office:value-type="float" office:value="109" table:style-name="ce6">
            <text:p>109</text:p>
          </table:table-cell>
          <table:table-cell office:value-type="float" office:value="72.7" table:style-name="ce6">
            <text:p>72.7</text:p>
          </table:table-cell>
          <table:table-cell office:value-type="float" office:value="196.2" table:style-name="ce6">
            <text:p>196.2</text:p>
          </table:table-cell>
          <table:table-cell office:value-type="float" office:value="3.5430000000000001" table:style-name="ce6">
            <text:p>3.543</text:p>
          </table:table-cell>
          <table:table-cell office:value-type="float" office:value="17.5" table:style-name="ce6">
            <text:p>17.5</text:p>
          </table:table-cell>
          <table:table-cell office:value-type="date" office:date-value="2011-09-03T00:00:00" table:style-name="ce7">
            <text:p>9/3/2011</text:p>
          </table:table-cell>
          <table:table-cell table:number-columns-repeated="3" table:style-name="ce1"/>
          <table:table-cell table:style-name="ce14"/>
          <table:table-cell table:number-columns-repeated="16361"/>
        </table:table-row>
        <table:table-row table:style-name="ro1">
          <table:table-cell office:value-type="string" table:style-name="ce4">
            <text:p>Buick</text:p>
          </table:table-cell>
          <table:table-cell office:value-type="string" table:style-name="ce5">
            <text:p>Park Avenue</text:p>
          </table:table-cell>
          <table:table-cell office:value-type="float" office:value="27851" table:style-name="ce11">
            <text:p>27851</text:p>
          </table:table-cell>
          <table:table-cell office:value-type="currency" office:value="31965" table:style-name="ce12">
            <text:p>$31,965</text:p>
          </table:table-cell>
          <table:table-cell office:value-type="currency" office:value="20190" table:style-name="ce12">
            <text:p>$20,190</text:p>
          </table:table-cell>
          <table:table-cell office:value-type="percentage" office:value="0.63162834350070385" table:formula="of:=SUM([.E13]/[.D13])" table:style-name="ce13">
            <text:p>63%</text:p>
          </table:table-cell>
          <table:table-cell office:value-type="string" office:string-value="POOR" table:formula="of:=IF([.F13]&gt;69%; &quot;GOOD&quot;; &quot;POOR&quot;)" table:style-name="ce20">
            <text:p>POOR</text:p>
          </table:table-cell>
          <table:table-cell office:value-type="float" office:value="3.8" table:style-name="ce6">
            <text:p>3.8</text:p>
          </table:table-cell>
          <table:table-cell office:value-type="float" office:value="205" table:style-name="ce6">
            <text:p>205</text:p>
          </table:table-cell>
          <table:table-cell office:value-type="string" office:string-value="Medium HP" table:formula="of:=COM.MICROSOFT.IFS([.I13]&gt;299;&quot;High HP&quot;;[.I13]&gt;99;&quot;Medium HP&quot;;[.I1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85.828408249999995" table:style-name="ce6">
            <text:p>85.82840825</text:p>
          </table:table-cell>
          <table:table-cell office:value-type="float" office:value="113.8" table:style-name="ce6">
            <text:p>113.8</text:p>
          </table:table-cell>
          <table:table-cell office:value-type="float" office:value="74.7" table:style-name="ce6">
            <text:p>74.7</text:p>
          </table:table-cell>
          <table:table-cell office:value-type="float" office:value="206.8" table:style-name="ce6">
            <text:p>206.8</text:p>
          </table:table-cell>
          <table:table-cell office:value-type="float" office:value="3.778" table:style-name="ce6">
            <text:p>3.778</text:p>
          </table:table-cell>
          <table:table-cell office:value-type="float" office:value="18.5" table:style-name="ce6">
            <text:p>18.5</text:p>
          </table:table-cell>
          <table:table-cell office:value-type="date" office:date-value="2012-03-23T00:00:00" table:style-name="ce7">
            <text:p>3/23/2012</text:p>
          </table:table-cell>
          <table:table-cell table:number-columns-repeated="3" table:style-name="ce1"/>
          <table:table-cell table:style-name="ce14"/>
          <table:table-cell table:number-columns-repeated="16361"/>
        </table:table-row>
        <table:table-row table:style-name="ro1">
          <table:table-cell office:value-type="string" table:style-name="ce4">
            <text:p>Buick</text:p>
          </table:table-cell>
          <table:table-cell office:value-type="string" table:style-name="ce5">
            <text:p>LeSabre</text:p>
          </table:table-cell>
          <table:table-cell office:value-type="float" office:value="83257" table:style-name="ce11">
            <text:p>83257</text:p>
          </table:table-cell>
          <table:table-cell office:value-type="currency" office:value="27885" table:style-name="ce12">
            <text:p>$27,885</text:p>
          </table:table-cell>
          <table:table-cell office:value-type="currency" office:value="13360" table:style-name="ce12">
            <text:p>$13,360</text:p>
          </table:table-cell>
          <table:table-cell office:value-type="percentage" office:value="0.4791106329567868" table:formula="of:=SUM([.E14]/[.D14])" table:style-name="ce13">
            <text:p>48%</text:p>
          </table:table-cell>
          <table:table-cell office:value-type="string" office:string-value="POOR" table:formula="of:=IF([.F14]&gt;69%; &quot;GOOD&quot;; &quot;POOR&quot;)" table:style-name="ce20">
            <text:p>POOR</text:p>
          </table:table-cell>
          <table:table-cell office:value-type="float" office:value="3.8" table:style-name="ce6">
            <text:p>3.8</text:p>
          </table:table-cell>
          <table:table-cell office:value-type="float" office:value="205" table:style-name="ce6">
            <text:p>205</text:p>
          </table:table-cell>
          <table:table-cell office:value-type="string" office:string-value="Medium HP" table:formula="of:=COM.MICROSOFT.IFS([.I14]&gt;299;&quot;High HP&quot;;[.I14]&gt;99;&quot;Medium HP&quot;;[.I1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84.254525810000004" table:style-name="ce6">
            <text:p>84.25452581</text:p>
          </table:table-cell>
          <table:table-cell office:value-type="float" office:value="112.2" table:style-name="ce6">
            <text:p>112.2</text:p>
          </table:table-cell>
          <table:table-cell office:value-type="float" office:value="73.5" table:style-name="ce6">
            <text:p>73.5</text:p>
          </table:table-cell>
          <table:table-cell office:value-type="float" office:value="200" table:style-name="ce6">
            <text:p>200</text:p>
          </table:table-cell>
          <table:table-cell office:value-type="float" office:value="3.5910000000000002" table:style-name="ce6">
            <text:p>3.591</text:p>
          </table:table-cell>
          <table:table-cell office:value-type="float" office:value="17.5" table:style-name="ce6">
            <text:p>17.5</text:p>
          </table:table-cell>
          <table:table-cell office:value-type="date" office:date-value="2011-07-23T00:00:00" table:style-name="ce7">
            <text:p>7/23/201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Cadillac</text:p>
          </table:table-cell>
          <table:table-cell office:value-type="string" table:style-name="ce5">
            <text:p>DeVille</text:p>
          </table:table-cell>
          <table:table-cell office:value-type="float" office:value="63729" table:style-name="ce11">
            <text:p>63729</text:p>
          </table:table-cell>
          <table:table-cell office:value-type="currency" office:value="39895" table:style-name="ce12">
            <text:p>$39,895</text:p>
          </table:table-cell>
          <table:table-cell office:value-type="currency" office:value="22525" table:style-name="ce12">
            <text:p>$22,525</text:p>
          </table:table-cell>
          <table:table-cell office:value-type="percentage" office:value="0.56460709362075445" table:formula="of:=SUM([.E15]/[.D15])" table:style-name="ce13">
            <text:p>56%</text:p>
          </table:table-cell>
          <table:table-cell office:value-type="string" office:string-value="POOR" table:formula="of:=IF([.F15]&gt;69%; &quot;GOOD&quot;; &quot;POOR&quot;)" table:style-name="ce20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75" table:style-name="ce6">
            <text:p>275</text:p>
          </table:table-cell>
          <table:table-cell office:value-type="string" office:string-value="Medium HP" table:formula="of:=COM.MICROSOFT.IFS([.I15]&gt;299;&quot;High HP&quot;;[.I15]&gt;99;&quot;Medium HP&quot;;[.I1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113.85459760000001" table:style-name="ce6">
            <text:p>113.8545976</text:p>
          </table:table-cell>
          <table:table-cell office:value-type="float" office:value="115.3" table:style-name="ce6">
            <text:p>115.3</text:p>
          </table:table-cell>
          <table:table-cell office:value-type="float" office:value="74.5" table:style-name="ce6">
            <text:p>74.5</text:p>
          </table:table-cell>
          <table:table-cell office:value-type="float" office:value="207.2" table:style-name="ce6">
            <text:p>207.2</text:p>
          </table:table-cell>
          <table:table-cell office:value-type="float" office:value="3.9780000000000002" table:style-name="ce6">
            <text:p>3.978</text:p>
          </table:table-cell>
          <table:table-cell office:value-type="float" office:value="18.5" table:style-name="ce6">
            <text:p>18.5</text:p>
          </table:table-cell>
          <table:table-cell office:value-type="date" office:date-value="2012-02-23T00:00:00" table:style-name="ce7">
            <text:p>2/23/201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Cadillac</text:p>
          </table:table-cell>
          <table:table-cell office:value-type="string" table:style-name="ce5">
            <text:p>Seville</text:p>
          </table:table-cell>
          <table:table-cell office:value-type="float" office:value="15943" table:style-name="ce11">
            <text:p>15943</text:p>
          </table:table-cell>
          <table:table-cell office:value-type="currency" office:value="44475" table:style-name="ce12">
            <text:p>$44,475</text:p>
          </table:table-cell>
          <table:table-cell office:value-type="currency" office:value="27100" table:style-name="ce12">
            <text:p>$27,100</text:p>
          </table:table-cell>
          <table:table-cell office:value-type="percentage" office:value="0.60933108487914556" table:formula="of:=SUM([.E16]/[.D16])" table:style-name="ce13">
            <text:p>61%</text:p>
          </table:table-cell>
          <table:table-cell office:value-type="string" office:string-value="POOR" table:formula="of:=IF([.F16]&gt;69%; &quot;GOOD&quot;; &quot;POOR&quot;)" table:style-name="ce20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75" table:style-name="ce6">
            <text:p>275</text:p>
          </table:table-cell>
          <table:table-cell office:value-type="string" office:string-value="Medium HP" table:formula="of:=COM.MICROSOFT.IFS([.I16]&gt;299;&quot;High HP&quot;;[.I16]&gt;99;&quot;Medium HP&quot;;[.I1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115.6213578" table:style-name="ce6">
            <text:p>115.6213578</text:p>
          </table:table-cell>
          <table:table-cell office:value-type="float" office:value="112.2" table:style-name="ce6">
            <text:p>112.2</text:p>
          </table:table-cell>
          <table:table-cell office:value-type="float" office:value="75" table:style-name="ce6">
            <text:p>75</text:p>
          </table:table-cell>
          <table:table-cell office:value-type="float" office:value="201" table:style-name="ce6">
            <text:p>201</text:p>
          </table:table-cell>
          <table:table-cell office:value-type="float" office:value="3.875" table:style-name="ce6">
            <text:p>3.875</text:p>
          </table:table-cell>
          <table:table-cell office:value-type="float" office:value="18.5" table:style-name="ce6">
            <text:p>18.5</text:p>
          </table:table-cell>
          <table:table-cell office:value-type="date" office:date-value="2011-04-29T00:00:00" table:style-name="ce7">
            <text:p>4/29/2011</text:p>
          </table:table-cell>
          <table:table-cell table:number-columns-repeated="2" table:style-name="ce1"/>
          <table:table-cell table:style-name="ce14"/>
          <table:table-cell table:number-columns-repeated="16362" table:style-name="ce1"/>
        </table:table-row>
        <table:table-row table:style-name="ro1">
          <table:table-cell office:value-type="string" table:style-name="ce4">
            <text:p>Cadillac</text:p>
          </table:table-cell>
          <table:table-cell office:value-type="string" table:style-name="ce5">
            <text:p>Eldorado</text:p>
          </table:table-cell>
          <table:table-cell office:value-type="float" office:value="6536" table:style-name="ce11">
            <text:p>6536</text:p>
          </table:table-cell>
          <table:table-cell office:value-type="currency" office:value="39665" table:style-name="ce12">
            <text:p>$39,665</text:p>
          </table:table-cell>
          <table:table-cell office:value-type="currency" office:value="25725" table:style-name="ce12">
            <text:p>$25,725</text:p>
          </table:table-cell>
          <table:table-cell office:value-type="percentage" office:value="0.6485566620446237" table:formula="of:=SUM([.E17]/[.D17])" table:style-name="ce13">
            <text:p>65%</text:p>
          </table:table-cell>
          <table:table-cell office:value-type="string" office:string-value="POOR" table:formula="of:=IF([.F17]&gt;69%; &quot;GOOD&quot;; &quot;POOR&quot;)" table:style-name="ce20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75" table:style-name="ce6">
            <text:p>275</text:p>
          </table:table-cell>
          <table:table-cell office:value-type="string" office:string-value="Medium HP" table:formula="of:=COM.MICROSOFT.IFS([.I17]&gt;299;&quot;High HP&quot;;[.I17]&gt;99;&quot;Medium HP&quot;;[.I1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113.7658739" table:style-name="ce6">
            <text:p>113.7658739</text:p>
          </table:table-cell>
          <table:table-cell office:value-type="float" office:value="108" table:style-name="ce6">
            <text:p>108</text:p>
          </table:table-cell>
          <table:table-cell office:value-type="float" office:value="75.5" table:style-name="ce6">
            <text:p>75.5</text:p>
          </table:table-cell>
          <table:table-cell office:value-type="float" office:value="200.6" table:style-name="ce6">
            <text:p>200.6</text:p>
          </table:table-cell>
          <table:table-cell office:value-type="float" office:value="3.843" table:style-name="ce6">
            <text:p>3.843</text:p>
          </table:table-cell>
          <table:table-cell office:value-type="float" office:value="19" table:style-name="ce6">
            <text:p>19</text:p>
          </table:table-cell>
          <table:table-cell office:value-type="date" office:date-value="2011-11-27T00:00:00" table:style-name="ce7">
            <text:p>11/27/201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Cadillac</text:p>
          </table:table-cell>
          <table:table-cell office:value-type="string" table:style-name="ce5">
            <text:p>Catera</text:p>
          </table:table-cell>
          <table:table-cell office:value-type="float" office:value="11185" table:style-name="ce11">
            <text:p>11185</text:p>
          </table:table-cell>
          <table:table-cell office:value-type="currency" office:value="31010" table:style-name="ce12">
            <text:p>$31,010</text:p>
          </table:table-cell>
          <table:table-cell office:value-type="currency" office:value="18225" table:style-name="ce12">
            <text:p>$18,225</text:p>
          </table:table-cell>
          <table:table-cell office:value-type="percentage" office:value="0.58771364076104482" table:formula="of:=SUM([.E18]/[.D18])" table:style-name="ce13">
            <text:p>59%</text:p>
          </table:table-cell>
          <table:table-cell office:value-type="string" office:string-value="POOR" table:formula="of:=IF([.F18]&gt;69%; &quot;GOOD&quot;; &quot;POOR&quot;)" table:style-name="ce20">
            <text:p>POOR</text:p>
          </table:table-cell>
          <table:table-cell office:value-type="float" office:value="3" table:style-name="ce6">
            <text:p>3</text:p>
          </table:table-cell>
          <table:table-cell office:value-type="float" office:value="200" table:style-name="ce6">
            <text:p>200</text:p>
          </table:table-cell>
          <table:table-cell office:value-type="string" office:string-value="Medium HP" table:formula="of:=COM.MICROSOFT.IFS([.I18]&gt;299;&quot;High HP&quot;;[.I18]&gt;99;&quot;Medium HP&quot;;[.I1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83.483093580000002" table:style-name="ce6">
            <text:p>83.48309358</text:p>
          </table:table-cell>
          <table:table-cell office:value-type="float" office:value="107.4" table:style-name="ce6">
            <text:p>107.4</text:p>
          </table:table-cell>
          <table:table-cell office:value-type="float" office:value="70.3" table:style-name="ce6">
            <text:p>70.3</text:p>
          </table:table-cell>
          <table:table-cell office:value-type="float" office:value="194.8" table:style-name="ce6">
            <text:p>194.8</text:p>
          </table:table-cell>
          <table:table-cell office:value-type="float" office:value="3.77" table:style-name="ce6">
            <text:p>3.77</text:p>
          </table:table-cell>
          <table:table-cell office:value-type="float" office:value="18" table:style-name="ce6">
            <text:p>18</text:p>
          </table:table-cell>
          <table:table-cell office:value-type="date" office:date-value="2011-09-28T00:00:00" table:style-name="ce7">
            <text:p>9/28/201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Cadillac</text:p>
          </table:table-cell>
          <table:table-cell office:value-type="string" table:style-name="ce5">
            <text:p>Escalade</text:p>
          </table:table-cell>
          <table:table-cell office:value-type="float" office:value="14785" table:style-name="ce11">
            <text:p>14785</text:p>
          </table:table-cell>
          <table:table-cell office:value-type="currency" office:value="46225" table:style-name="ce12">
            <text:p>$46,225</text:p>
          </table:table-cell>
          <table:table-cell office:value-type="currency" office:value="31245" table:style-name="ce12">
            <text:p>$31,245</text:p>
          </table:table-cell>
          <table:table-cell office:value-type="percentage" office:value="0.67593293672255272" table:formula="of:=SUM([.E19]/[.D19])" table:style-name="ce13">
            <text:p>68%</text:p>
          </table:table-cell>
          <table:table-cell office:value-type="string" office:string-value="POOR" table:formula="of:=IF([.F19]&gt;69%; &quot;GOOD&quot;; &quot;POOR&quot;)" table:style-name="ce20">
            <text:p>POOR</text:p>
          </table:table-cell>
          <table:table-cell office:value-type="float" office:value="5.7" table:style-name="ce6">
            <text:p>5.7</text:p>
          </table:table-cell>
          <table:table-cell office:value-type="float" office:value="255" table:style-name="ce6">
            <text:p>255</text:p>
          </table:table-cell>
          <table:table-cell office:value-type="string" office:string-value="Medium HP" table:formula="of:=COM.MICROSOFT.IFS([.I19]&gt;299;&quot;High HP&quot;;[.I19]&gt;99;&quot;Medium HP&quot;;[.I1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5" table:style-name="ce6">
            <text:p>15</text:p>
          </table:table-cell>
          <table:table-cell office:value-type="float" office:value="109.5091165" table:style-name="ce6">
            <text:p>109.5091165</text:p>
          </table:table-cell>
          <table:table-cell office:value-type="float" office:value="117.5" table:style-name="ce6">
            <text:p>117.5</text:p>
          </table:table-cell>
          <table:table-cell office:value-type="float" office:value="77" table:style-name="ce6">
            <text:p>77</text:p>
          </table:table-cell>
          <table:table-cell office:value-type="float" office:value="201.2" table:style-name="ce6">
            <text:p>201.2</text:p>
          </table:table-cell>
          <table:table-cell office:value-type="float" office:value="5.5720000000000001" table:style-name="ce6">
            <text:p>5.572</text:p>
          </table:table-cell>
          <table:table-cell office:value-type="float" office:value="30" table:style-name="ce6">
            <text:p>30</text:p>
          </table:table-cell>
          <table:table-cell office:value-type="date" office:date-value="2012-04-17T00:00:00" table:style-name="ce7">
            <text:p>4/17/201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Chevrolet</text:p>
          </table:table-cell>
          <table:table-cell office:value-type="string" table:style-name="ce5">
            <text:p>Cavalier</text:p>
          </table:table-cell>
          <table:table-cell office:value-type="float" office:value="145519" table:style-name="ce11">
            <text:p>145519</text:p>
          </table:table-cell>
          <table:table-cell office:value-type="currency" office:value="13260" table:style-name="ce12">
            <text:p>$13,260</text:p>
          </table:table-cell>
          <table:table-cell office:value-type="currency" office:value="9250" table:style-name="ce12">
            <text:p>$9,250</text:p>
          </table:table-cell>
          <table:table-cell office:value-type="percentage" office:value="0.69758672699849167" table:formula="of:=SUM([.E20]/[.D20])" table:style-name="ce13">
            <text:p>70%</text:p>
          </table:table-cell>
          <table:table-cell office:value-type="string" office:string-value="GOOD" table:formula="of:=IF([.F20]&gt;69%; &quot;GOOD&quot;; &quot;POOR&quot;)" table:style-name="ce20">
            <text:p>GOOD</text:p>
          </table:table-cell>
          <table:table-cell office:value-type="float" office:value="2.2000000000000002" table:style-name="ce6">
            <text:p>2.2</text:p>
          </table:table-cell>
          <table:table-cell office:value-type="float" office:value="115" table:style-name="ce6">
            <text:p>115</text:p>
          </table:table-cell>
          <table:table-cell office:value-type="string" office:string-value="Medium HP" table:formula="of:=COM.MICROSOFT.IFS([.I20]&gt;299;&quot;High HP&quot;;[.I20]&gt;99;&quot;Medium HP&quot;;[.I2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46.363347470000001" table:style-name="ce6">
            <text:p>46.36334747</text:p>
          </table:table-cell>
          <table:table-cell office:value-type="float" office:value="104.1" table:style-name="ce6">
            <text:p>104.1</text:p>
          </table:table-cell>
          <table:table-cell office:value-type="float" office:value="67.900000000000006" table:style-name="ce6">
            <text:p>67.9</text:p>
          </table:table-cell>
          <table:table-cell office:value-type="float" office:value="180.9" table:style-name="ce6">
            <text:p>180.9</text:p>
          </table:table-cell>
          <table:table-cell office:value-type="float" office:value="2.6760000000000002" table:style-name="ce6">
            <text:p>2.676</text:p>
          </table:table-cell>
          <table:table-cell office:value-type="float" office:value="14.3" table:style-name="ce6">
            <text:p>14.3</text:p>
          </table:table-cell>
          <table:table-cell office:value-type="date" office:date-value="2011-08-17T00:00:00" table:style-name="ce7">
            <text:p>8/17/201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Chevrolet</text:p>
          </table:table-cell>
          <table:table-cell office:value-type="string" table:style-name="ce5">
            <text:p>Malibu</text:p>
          </table:table-cell>
          <table:table-cell office:value-type="float" office:value="135126" table:style-name="ce11">
            <text:p>135126</text:p>
          </table:table-cell>
          <table:table-cell office:value-type="currency" office:value="16535" table:style-name="ce12">
            <text:p>$16,535</text:p>
          </table:table-cell>
          <table:table-cell office:value-type="currency" office:value="11225" table:style-name="ce12">
            <text:p>$11,225</text:p>
          </table:table-cell>
          <table:table-cell office:value-type="percentage" office:value="0.67886301784094349" table:formula="of:=SUM([.E21]/[.D21])" table:style-name="ce13">
            <text:p>68%</text:p>
          </table:table-cell>
          <table:table-cell office:value-type="string" office:string-value="POOR" table:formula="of:=IF([.F21]&gt;69%; &quot;GOOD&quot;; &quot;POOR&quot;)" table:style-name="ce20">
            <text:p>POOR</text:p>
          </table:table-cell>
          <table:table-cell office:value-type="float" office:value="3.1" table:style-name="ce6">
            <text:p>3.1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21]&gt;299;&quot;High HP&quot;;[.I21]&gt;99;&quot;Medium HP&quot;;[.I2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67.314462160000005" table:style-name="ce6">
            <text:p>67.31446216</text:p>
          </table:table-cell>
          <table:table-cell office:value-type="float" office:value="107" table:style-name="ce6">
            <text:p>107</text:p>
          </table:table-cell>
          <table:table-cell office:value-type="float" office:value="69.400000000000006" table:style-name="ce6">
            <text:p>69.4</text:p>
          </table:table-cell>
          <table:table-cell office:value-type="float" office:value="190.4" table:style-name="ce6">
            <text:p>190.4</text:p>
          </table:table-cell>
          <table:table-cell office:value-type="float" office:value="3.0510000000000002" table:style-name="ce6">
            <text:p>3.051</text:p>
          </table:table-cell>
          <table:table-cell office:value-type="float" office:value="15" table:style-name="ce6">
            <text:p>15</text:p>
          </table:table-cell>
          <table:table-cell office:value-type="date" office:date-value="2012-03-19T00:00:00" table:style-name="ce7">
            <text:p>3/19/2012</text:p>
          </table:table-cell>
          <table:table-cell table:number-columns-repeated="2" table:style-name="ce1"/>
          <table:table-cell table:number-columns-repeated="2" table:style-name="ce2"/>
          <table:table-cell table:number-columns-repeated="3" table:style-name="ce16"/>
          <table:table-cell table:number-columns-repeated="16358"/>
        </table:table-row>
        <table:table-row table:style-name="ro1">
          <table:table-cell office:value-type="string" table:style-name="ce4">
            <text:p>Chevrolet</text:p>
          </table:table-cell>
          <table:table-cell office:value-type="string" table:style-name="ce5">
            <text:p>Lumina</text:p>
          </table:table-cell>
          <table:table-cell office:value-type="float" office:value="24629" table:style-name="ce11">
            <text:p>24629</text:p>
          </table:table-cell>
          <table:table-cell office:value-type="currency" office:value="18890" table:style-name="ce12">
            <text:p>$18,890</text:p>
          </table:table-cell>
          <table:table-cell office:value-type="currency" office:value="10310" table:style-name="ce12">
            <text:p>$10,310</text:p>
          </table:table-cell>
          <table:table-cell office:value-type="percentage" office:value="0.54579142403388037" table:formula="of:=SUM([.E22]/[.D22])" table:style-name="ce13">
            <text:p>55%</text:p>
          </table:table-cell>
          <table:table-cell office:value-type="string" office:string-value="POOR" table:formula="of:=IF([.F22]&gt;69%; &quot;GOOD&quot;; &quot;POOR&quot;)" table:style-name="ce20">
            <text:p>POOR</text:p>
          </table:table-cell>
          <table:table-cell office:value-type="float" office:value="3.1" table:style-name="ce6">
            <text:p>3.1</text:p>
          </table:table-cell>
          <table:table-cell office:value-type="float" office:value="175" table:style-name="ce6">
            <text:p>175</text:p>
          </table:table-cell>
          <table:table-cell office:value-type="string" office:string-value="Medium HP" table:formula="of:=COM.MICROSOFT.IFS([.I22]&gt;299;&quot;High HP&quot;;[.I22]&gt;99;&quot;Medium HP&quot;;[.I2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69.991395600000004" table:style-name="ce6">
            <text:p>69.9913956</text:p>
          </table:table-cell>
          <table:table-cell office:value-type="float" office:value="107.5" table:style-name="ce6">
            <text:p>107.5</text:p>
          </table:table-cell>
          <table:table-cell office:value-type="float" office:value="72.5" table:style-name="ce6">
            <text:p>72.5</text:p>
          </table:table-cell>
          <table:table-cell office:value-type="float" office:value="200.9" table:style-name="ce6">
            <text:p>200.9</text:p>
          </table:table-cell>
          <table:table-cell office:value-type="float" office:value="3.33" table:style-name="ce6">
            <text:p>3.33</text:p>
          </table:table-cell>
          <table:table-cell office:value-type="float" office:value="16.600000000000001" table:style-name="ce6">
            <text:p>16.6</text:p>
          </table:table-cell>
          <table:table-cell office:value-type="date" office:date-value="2011-05-24T00:00:00" table:style-name="ce7">
            <text:p>5/24/2011</text:p>
          </table:table-cell>
          <table:table-cell table:number-columns-repeated="4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office:value-type="string" table:style-name="ce4">
            <text:p>Chevrolet</text:p>
          </table:table-cell>
          <table:table-cell office:value-type="string" table:style-name="ce5">
            <text:p>Monte Carlo</text:p>
          </table:table-cell>
          <table:table-cell office:value-type="float" office:value="42593" table:style-name="ce11">
            <text:p>42593</text:p>
          </table:table-cell>
          <table:table-cell office:value-type="currency" office:value="19390" table:style-name="ce12">
            <text:p>$19,390</text:p>
          </table:table-cell>
          <table:table-cell office:value-type="currency" office:value="11525" table:style-name="ce12">
            <text:p>$11,525</text:p>
          </table:table-cell>
          <table:table-cell office:value-type="percentage" office:value="0.59437854564208359" table:formula="of:=SUM([.E23]/[.D23])" table:style-name="ce13">
            <text:p>59%</text:p>
          </table:table-cell>
          <table:table-cell office:value-type="string" office:string-value="POOR" table:formula="of:=IF([.F23]&gt;69%; &quot;GOOD&quot;; &quot;POOR&quot;)" table:style-name="ce20">
            <text:p>POOR</text:p>
          </table:table-cell>
          <table:table-cell office:value-type="float" office:value="3.4" table:style-name="ce6">
            <text:p>3.4</text:p>
          </table:table-cell>
          <table:table-cell office:value-type="float" office:value="180" table:style-name="ce6">
            <text:p>180</text:p>
          </table:table-cell>
          <table:table-cell office:value-type="string" office:string-value="Medium HP" table:formula="of:=COM.MICROSOFT.IFS([.I23]&gt;299;&quot;High HP&quot;;[.I23]&gt;99;&quot;Medium HP&quot;;[.I2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72.030917189999997" table:style-name="ce6">
            <text:p>72.03091719</text:p>
          </table:table-cell>
          <table:table-cell office:value-type="float" office:value="110.5" table:style-name="ce6">
            <text:p>110.5</text:p>
          </table:table-cell>
          <table:table-cell office:value-type="float" office:value="72.7" table:style-name="ce6">
            <text:p>72.7</text:p>
          </table:table-cell>
          <table:table-cell office:value-type="float" office:value="197.9" table:style-name="ce6">
            <text:p>197.9</text:p>
          </table:table-cell>
          <table:table-cell office:value-type="float" office:value="3.34" table:style-name="ce6">
            <text:p>3.34</text:p>
          </table:table-cell>
          <table:table-cell office:value-type="float" office:value="17" table:style-name="ce6">
            <text:p>17</text:p>
          </table:table-cell>
          <table:table-cell office:value-type="date" office:date-value="2011-12-22T00:00:00" table:style-name="ce7">
            <text:p>12/22/201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Chevrolet</text:p>
          </table:table-cell>
          <table:table-cell office:value-type="string" table:style-name="ce5">
            <text:p>Camaro</text:p>
          </table:table-cell>
          <table:table-cell office:value-type="float" office:value="26402" table:style-name="ce11">
            <text:p>26402</text:p>
          </table:table-cell>
          <table:table-cell office:value-type="currency" office:value="24340" table:style-name="ce12">
            <text:p>$24,340</text:p>
          </table:table-cell>
          <table:table-cell office:value-type="currency" office:value="13025" table:style-name="ce12">
            <text:p>$13,025</text:p>
          </table:table-cell>
          <table:table-cell office:value-type="percentage" office:value="0.53512736236647496" table:formula="of:=SUM([.E24]/[.D24])" table:style-name="ce13">
            <text:p>54%</text:p>
          </table:table-cell>
          <table:table-cell office:value-type="string" office:string-value="POOR" table:formula="of:=IF([.F24]&gt;69%; &quot;GOOD&quot;; &quot;POOR&quot;)" table:style-name="ce20">
            <text:p>POOR</text:p>
          </table:table-cell>
          <table:table-cell office:value-type="float" office:value="3.8" table:style-name="ce6">
            <text:p>3.8</text:p>
          </table:table-cell>
          <table:table-cell office:value-type="float" office:value="200" table:style-name="ce6">
            <text:p>200</text:p>
          </table:table-cell>
          <table:table-cell office:value-type="string" office:string-value="Medium HP" table:formula="of:=COM.MICROSOFT.IFS([.I24]&gt;299;&quot;High HP&quot;;[.I24]&gt;99;&quot;Medium HP&quot;;[.I2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81.118543329999994" table:style-name="ce6">
            <text:p>81.11854333</text:p>
          </table:table-cell>
          <table:table-cell office:value-type="float" office:value="101.1" table:style-name="ce6">
            <text:p>101.1</text:p>
          </table:table-cell>
          <table:table-cell office:value-type="float" office:value="74.099999999999994" table:style-name="ce6">
            <text:p>74.1</text:p>
          </table:table-cell>
          <table:table-cell office:value-type="float" office:value="193.2" table:style-name="ce6">
            <text:p>193.2</text:p>
          </table:table-cell>
          <table:table-cell office:value-type="float" office:value="3.5" table:style-name="ce6">
            <text:p>3.5</text:p>
          </table:table-cell>
          <table:table-cell office:value-type="float" office:value="16.8" table:style-name="ce6">
            <text:p>16.8</text:p>
          </table:table-cell>
          <table:table-cell office:value-type="date" office:date-value="2011-10-23T00:00:00" table:style-name="ce7">
            <text:p>10/23/201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Chevrolet</text:p>
          </table:table-cell>
          <table:table-cell office:value-type="string" table:style-name="ce5">
            <text:p>Corvette</text:p>
          </table:table-cell>
          <table:table-cell office:value-type="float" office:value="17947" table:style-name="ce11">
            <text:p>17947</text:p>
          </table:table-cell>
          <table:table-cell office:value-type="currency" office:value="55705" table:style-name="ce12">
            <text:p>$55,705</text:p>
          </table:table-cell>
          <table:table-cell office:value-type="currency" office:value="36225" table:style-name="ce12">
            <text:p>$36,225</text:p>
          </table:table-cell>
          <table:table-cell office:value-type="percentage" office:value="0.65030069114083111" table:formula="of:=SUM([.E25]/[.D25])" table:style-name="ce13">
            <text:p>65%</text:p>
          </table:table-cell>
          <table:table-cell office:value-type="string" office:string-value="POOR" table:formula="of:=IF([.F25]&gt;69%; &quot;GOOD&quot;; &quot;POOR&quot;)" table:style-name="ce20">
            <text:p>POOR</text:p>
          </table:table-cell>
          <table:table-cell office:value-type="float" office:value="5.7" table:style-name="ce6">
            <text:p>5.7</text:p>
          </table:table-cell>
          <table:table-cell office:value-type="float" office:value="345" table:style-name="ce6">
            <text:p>345</text:p>
          </table:table-cell>
          <table:table-cell office:value-type="string" office:string-value="High HP" table:formula="of:=COM.MICROSOFT.IFS([.I25]&gt;299;&quot;High HP&quot;;[.I25]&gt;99;&quot;Medium HP&quot;;[.I25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141.14115000000001" table:style-name="ce6">
            <text:p>141.14115</text:p>
          </table:table-cell>
          <table:table-cell office:value-type="float" office:value="104.5" table:style-name="ce6">
            <text:p>104.5</text:p>
          </table:table-cell>
          <table:table-cell office:value-type="float" office:value="73.599999999999994" table:style-name="ce6">
            <text:p>73.6</text:p>
          </table:table-cell>
          <table:table-cell office:value-type="float" office:value="179.7" table:style-name="ce6">
            <text:p>179.7</text:p>
          </table:table-cell>
          <table:table-cell office:value-type="float" office:value="3.21" table:style-name="ce6">
            <text:p>3.21</text:p>
          </table:table-cell>
          <table:table-cell office:value-type="float" office:value="19.100000000000001" table:style-name="ce6">
            <text:p>19.1</text:p>
          </table:table-cell>
          <table:table-cell office:value-type="date" office:date-value="2012-05-12T00:00:00" table:style-name="ce7">
            <text:p>5/12/201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Chevrolet</text:p>
          </table:table-cell>
          <table:table-cell office:value-type="string" table:style-name="ce5">
            <text:p>Prizm</text:p>
          </table:table-cell>
          <table:table-cell office:value-type="float" office:value="32299" table:style-name="ce11">
            <text:p>32299</text:p>
          </table:table-cell>
          <table:table-cell office:value-type="currency" office:value="13960" table:style-name="ce12">
            <text:p>$13,960</text:p>
          </table:table-cell>
          <table:table-cell office:value-type="currency" office:value="9125" table:style-name="ce12">
            <text:p>$9,125</text:p>
          </table:table-cell>
          <table:table-cell office:value-type="percentage" office:value="0.65365329512893988" table:formula="of:=SUM([.E26]/[.D26])" table:style-name="ce13">
            <text:p>65%</text:p>
          </table:table-cell>
          <table:table-cell office:value-type="string" office:string-value="POOR" table:formula="of:=IF([.F26]&gt;69%; &quot;GOOD&quot;; &quot;POOR&quot;)" table:style-name="ce20">
            <text:p>POOR</text:p>
          </table:table-cell>
          <table:table-cell office:value-type="float" office:value="1.8" table:style-name="ce6">
            <text:p>1.8</text:p>
          </table:table-cell>
          <table:table-cell office:value-type="float" office:value="120" table:style-name="ce6">
            <text:p>120</text:p>
          </table:table-cell>
          <table:table-cell office:value-type="string" office:string-value="Medium HP" table:formula="of:=COM.MICROSOFT.IFS([.I26]&gt;299;&quot;High HP&quot;;[.I26]&gt;99;&quot;Medium HP&quot;;[.I2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3" table:style-name="ce6">
            <text:p>33</text:p>
          </table:table-cell>
          <table:table-cell office:value-type="float" office:value="48.297636099999998" table:style-name="ce6">
            <text:p>48.2976361</text:p>
          </table:table-cell>
          <table:table-cell office:value-type="float" office:value="97.1" table:style-name="ce6">
            <text:p>97.1</text:p>
          </table:table-cell>
          <table:table-cell office:value-type="float" office:value="66.7" table:style-name="ce6">
            <text:p>66.7</text:p>
          </table:table-cell>
          <table:table-cell office:value-type="float" office:value="174.3" table:style-name="ce6">
            <text:p>174.3</text:p>
          </table:table-cell>
          <table:table-cell office:value-type="float" office:value="2.3980000000000001" table:style-name="ce6">
            <text:p>2.398</text:p>
          </table:table-cell>
          <table:table-cell office:value-type="float" office:value="13.2" table:style-name="ce6">
            <text:p>13.2</text:p>
          </table:table-cell>
          <table:table-cell office:value-type="date" office:date-value="2011-09-11T00:00:00" table:style-name="ce7">
            <text:p>9/11/201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Chevrolet</text:p>
          </table:table-cell>
          <table:table-cell office:value-type="string" table:style-name="ce5">
            <text:p>Metro</text:p>
          </table:table-cell>
          <table:table-cell office:value-type="float" office:value="21855" table:style-name="ce11">
            <text:p>21855</text:p>
          </table:table-cell>
          <table:table-cell office:value-type="currency" office:value="9235" table:style-name="ce12">
            <text:p>$9,235</text:p>
          </table:table-cell>
          <table:table-cell office:value-type="currency" office:value="5160" table:style-name="ce12">
            <text:p>$5,160</text:p>
          </table:table-cell>
          <table:table-cell office:value-type="percentage" office:value="0.55874390904168925" table:formula="of:=SUM([.E27]/[.D27])" table:style-name="ce13">
            <text:p>56%</text:p>
          </table:table-cell>
          <table:table-cell office:value-type="string" office:string-value="POOR" table:formula="of:=IF([.F27]&gt;69%; &quot;GOOD&quot;; &quot;POOR&quot;)" table:style-name="ce20">
            <text:p>POOR</text:p>
          </table:table-cell>
          <table:table-cell office:value-type="float" office:value="1" table:style-name="ce6">
            <text:p>1</text:p>
          </table:table-cell>
          <table:table-cell office:value-type="float" office:value="55" table:style-name="ce6">
            <text:p>55</text:p>
          </table:table-cell>
          <table:table-cell office:value-type="string" office:string-value="Low HP" table:formula="of:=COM.MICROSOFT.IFS([.I27]&gt;299;&quot;High HP&quot;;[.I27]&gt;99;&quot;Medium HP&quot;;[.I27]&lt;100;&quot;Low HP&quot;)" table:number-matrix-columns-spanned="1" table:number-matrix-rows-spanned="1" table:style-name="ce6">
            <text:p>Low HP</text:p>
          </table:table-cell>
          <table:table-cell office:value-type="string" table:style-name="ce6">
            <text:p>Passenger</text:p>
          </table:table-cell>
          <table:table-cell office:value-type="float" office:value="45" table:style-name="ce6">
            <text:p>45</text:p>
          </table:table-cell>
          <table:table-cell office:value-type="float" office:value="23.276272330000001" table:style-name="ce6">
            <text:p>23.27627233</text:p>
          </table:table-cell>
          <table:table-cell office:value-type="float" office:value="93.1" table:style-name="ce6">
            <text:p>93.1</text:p>
          </table:table-cell>
          <table:table-cell office:value-type="float" office:value="62.6" table:style-name="ce6">
            <text:p>62.6</text:p>
          </table:table-cell>
          <table:table-cell office:value-type="float" office:value="149.4" table:style-name="ce6">
            <text:p>149.4</text:p>
          </table:table-cell>
          <table:table-cell office:value-type="float" office:value="1.895" table:style-name="ce6">
            <text:p>1.895</text:p>
          </table:table-cell>
          <table:table-cell office:value-type="float" office:value="10.3" table:style-name="ce6">
            <text:p>10.3</text:p>
          </table:table-cell>
          <table:table-cell office:value-type="date" office:date-value="2012-04-13T00:00:00" table:style-name="ce7">
            <text:p>4/13/201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Chevrolet</text:p>
          </table:table-cell>
          <table:table-cell office:value-type="string" table:style-name="ce5">
            <text:p>Impala</text:p>
          </table:table-cell>
          <table:table-cell office:value-type="float" office:value="107995" table:style-name="ce11">
            <text:p>107995</text:p>
          </table:table-cell>
          <table:table-cell office:value-type="currency" office:value="18890" table:style-name="ce12">
            <text:p>$18,890</text:p>
          </table:table-cell>
          <table:table-cell office:value-type="currency" office:value="11550" table:style-name="ce12">
            <text:p>$11,550</text:p>
          </table:table-cell>
          <table:table-cell office:value-type="percentage" office:value="0.61143462149285333" table:formula="of:=SUM([.E28]/[.D28])" table:style-name="ce13">
            <text:p>61%</text:p>
          </table:table-cell>
          <table:table-cell office:value-type="string" office:string-value="POOR" table:formula="of:=IF([.F28]&gt;69%; &quot;GOOD&quot;; &quot;POOR&quot;)" table:style-name="ce20">
            <text:p>POOR</text:p>
          </table:table-cell>
          <table:table-cell office:value-type="float" office:value="3.4" table:style-name="ce6">
            <text:p>3.4</text:p>
          </table:table-cell>
          <table:table-cell office:value-type="float" office:value="180" table:style-name="ce6">
            <text:p>180</text:p>
          </table:table-cell>
          <table:table-cell office:value-type="string" office:string-value="Medium HP" table:formula="of:=COM.MICROSOFT.IFS([.I28]&gt;299;&quot;High HP&quot;;[.I28]&gt;99;&quot;Medium HP&quot;;[.I2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71.838039440000003" table:style-name="ce6">
            <text:p>71.83803944</text:p>
          </table:table-cell>
          <table:table-cell office:value-type="float" office:value="110.5" table:style-name="ce6">
            <text:p>110.5</text:p>
          </table:table-cell>
          <table:table-cell office:value-type="float" office:value="73" table:style-name="ce6">
            <text:p>73</text:p>
          </table:table-cell>
          <table:table-cell office:value-type="float" office:value="200" table:style-name="ce6">
            <text:p>200</text:p>
          </table:table-cell>
          <table:table-cell office:value-type="float" office:value="3.3889999999999998" table:style-name="ce6">
            <text:p>3.389</text:p>
          </table:table-cell>
          <table:table-cell office:value-type="float" office:value="17" table:style-name="ce6">
            <text:p>17</text:p>
          </table:table-cell>
          <table:table-cell office:value-type="date" office:date-value="2011-06-18T00:00:00" table:style-name="ce7">
            <text:p>6/18/201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Chrysler</text:p>
          </table:table-cell>
          <table:table-cell office:value-type="string" table:style-name="ce5">
            <text:p>Sebring Coupe</text:p>
          </table:table-cell>
          <table:table-cell office:value-type="float" office:value="7854" table:style-name="ce11">
            <text:p>7854</text:p>
          </table:table-cell>
          <table:table-cell office:value-type="currency" office:value="19840" table:style-name="ce12">
            <text:p>$19,840</text:p>
          </table:table-cell>
          <table:table-cell office:value-type="currency" office:value="12360" table:style-name="ce12">
            <text:p>$12,360</text:p>
          </table:table-cell>
          <table:table-cell office:value-type="percentage" office:value="0.62298387096774188" table:formula="of:=SUM([.E29]/[.D29])" table:style-name="ce13">
            <text:p>62%</text:p>
          </table:table-cell>
          <table:table-cell office:value-type="string" office:string-value="POOR" table:formula="of:=IF([.F29]&gt;69%; &quot;GOOD&quot;; &quot;POOR&quot;)" table:style-name="ce20">
            <text:p>POOR</text:p>
          </table:table-cell>
          <table:table-cell office:value-type="float" office:value="2.5" table:style-name="ce6">
            <text:p>2.5</text:p>
          </table:table-cell>
          <table:table-cell office:value-type="float" office:value="163" table:style-name="ce6">
            <text:p>163</text:p>
          </table:table-cell>
          <table:table-cell office:value-type="string" office:string-value="Medium HP" table:formula="of:=COM.MICROSOFT.IFS([.I29]&gt;299;&quot;High HP&quot;;[.I29]&gt;99;&quot;Medium HP&quot;;[.I2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65.957183959999995" table:style-name="ce6">
            <text:p>65.95718396</text:p>
          </table:table-cell>
          <table:table-cell office:value-type="float" office:value="103.7" table:style-name="ce6">
            <text:p>103.7</text:p>
          </table:table-cell>
          <table:table-cell office:value-type="float" office:value="69.7" table:style-name="ce6">
            <text:p>69.7</text:p>
          </table:table-cell>
          <table:table-cell office:value-type="float" office:value="190.9" table:style-name="ce6">
            <text:p>190.9</text:p>
          </table:table-cell>
          <table:table-cell office:value-type="float" office:value="2.9670000000000001" table:style-name="ce6">
            <text:p>2.967</text:p>
          </table:table-cell>
          <table:table-cell office:value-type="float" office:value="15.9" table:style-name="ce6">
            <text:p>15.9</text:p>
          </table:table-cell>
          <table:table-cell office:value-type="date" office:date-value="2012-01-16T00:00:00" table:style-name="ce7">
            <text:p>1/16/201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Chrysler</text:p>
          </table:table-cell>
          <table:table-cell office:value-type="string" table:style-name="ce5">
            <text:p>Sebring Conv.</text:p>
          </table:table-cell>
          <table:table-cell office:value-type="float" office:value="32775" table:style-name="ce11">
            <text:p>32775</text:p>
          </table:table-cell>
          <table:table-cell office:value-type="currency" office:value="24495" table:style-name="ce12">
            <text:p>$24,495</text:p>
          </table:table-cell>
          <table:table-cell office:value-type="currency" office:value="14180" table:style-name="ce12">
            <text:p>$14,180</text:p>
          </table:table-cell>
          <table:table-cell office:value-type="percentage" office:value="0.57889365176566643" table:formula="of:=SUM([.E30]/[.D30])" table:style-name="ce13">
            <text:p>58%</text:p>
          </table:table-cell>
          <table:table-cell office:value-type="string" office:string-value="POOR" table:formula="of:=IF([.F30]&gt;69%; &quot;GOOD&quot;; &quot;POOR&quot;)" table:style-name="ce20">
            <text:p>POOR</text:p>
          </table:table-cell>
          <table:table-cell office:value-type="float" office:value="2.5" table:style-name="ce6">
            <text:p>2.5</text:p>
          </table:table-cell>
          <table:table-cell office:value-type="float" office:value="168" table:style-name="ce6">
            <text:p>168</text:p>
          </table:table-cell>
          <table:table-cell office:value-type="string" office:string-value="Medium HP" table:formula="of:=COM.MICROSOFT.IFS([.I30]&gt;299;&quot;High HP&quot;;[.I30]&gt;99;&quot;Medium HP&quot;;[.I3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69.521355049999997" table:style-name="ce6">
            <text:p>69.52135505</text:p>
          </table:table-cell>
          <table:table-cell office:value-type="float" office:value="106" table:style-name="ce6">
            <text:p>106</text:p>
          </table:table-cell>
          <table:table-cell office:value-type="float" office:value="69.2" table:style-name="ce6">
            <text:p>69.2</text:p>
          </table:table-cell>
          <table:table-cell office:value-type="float" office:value="193" table:style-name="ce6">
            <text:p>193</text:p>
          </table:table-cell>
          <table:table-cell office:value-type="float" office:value="3.3319999999999999" table:style-name="ce6">
            <text:p>3.332</text:p>
          </table:table-cell>
          <table:table-cell office:value-type="float" office:value="16" table:style-name="ce6">
            <text:p>16</text:p>
          </table:table-cell>
          <table:table-cell office:value-type="date" office:date-value="2011-11-17T00:00:00" table:style-name="ce7">
            <text:p>11/17/201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Chrysler</text:p>
          </table:table-cell>
          <table:table-cell office:value-type="string" table:style-name="ce5">
            <text:p>Concorde</text:p>
          </table:table-cell>
          <table:table-cell office:value-type="float" office:value="31148" table:style-name="ce11">
            <text:p>31148</text:p>
          </table:table-cell>
          <table:table-cell office:value-type="currency" office:value="22245" table:style-name="ce12">
            <text:p>$22,245</text:p>
          </table:table-cell>
          <table:table-cell office:value-type="currency" office:value="13725" table:style-name="ce12">
            <text:p>$13,725</text:p>
          </table:table-cell>
          <table:table-cell office:value-type="percentage" office:value="0.61699258260283207" table:formula="of:=SUM([.E31]/[.D31])" table:style-name="ce13">
            <text:p>62%</text:p>
          </table:table-cell>
          <table:table-cell office:value-type="string" office:string-value="POOR" table:formula="of:=IF([.F31]&gt;69%; &quot;GOOD&quot;; &quot;POOR&quot;)" table:style-name="ce20">
            <text:p>POOR</text:p>
          </table:table-cell>
          <table:table-cell office:value-type="float" office:value="2.7" table:style-name="ce6">
            <text:p>2.7</text:p>
          </table:table-cell>
          <table:table-cell office:value-type="float" office:value="200" table:style-name="ce6">
            <text:p>200</text:p>
          </table:table-cell>
          <table:table-cell office:value-type="string" office:string-value="Medium HP" table:formula="of:=COM.MICROSOFT.IFS([.I31]&gt;299;&quot;High HP&quot;;[.I31]&gt;99;&quot;Medium HP&quot;;[.I3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80.02378204" table:style-name="ce6">
            <text:p>80.02378204</text:p>
          </table:table-cell>
          <table:table-cell office:value-type="float" office:value="113" table:style-name="ce6">
            <text:p>113</text:p>
          </table:table-cell>
          <table:table-cell office:value-type="float" office:value="74.400000000000006" table:style-name="ce6">
            <text:p>74.4</text:p>
          </table:table-cell>
          <table:table-cell office:value-type="float" office:value="209.1" table:style-name="ce6">
            <text:p>209.1</text:p>
          </table:table-cell>
          <table:table-cell office:value-type="float" office:value="3.452" table:style-name="ce6">
            <text:p>3.452</text:p>
          </table:table-cell>
          <table:table-cell office:value-type="float" office:value="17" table:style-name="ce6">
            <text:p>17</text:p>
          </table:table-cell>
          <table:table-cell office:value-type="date" office:date-value="2012-06-06T00:00:00" table:style-name="ce7">
            <text:p>6/6/201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Chrysler</text:p>
          </table:table-cell>
          <table:table-cell office:value-type="string" table:style-name="ce5">
            <text:p>Cirrus</text:p>
          </table:table-cell>
          <table:table-cell office:value-type="float" office:value="32305.999999999996" table:style-name="ce11">
            <text:p>32306</text:p>
          </table:table-cell>
          <table:table-cell office:value-type="currency" office:value="16480" table:style-name="ce12">
            <text:p>$16,480</text:p>
          </table:table-cell>
          <table:table-cell office:value-type="currency" office:value="12640" table:style-name="ce12">
            <text:p>$12,640</text:p>
          </table:table-cell>
          <table:table-cell office:value-type="percentage" office:value="0.76699029126213591" table:formula="of:=SUM([.E32]/[.D32])" table:style-name="ce13">
            <text:p>77%</text:p>
          </table:table-cell>
          <table:table-cell office:value-type="string" office:string-value="GOOD" table:formula="of:=IF([.F32]&gt;69%; &quot;GOOD&quot;; &quot;POOR&quot;)" table:style-name="ce20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6">
            <text:p>132</text:p>
          </table:table-cell>
          <table:table-cell office:value-type="string" office:string-value="Medium HP" table:formula="of:=COM.MICROSOFT.IFS([.I32]&gt;299;&quot;High HP&quot;;[.I32]&gt;99;&quot;Medium HP&quot;;[.I3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53.566199869999998" table:style-name="ce6">
            <text:p>53.56619987</text:p>
          </table:table-cell>
          <table:table-cell office:value-type="float" office:value="108" table:style-name="ce6">
            <text:p>108</text:p>
          </table:table-cell>
          <table:table-cell office:value-type="float" office:value="71" table:style-name="ce6">
            <text:p>71</text:p>
          </table:table-cell>
          <table:table-cell office:value-type="float" office:value="186" table:style-name="ce6">
            <text:p>186</text:p>
          </table:table-cell>
          <table:table-cell office:value-type="float" office:value="2.911" table:style-name="ce6">
            <text:p>2.911</text:p>
          </table:table-cell>
          <table:table-cell office:value-type="float" office:value="16" table:style-name="ce6">
            <text:p>16</text:p>
          </table:table-cell>
          <table:table-cell office:value-type="date" office:date-value="2011-10-06T00:00:00" table:style-name="ce7">
            <text:p>10/6/201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Chrysler</text:p>
          </table:table-cell>
          <table:table-cell office:value-type="string" table:style-name="ce5">
            <text:p>LHS</text:p>
          </table:table-cell>
          <table:table-cell office:value-type="float" office:value="13462" table:style-name="ce11">
            <text:p>13462</text:p>
          </table:table-cell>
          <table:table-cell office:value-type="currency" office:value="28340" table:style-name="ce12">
            <text:p>$28,340</text:p>
          </table:table-cell>
          <table:table-cell office:value-type="currency" office:value="17325" table:style-name="ce12">
            <text:p>$17,325</text:p>
          </table:table-cell>
          <table:table-cell office:value-type="percentage" office:value="0.61132674664784759" table:formula="of:=SUM([.E33]/[.D33])" table:style-name="ce13">
            <text:p>61%</text:p>
          </table:table-cell>
          <table:table-cell office:value-type="string" office:string-value="POOR" table:formula="of:=IF([.F33]&gt;69%; &quot;GOOD&quot;; &quot;POOR&quot;)" table:style-name="ce20">
            <text:p>POOR</text:p>
          </table:table-cell>
          <table:table-cell office:value-type="float" office:value="3.5" table:style-name="ce6">
            <text:p>3.5</text:p>
          </table:table-cell>
          <table:table-cell office:value-type="float" office:value="253" table:style-name="ce6">
            <text:p>253</text:p>
          </table:table-cell>
          <table:table-cell office:value-type="string" office:string-value="Medium HP" table:formula="of:=COM.MICROSOFT.IFS([.I33]&gt;299;&quot;High HP&quot;;[.I33]&gt;99;&quot;Medium HP&quot;;[.I3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101.3292807" table:style-name="ce6">
            <text:p>101.3292807</text:p>
          </table:table-cell>
          <table:table-cell office:value-type="float" office:value="113" table:style-name="ce6">
            <text:p>113</text:p>
          </table:table-cell>
          <table:table-cell office:value-type="float" office:value="74.400000000000006" table:style-name="ce6">
            <text:p>74.4</text:p>
          </table:table-cell>
          <table:table-cell office:value-type="float" office:value="207.7" table:style-name="ce6">
            <text:p>207.7</text:p>
          </table:table-cell>
          <table:table-cell office:value-type="float" office:value="3.5640000000000001" table:style-name="ce6">
            <text:p>3.564</text:p>
          </table:table-cell>
          <table:table-cell office:value-type="float" office:value="17" table:style-name="ce6">
            <text:p>17</text:p>
          </table:table-cell>
          <table:table-cell office:value-type="date" office:date-value="2012-05-08T00:00:00" table:style-name="ce7">
            <text:p>5/8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Chrysler</text:p>
          </table:table-cell>
          <table:table-cell office:value-type="string" table:style-name="ce5">
            <text:p>300M</text:p>
          </table:table-cell>
          <table:table-cell office:value-type="float" office:value="30696" table:style-name="ce11">
            <text:p>30696</text:p>
          </table:table-cell>
          <table:table-cell office:value-type="currency" office:value="29185" table:style-name="ce12">
            <text:p>$29,185</text:p>
          </table:table-cell>
          <table:table-cell office:value-type="currency" office:value="18425" table:style-name="ce12">
            <text:p>$18,425</text:p>
          </table:table-cell>
          <table:table-cell office:value-type="percentage" office:value="0.63131745759808122" table:formula="of:=SUM([.E34]/[.D34])" table:style-name="ce13">
            <text:p>63%</text:p>
          </table:table-cell>
          <table:table-cell office:value-type="string" office:string-value="POOR" table:formula="of:=IF([.F34]&gt;69%; &quot;GOOD&quot;; &quot;POOR&quot;)" table:style-name="ce20">
            <text:p>POOR</text:p>
          </table:table-cell>
          <table:table-cell office:value-type="float" office:value="3.5" table:style-name="ce6">
            <text:p>3.5</text:p>
          </table:table-cell>
          <table:table-cell office:value-type="float" office:value="253" table:style-name="ce6">
            <text:p>253</text:p>
          </table:table-cell>
          <table:table-cell office:value-type="string" office:string-value="Medium HP" table:formula="of:=COM.MICROSOFT.IFS([.I34]&gt;299;&quot;High HP&quot;;[.I34]&gt;99;&quot;Medium HP&quot;;[.I3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101.6552441" table:style-name="ce6">
            <text:p>101.6552441</text:p>
          </table:table-cell>
          <table:table-cell office:value-type="float" office:value="113" table:style-name="ce6">
            <text:p>113</text:p>
          </table:table-cell>
          <table:table-cell office:value-type="float" office:value="74.400000000000006" table:style-name="ce6">
            <text:p>74.4</text:p>
          </table:table-cell>
          <table:table-cell office:value-type="float" office:value="197.8" table:style-name="ce6">
            <text:p>197.8</text:p>
          </table:table-cell>
          <table:table-cell office:value-type="float" office:value="3.5670000000000002" table:style-name="ce6">
            <text:p>3.567</text:p>
          </table:table-cell>
          <table:table-cell office:value-type="float" office:value="17" table:style-name="ce6">
            <text:p>17</text:p>
          </table:table-cell>
          <table:table-cell office:value-type="date" office:date-value="2012-02-10T00:00:00" table:style-name="ce7">
            <text:p>2/10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Dodge</text:p>
          </table:table-cell>
          <table:table-cell office:value-type="string" table:style-name="ce5">
            <text:p>Neon</text:p>
          </table:table-cell>
          <table:table-cell office:value-type="float" office:value="76034" table:style-name="ce11">
            <text:p>76034</text:p>
          </table:table-cell>
          <table:table-cell office:value-type="currency" office:value="12640" table:style-name="ce12">
            <text:p>$12,640</text:p>
          </table:table-cell>
          <table:table-cell office:value-type="currency" office:value="7750" table:style-name="ce12">
            <text:p>$7,750</text:p>
          </table:table-cell>
          <table:table-cell office:value-type="percentage" office:value="0.61313291139240511" table:formula="of:=SUM([.E35]/[.D35])" table:style-name="ce13">
            <text:p>61%</text:p>
          </table:table-cell>
          <table:table-cell office:value-type="string" office:string-value="POOR" table:formula="of:=IF([.F35]&gt;69%; &quot;GOOD&quot;; &quot;POOR&quot;)" table:style-name="ce20">
            <text:p>POOR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6">
            <text:p>132</text:p>
          </table:table-cell>
          <table:table-cell office:value-type="string" office:string-value="Medium HP" table:formula="of:=COM.MICROSOFT.IFS([.I35]&gt;299;&quot;High HP&quot;;[.I35]&gt;99;&quot;Medium HP&quot;;[.I3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9" table:style-name="ce6">
            <text:p>29</text:p>
          </table:table-cell>
          <table:table-cell office:value-type="float" office:value="52.084898750000001" table:style-name="ce6">
            <text:p>52.08489875</text:p>
          </table:table-cell>
          <table:table-cell office:value-type="float" office:value="105" table:style-name="ce6">
            <text:p>105</text:p>
          </table:table-cell>
          <table:table-cell office:value-type="float" office:value="74.400000000000006" table:style-name="ce6">
            <text:p>74.4</text:p>
          </table:table-cell>
          <table:table-cell office:value-type="float" office:value="174.4" table:style-name="ce6">
            <text:p>174.4</text:p>
          </table:table-cell>
          <table:table-cell office:value-type="float" office:value="2.5670000000000002" table:style-name="ce6">
            <text:p>2.567</text:p>
          </table:table-cell>
          <table:table-cell office:value-type="float" office:value="12.5" table:style-name="ce6">
            <text:p>12.5</text:p>
          </table:table-cell>
          <table:table-cell office:value-type="date" office:date-value="2011-12-12T00:00:00" table:style-name="ce7">
            <text:p>12/12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Dodge</text:p>
          </table:table-cell>
          <table:table-cell office:value-type="string" table:style-name="ce5">
            <text:p>Avenger</text:p>
          </table:table-cell>
          <table:table-cell office:value-type="float" office:value="4734" table:style-name="ce11">
            <text:p>4734</text:p>
          </table:table-cell>
          <table:table-cell office:value-type="currency" office:value="19045" table:style-name="ce12">
            <text:p>$19,045</text:p>
          </table:table-cell>
          <table:table-cell office:value-type="currency" office:value="12545" table:style-name="ce12">
            <text:p>$12,545</text:p>
          </table:table-cell>
          <table:table-cell office:value-type="percentage" office:value="0.65870307167235498" table:formula="of:=SUM([.E36]/[.D36])" table:style-name="ce13">
            <text:p>66%</text:p>
          </table:table-cell>
          <table:table-cell office:value-type="string" office:string-value="POOR" table:formula="of:=IF([.F36]&gt;69%; &quot;GOOD&quot;; &quot;POOR&quot;)" table:style-name="ce20">
            <text:p>POOR</text:p>
          </table:table-cell>
          <table:table-cell office:value-type="float" office:value="2.5" table:style-name="ce6">
            <text:p>2.5</text:p>
          </table:table-cell>
          <table:table-cell office:value-type="float" office:value="163" table:style-name="ce6">
            <text:p>163</text:p>
          </table:table-cell>
          <table:table-cell office:value-type="string" office:string-value="Medium HP" table:formula="of:=COM.MICROSOFT.IFS([.I36]&gt;299;&quot;High HP&quot;;[.I36]&gt;99;&quot;Medium HP&quot;;[.I3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65.650508340000002" table:style-name="ce6">
            <text:p>65.65050834</text:p>
          </table:table-cell>
          <table:table-cell office:value-type="float" office:value="103.7" table:style-name="ce6">
            <text:p>103.7</text:p>
          </table:table-cell>
          <table:table-cell office:value-type="float" office:value="69.099999999999994" table:style-name="ce6">
            <text:p>69.1</text:p>
          </table:table-cell>
          <table:table-cell office:value-type="float" office:value="190.2" table:style-name="ce6">
            <text:p>190.2</text:p>
          </table:table-cell>
          <table:table-cell office:value-type="float" office:value="2.879" table:style-name="ce6">
            <text:p>2.879</text:p>
          </table:table-cell>
          <table:table-cell office:value-type="float" office:value="15.9" table:style-name="ce6">
            <text:p>15.9</text:p>
          </table:table-cell>
          <table:table-cell office:value-type="date" office:date-value="2012-07-01T00:00:00" table:style-name="ce7">
            <text:p>7/1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Dodge</text:p>
          </table:table-cell>
          <table:table-cell office:value-type="string" table:style-name="ce5">
            <text:p>Stratus</text:p>
          </table:table-cell>
          <table:table-cell office:value-type="float" office:value="71186" table:style-name="ce11">
            <text:p>71186</text:p>
          </table:table-cell>
          <table:table-cell office:value-type="currency" office:value="20230" table:style-name="ce12">
            <text:p>$20,230</text:p>
          </table:table-cell>
          <table:table-cell office:value-type="currency" office:value="10185" table:style-name="ce12">
            <text:p>$10,185</text:p>
          </table:table-cell>
          <table:table-cell office:value-type="percentage" office:value="0.5034602076124568" table:formula="of:=SUM([.E37]/[.D37])" table:style-name="ce13">
            <text:p>50%</text:p>
          </table:table-cell>
          <table:table-cell office:value-type="string" office:string-value="POOR" table:formula="of:=IF([.F37]&gt;69%; &quot;GOOD&quot;; &quot;POOR&quot;)" table:style-name="ce20">
            <text:p>POOR</text:p>
          </table:table-cell>
          <table:table-cell office:value-type="float" office:value="2.5" table:style-name="ce6">
            <text:p>2.5</text:p>
          </table:table-cell>
          <table:table-cell office:value-type="float" office:value="168" table:style-name="ce6">
            <text:p>168</text:p>
          </table:table-cell>
          <table:table-cell office:value-type="string" office:string-value="Medium HP" table:formula="of:=COM.MICROSOFT.IFS([.I37]&gt;299;&quot;High HP&quot;;[.I37]&gt;99;&quot;Medium HP&quot;;[.I3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67.876107840000003" table:style-name="ce6">
            <text:p>67.87610784</text:p>
          </table:table-cell>
          <table:table-cell office:value-type="float" office:value="108" table:style-name="ce6">
            <text:p>108</text:p>
          </table:table-cell>
          <table:table-cell office:value-type="float" office:value="71" table:style-name="ce6">
            <text:p>71</text:p>
          </table:table-cell>
          <table:table-cell office:value-type="float" office:value="186" table:style-name="ce6">
            <text:p>186</text:p>
          </table:table-cell>
          <table:table-cell office:value-type="float" office:value="3.0579999999999998" table:style-name="ce6">
            <text:p>3.058</text:p>
          </table:table-cell>
          <table:table-cell office:value-type="float" office:value="16" table:style-name="ce6">
            <text:p>16</text:p>
          </table:table-cell>
          <table:table-cell office:value-type="date" office:date-value="2011-10-31T00:00:00" table:style-name="ce7">
            <text:p>10/3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Dodge</text:p>
          </table:table-cell>
          <table:table-cell office:value-type="string" table:style-name="ce5">
            <text:p>Intrepid</text:p>
          </table:table-cell>
          <table:table-cell office:value-type="float" office:value="88028" table:style-name="ce11">
            <text:p>88028</text:p>
          </table:table-cell>
          <table:table-cell office:value-type="currency" office:value="22505" table:style-name="ce12">
            <text:p>$22,505</text:p>
          </table:table-cell>
          <table:table-cell office:value-type="currency" office:value="12275" table:style-name="ce12">
            <text:p>$12,275</text:p>
          </table:table-cell>
          <table:table-cell office:value-type="percentage" office:value="0.54543434792268386" table:formula="of:=SUM([.E38]/[.D38])" table:style-name="ce13">
            <text:p>55%</text:p>
          </table:table-cell>
          <table:table-cell office:value-type="string" office:string-value="POOR" table:formula="of:=IF([.F38]&gt;69%; &quot;GOOD&quot;; &quot;POOR&quot;)" table:style-name="ce20">
            <text:p>POOR</text:p>
          </table:table-cell>
          <table:table-cell office:value-type="float" office:value="2.7" table:style-name="ce6">
            <text:p>2.7</text:p>
          </table:table-cell>
          <table:table-cell office:value-type="float" office:value="202" table:style-name="ce6">
            <text:p>202</text:p>
          </table:table-cell>
          <table:table-cell office:value-type="string" office:string-value="Medium HP" table:formula="of:=COM.MICROSOFT.IFS([.I38]&gt;299;&quot;High HP&quot;;[.I38]&gt;99;&quot;Medium HP&quot;;[.I3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80.831470170000003" table:style-name="ce6">
            <text:p>80.83147017</text:p>
          </table:table-cell>
          <table:table-cell office:value-type="float" office:value="113" table:style-name="ce6">
            <text:p>113</text:p>
          </table:table-cell>
          <table:table-cell office:value-type="float" office:value="74.7" table:style-name="ce6">
            <text:p>74.7</text:p>
          </table:table-cell>
          <table:table-cell office:value-type="float" office:value="203.7" table:style-name="ce6">
            <text:p>203.7</text:p>
          </table:table-cell>
          <table:table-cell office:value-type="float" office:value="3.4889999999999999" table:style-name="ce6">
            <text:p>3.489</text:p>
          </table:table-cell>
          <table:table-cell office:value-type="float" office:value="17" table:style-name="ce6">
            <text:p>17</text:p>
          </table:table-cell>
          <table:table-cell office:value-type="date" office:date-value="2012-06-02T00:00:00" table:style-name="ce7">
            <text:p>6/2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Dodge</text:p>
          </table:table-cell>
          <table:table-cell office:value-type="string" table:style-name="ce5">
            <text:p>Viper</text:p>
          </table:table-cell>
          <table:table-cell office:value-type="float" office:value="916" table:style-name="ce11">
            <text:p>916</text:p>
          </table:table-cell>
          <table:table-cell office:value-type="currency" office:value="69725" table:style-name="ce12">
            <text:p>$69,725</text:p>
          </table:table-cell>
          <table:table-cell office:value-type="currency" office:value="58470" table:style-name="ce12">
            <text:p>$58,470</text:p>
          </table:table-cell>
          <table:table-cell office:value-type="percentage" office:value="0.83858013624955186" table:formula="of:=SUM([.E39]/[.D39])" table:style-name="ce13">
            <text:p>84%</text:p>
          </table:table-cell>
          <table:table-cell office:value-type="string" office:string-value="GOOD" table:formula="of:=IF([.F39]&gt;69%; &quot;GOOD&quot;; &quot;POOR&quot;)" table:style-name="ce20">
            <text:p>GOOD</text:p>
          </table:table-cell>
          <table:table-cell office:value-type="float" office:value="8" table:style-name="ce6">
            <text:p>8</text:p>
          </table:table-cell>
          <table:table-cell office:value-type="float" office:value="450" table:style-name="ce6">
            <text:p>450</text:p>
          </table:table-cell>
          <table:table-cell office:value-type="string" office:string-value="High HP" table:formula="of:=COM.MICROSOFT.IFS([.I39]&gt;299;&quot;High HP&quot;;[.I39]&gt;99;&quot;Medium HP&quot;;[.I39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Passenger</text:p>
          </table:table-cell>
          <table:table-cell office:value-type="float" office:value="16" table:style-name="ce6">
            <text:p>16</text:p>
          </table:table-cell>
          <table:table-cell office:value-type="float" office:value="188.14432300000001" table:style-name="ce6">
            <text:p>188.144323</text:p>
          </table:table-cell>
          <table:table-cell office:value-type="float" office:value="96.2" table:style-name="ce6">
            <text:p>96.2</text:p>
          </table:table-cell>
          <table:table-cell office:value-type="float" office:value="75.7" table:style-name="ce6">
            <text:p>75.7</text:p>
          </table:table-cell>
          <table:table-cell office:value-type="float" office:value="176.7" table:style-name="ce6">
            <text:p>176.7</text:p>
          </table:table-cell>
          <table:table-cell office:value-type="float" office:value="3.375" table:style-name="ce6">
            <text:p>3.375</text:p>
          </table:table-cell>
          <table:table-cell office:value-type="float" office:value="19" table:style-name="ce6">
            <text:p>19</text:p>
          </table:table-cell>
          <table:table-cell office:value-type="date" office:date-value="2011-08-07T00:00:00" table:style-name="ce7">
            <text:p>8/7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Dodge</text:p>
          </table:table-cell>
          <table:table-cell office:value-type="string" table:style-name="ce5">
            <text:p>Ram Pickup</text:p>
          </table:table-cell>
          <table:table-cell office:value-type="float" office:value="227061" table:style-name="ce11">
            <text:p>227061</text:p>
          </table:table-cell>
          <table:table-cell office:value-type="currency" office:value="19460" table:style-name="ce12">
            <text:p>$19,460</text:p>
          </table:table-cell>
          <table:table-cell office:value-type="currency" office:value="15060" table:style-name="ce12">
            <text:p>$15,060</text:p>
          </table:table-cell>
          <table:table-cell office:value-type="percentage" office:value="0.77389516957862281" table:formula="of:=SUM([.E40]/[.D40])" table:style-name="ce13">
            <text:p>77%</text:p>
          </table:table-cell>
          <table:table-cell office:value-type="string" office:string-value="GOOD" table:formula="of:=IF([.F40]&gt;69%; &quot;GOOD&quot;; &quot;POOR&quot;)" table:style-name="ce20">
            <text:p>GOOD</text:p>
          </table:table-cell>
          <table:table-cell office:value-type="float" office:value="5.2" table:style-name="ce6">
            <text:p>5.2</text:p>
          </table:table-cell>
          <table:table-cell office:value-type="float" office:value="230" table:style-name="ce6">
            <text:p>230</text:p>
          </table:table-cell>
          <table:table-cell office:value-type="string" office:string-value="Medium HP" table:formula="of:=COM.MICROSOFT.IFS([.I40]&gt;299;&quot;High HP&quot;;[.I40]&gt;99;&quot;Medium HP&quot;;[.I4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7" table:style-name="ce6">
            <text:p>17</text:p>
          </table:table-cell>
          <table:table-cell office:value-type="float" office:value="90.211700050000005" table:style-name="ce6">
            <text:p>90.21170005</text:p>
          </table:table-cell>
          <table:table-cell office:value-type="float" office:value="138.69999999999999" table:style-name="ce6">
            <text:p>138.7</text:p>
          </table:table-cell>
          <table:table-cell office:value-type="float" office:value="79.3" table:style-name="ce6">
            <text:p>79.3</text:p>
          </table:table-cell>
          <table:table-cell office:value-type="float" office:value="224.2" table:style-name="ce6">
            <text:p>224.2</text:p>
          </table:table-cell>
          <table:table-cell office:value-type="float" office:value="4.47" table:style-name="ce6">
            <text:p>4.47</text:p>
          </table:table-cell>
          <table:table-cell office:value-type="float" office:value="26" table:style-name="ce6">
            <text:p>26</text:p>
          </table:table-cell>
          <table:table-cell office:value-type="date" office:date-value="2012-03-06T00:00:00" table:style-name="ce7">
            <text:p>3/6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Dodge</text:p>
          </table:table-cell>
          <table:table-cell office:value-type="string" table:style-name="ce5">
            <text:p>Ram Wagon</text:p>
          </table:table-cell>
          <table:table-cell office:value-type="float" office:value="16767" table:style-name="ce11">
            <text:p>16767</text:p>
          </table:table-cell>
          <table:table-cell office:value-type="currency" office:value="21315" table:style-name="ce12">
            <text:p>$21,315</text:p>
          </table:table-cell>
          <table:table-cell office:value-type="currency" office:value="15510" table:style-name="ce12">
            <text:p>$15,510</text:p>
          </table:table-cell>
          <table:table-cell office:value-type="percentage" office:value="0.72765657987332866" table:formula="of:=SUM([.E41]/[.D41])" table:style-name="ce13">
            <text:p>73%</text:p>
          </table:table-cell>
          <table:table-cell office:value-type="string" office:string-value="GOOD" table:formula="of:=IF([.F41]&gt;69%; &quot;GOOD&quot;; &quot;POOR&quot;)" table:style-name="ce20">
            <text:p>GOOD</text:p>
          </table:table-cell>
          <table:table-cell office:value-type="float" office:value="3.9" table:style-name="ce6">
            <text:p>3.9</text:p>
          </table:table-cell>
          <table:table-cell office:value-type="float" office:value="175" table:style-name="ce6">
            <text:p>175</text:p>
          </table:table-cell>
          <table:table-cell office:value-type="string" office:string-value="Medium HP" table:formula="of:=COM.MICROSOFT.IFS([.I41]&gt;299;&quot;High HP&quot;;[.I41]&gt;99;&quot;Medium HP&quot;;[.I4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5" table:style-name="ce6">
            <text:p>15</text:p>
          </table:table-cell>
          <table:table-cell office:value-type="float" office:value="71.135291609999996" table:style-name="ce6">
            <text:p>71.13529161</text:p>
          </table:table-cell>
          <table:table-cell office:value-type="float" office:value="109.6" table:style-name="ce6">
            <text:p>109.6</text:p>
          </table:table-cell>
          <table:table-cell office:value-type="float" office:value="78.8" table:style-name="ce6">
            <text:p>78.8</text:p>
          </table:table-cell>
          <table:table-cell office:value-type="float" office:value="192.6" table:style-name="ce6">
            <text:p>192.6</text:p>
          </table:table-cell>
          <table:table-cell office:value-type="float" office:value="4.2450000000000001" table:style-name="ce6">
            <text:p>4.245</text:p>
          </table:table-cell>
          <table:table-cell office:value-type="float" office:value="32" table:style-name="ce6">
            <text:p>32</text:p>
          </table:table-cell>
          <table:table-cell office:value-type="date" office:date-value="2012-01-06T00:00:00" table:style-name="ce7">
            <text:p>1/6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Dodge</text:p>
          </table:table-cell>
          <table:table-cell office:value-type="string" table:style-name="ce5">
            <text:p>Ram Van</text:p>
          </table:table-cell>
          <table:table-cell office:value-type="float" office:value="31038" table:style-name="ce11">
            <text:p>31038</text:p>
          </table:table-cell>
          <table:table-cell office:value-type="currency" office:value="18575" table:style-name="ce12">
            <text:p>$18,575</text:p>
          </table:table-cell>
          <table:table-cell office:value-type="currency" office:value="13425" table:style-name="ce12">
            <text:p>$13,425</text:p>
          </table:table-cell>
          <table:table-cell office:value-type="percentage" office:value="0.7227456258411844" table:formula="of:=SUM([.E42]/[.D42])" table:style-name="ce13">
            <text:p>72%</text:p>
          </table:table-cell>
          <table:table-cell office:value-type="string" office:string-value="GOOD" table:formula="of:=IF([.F42]&gt;69%; &quot;GOOD&quot;; &quot;POOR&quot;)" table:style-name="ce20">
            <text:p>GOOD</text:p>
          </table:table-cell>
          <table:table-cell office:value-type="float" office:value="3.9" table:style-name="ce6">
            <text:p>3.9</text:p>
          </table:table-cell>
          <table:table-cell office:value-type="float" office:value="175" table:style-name="ce6">
            <text:p>175</text:p>
          </table:table-cell>
          <table:table-cell office:value-type="string" office:string-value="Medium HP" table:formula="of:=COM.MICROSOFT.IFS([.I42]&gt;299;&quot;High HP&quot;;[.I42]&gt;99;&quot;Medium HP&quot;;[.I4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6" table:style-name="ce6">
            <text:p>16</text:p>
          </table:table-cell>
          <table:table-cell office:value-type="float" office:value="70.078321540000005" table:style-name="ce6">
            <text:p>70.07832154</text:p>
          </table:table-cell>
          <table:table-cell office:value-type="float" office:value="127.2" table:style-name="ce6">
            <text:p>127.2</text:p>
          </table:table-cell>
          <table:table-cell office:value-type="float" office:value="78.8" table:style-name="ce6">
            <text:p>78.8</text:p>
          </table:table-cell>
          <table:table-cell office:value-type="float" office:value="208.5" table:style-name="ce6">
            <text:p>208.5</text:p>
          </table:table-cell>
          <table:table-cell office:value-type="float" office:value="4.298" table:style-name="ce6">
            <text:p>4.298</text:p>
          </table:table-cell>
          <table:table-cell office:value-type="float" office:value="32" table:style-name="ce6">
            <text:p>32</text:p>
          </table:table-cell>
          <table:table-cell office:value-type="date" office:date-value="2012-07-26T00:00:00" table:style-name="ce7">
            <text:p>7/26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Dodge</text:p>
          </table:table-cell>
          <table:table-cell office:value-type="string" table:style-name="ce5">
            <text:p>Dakota</text:p>
          </table:table-cell>
          <table:table-cell office:value-type="float" office:value="111313" table:style-name="ce11">
            <text:p>111313</text:p>
          </table:table-cell>
          <table:table-cell office:value-type="currency" office:value="16980" table:style-name="ce12">
            <text:p>$16,980</text:p>
          </table:table-cell>
          <table:table-cell office:value-type="currency" office:value="11260" table:style-name="ce12">
            <text:p>$11,260</text:p>
          </table:table-cell>
          <table:table-cell office:value-type="percentage" office:value="0.66313309776207308" table:formula="of:=SUM([.E43]/[.D43])" table:style-name="ce13">
            <text:p>66%</text:p>
          </table:table-cell>
          <table:table-cell office:value-type="string" office:string-value="POOR" table:formula="of:=IF([.F43]&gt;69%; &quot;GOOD&quot;; &quot;POOR&quot;)" table:style-name="ce20">
            <text:p>POOR</text:p>
          </table:table-cell>
          <table:table-cell office:value-type="float" office:value="2.5" table:style-name="ce6">
            <text:p>2.5</text:p>
          </table:table-cell>
          <table:table-cell office:value-type="float" office:value="120" table:style-name="ce6">
            <text:p>120</text:p>
          </table:table-cell>
          <table:table-cell office:value-type="string" office:string-value="Medium HP" table:formula="of:=COM.MICROSOFT.IFS([.I43]&gt;299;&quot;High HP&quot;;[.I43]&gt;99;&quot;Medium HP&quot;;[.I4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9" table:style-name="ce6">
            <text:p>19</text:p>
          </table:table-cell>
          <table:table-cell office:value-type="float" office:value="49.64500177" table:style-name="ce6">
            <text:p>49.64500177</text:p>
          </table:table-cell>
          <table:table-cell office:value-type="float" office:value="131" table:style-name="ce6">
            <text:p>131</text:p>
          </table:table-cell>
          <table:table-cell office:value-type="float" office:value="71.5" table:style-name="ce6">
            <text:p>71.5</text:p>
          </table:table-cell>
          <table:table-cell office:value-type="float" office:value="215" table:style-name="ce6">
            <text:p>215</text:p>
          </table:table-cell>
          <table:table-cell office:value-type="float" office:value="3.5569999999999999" table:style-name="ce6">
            <text:p>3.557</text:p>
          </table:table-cell>
          <table:table-cell office:value-type="float" office:value="22" table:style-name="ce6">
            <text:p>22</text:p>
          </table:table-cell>
          <table:table-cell office:value-type="date" office:date-value="2011-11-25T00:00:00" table:style-name="ce7">
            <text:p>11/25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Dodge</text:p>
          </table:table-cell>
          <table:table-cell office:value-type="string" table:style-name="ce5">
            <text:p>Durango</text:p>
          </table:table-cell>
          <table:table-cell office:value-type="float" office:value="101323" table:style-name="ce11">
            <text:p>101323</text:p>
          </table:table-cell>
          <table:table-cell office:value-type="currency" office:value="26310" table:style-name="ce12">
            <text:p>$26,310</text:p>
          </table:table-cell>
          <table:table-cell office:value-type="currency" office:value="21436" table:style-name="ce12">
            <text:p>$21,436</text:p>
          </table:table-cell>
          <table:table-cell office:value-type="percentage" office:value="0.81474724439376667" table:formula="of:=SUM([.E44]/[.D44])" table:style-name="ce13">
            <text:p>81%</text:p>
          </table:table-cell>
          <table:table-cell office:value-type="string" office:string-value="GOOD" table:formula="of:=IF([.F44]&gt;69%; &quot;GOOD&quot;; &quot;POOR&quot;)" table:style-name="ce20">
            <text:p>GOOD</text:p>
          </table:table-cell>
          <table:table-cell office:value-type="float" office:value="5.2" table:style-name="ce6">
            <text:p>5.2</text:p>
          </table:table-cell>
          <table:table-cell office:value-type="float" office:value="230" table:style-name="ce6">
            <text:p>230</text:p>
          </table:table-cell>
          <table:table-cell office:value-type="string" office:string-value="Medium HP" table:formula="of:=COM.MICROSOFT.IFS([.I44]&gt;299;&quot;High HP&quot;;[.I44]&gt;99;&quot;Medium HP&quot;;[.I4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7" table:style-name="ce6">
            <text:p>17</text:p>
          </table:table-cell>
          <table:table-cell office:value-type="float" office:value="92.85412522" table:style-name="ce6">
            <text:p>92.85412522</text:p>
          </table:table-cell>
          <table:table-cell office:value-type="float" office:value="115.7" table:style-name="ce6">
            <text:p>115.7</text:p>
          </table:table-cell>
          <table:table-cell office:value-type="float" office:value="71.7" table:style-name="ce6">
            <text:p>71.7</text:p>
          </table:table-cell>
          <table:table-cell office:value-type="float" office:value="193.5" table:style-name="ce6">
            <text:p>193.5</text:p>
          </table:table-cell>
          <table:table-cell office:value-type="float" office:value="4.3940000000000001" table:style-name="ce6">
            <text:p>4.394</text:p>
          </table:table-cell>
          <table:table-cell office:value-type="float" office:value="25" table:style-name="ce6">
            <text:p>25</text:p>
          </table:table-cell>
          <table:table-cell office:value-type="date" office:date-value="2012-06-27T00:00:00" table:style-name="ce7">
            <text:p>6/27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Dodge</text:p>
          </table:table-cell>
          <table:table-cell office:value-type="string" table:style-name="ce5">
            <text:p>Caravan</text:p>
          </table:table-cell>
          <table:table-cell office:value-type="float" office:value="181749" table:style-name="ce11">
            <text:p>181749</text:p>
          </table:table-cell>
          <table:table-cell office:value-type="currency" office:value="19565" table:style-name="ce12">
            <text:p>$19,565</text:p>
          </table:table-cell>
          <table:table-cell office:value-type="currency" office:value="12025" table:style-name="ce12">
            <text:p>$12,025</text:p>
          </table:table-cell>
          <table:table-cell office:value-type="percentage" office:value="0.61461794019933558" table:formula="of:=SUM([.E45]/[.D45])" table:style-name="ce13">
            <text:p>61%</text:p>
          </table:table-cell>
          <table:table-cell office:value-type="string" office:string-value="POOR" table:formula="of:=IF([.F45]&gt;69%; &quot;GOOD&quot;; &quot;POOR&quot;)" table:style-name="ce20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45]&gt;299;&quot;High HP&quot;;[.I45]&gt;99;&quot;Medium HP&quot;;[.I4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4" table:style-name="ce6">
            <text:p>24</text:p>
          </table:table-cell>
          <table:table-cell office:value-type="float" office:value="61.227000310000001" table:style-name="ce6">
            <text:p>61.22700031</text:p>
          </table:table-cell>
          <table:table-cell office:value-type="float" office:value="113.3" table:style-name="ce6">
            <text:p>113.3</text:p>
          </table:table-cell>
          <table:table-cell office:value-type="float" office:value="76.8" table:style-name="ce6">
            <text:p>76.8</text:p>
          </table:table-cell>
          <table:table-cell office:value-type="float" office:value="186.3" table:style-name="ce6">
            <text:p>186.3</text:p>
          </table:table-cell>
          <table:table-cell office:value-type="float" office:value="3.5329999999999999" table:style-name="ce6">
            <text:p>3.533</text:p>
          </table:table-cell>
          <table:table-cell office:value-type="float" office:value="20" table:style-name="ce6">
            <text:p>20</text:p>
          </table:table-cell>
          <table:table-cell office:value-type="date" office:date-value="2011-09-01T00:00:00" table:style-name="ce7">
            <text:p>9/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Ford</text:p>
          </table:table-cell>
          <table:table-cell office:value-type="string" table:style-name="ce5">
            <text:p>Escort</text:p>
          </table:table-cell>
          <table:table-cell office:value-type="float" office:value="70227" table:style-name="ce11">
            <text:p>70227</text:p>
          </table:table-cell>
          <table:table-cell office:value-type="currency" office:value="12070" table:style-name="ce12">
            <text:p>$12,070</text:p>
          </table:table-cell>
          <table:table-cell office:value-type="currency" office:value="7425" table:style-name="ce12">
            <text:p>$7,425</text:p>
          </table:table-cell>
          <table:table-cell office:value-type="percentage" office:value="0.61516155758077884" table:formula="of:=SUM([.E46]/[.D46])" table:style-name="ce13">
            <text:p>62%</text:p>
          </table:table-cell>
          <table:table-cell office:value-type="string" office:string-value="POOR" table:formula="of:=IF([.F46]&gt;69%; &quot;GOOD&quot;; &quot;POOR&quot;)" table:style-name="ce20">
            <text:p>POOR</text:p>
          </table:table-cell>
          <table:table-cell office:value-type="float" office:value="2" table:style-name="ce6">
            <text:p>2</text:p>
          </table:table-cell>
          <table:table-cell office:value-type="float" office:value="110" table:style-name="ce6">
            <text:p>110</text:p>
          </table:table-cell>
          <table:table-cell office:value-type="string" office:string-value="Medium HP" table:formula="of:=COM.MICROSOFT.IFS([.I46]&gt;299;&quot;High HP&quot;;[.I46]&gt;99;&quot;Medium HP&quot;;[.I4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0" table:style-name="ce6">
            <text:p>30</text:p>
          </table:table-cell>
          <table:table-cell office:value-type="float" office:value="44.083709460000001" table:style-name="ce6">
            <text:p>44.08370946</text:p>
          </table:table-cell>
          <table:table-cell office:value-type="float" office:value="98.4" table:style-name="ce6">
            <text:p>98.4</text:p>
          </table:table-cell>
          <table:table-cell office:value-type="float" office:value="67" table:style-name="ce6">
            <text:p>67</text:p>
          </table:table-cell>
          <table:table-cell office:value-type="float" office:value="174.7" table:style-name="ce6">
            <text:p>174.7</text:p>
          </table:table-cell>
          <table:table-cell office:value-type="float" office:value="2.468" table:style-name="ce6">
            <text:p>2.468</text:p>
          </table:table-cell>
          <table:table-cell office:value-type="float" office:value="12.7" table:style-name="ce6">
            <text:p>12.7</text:p>
          </table:table-cell>
          <table:table-cell office:value-type="date" office:date-value="2012-03-31T00:00:00" table:style-name="ce7">
            <text:p>3/31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Ford</text:p>
          </table:table-cell>
          <table:table-cell office:value-type="string" table:style-name="ce5">
            <text:p>Mustang</text:p>
          </table:table-cell>
          <table:table-cell office:value-type="float" office:value="113369" table:style-name="ce11">
            <text:p>113369</text:p>
          </table:table-cell>
          <table:table-cell office:value-type="currency" office:value="21560" table:style-name="ce12">
            <text:p>$21,560</text:p>
          </table:table-cell>
          <table:table-cell office:value-type="currency" office:value="12760" table:style-name="ce12">
            <text:p>$12,760</text:p>
          </table:table-cell>
          <table:table-cell office:value-type="percentage" office:value="0.59183673469387754" table:formula="of:=SUM([.E47]/[.D47])" table:style-name="ce13">
            <text:p>59%</text:p>
          </table:table-cell>
          <table:table-cell office:value-type="string" office:string-value="POOR" table:formula="of:=IF([.F47]&gt;69%; &quot;GOOD&quot;; &quot;POOR&quot;)" table:style-name="ce20">
            <text:p>POOR</text:p>
          </table:table-cell>
          <table:table-cell office:value-type="float" office:value="3.8" table:style-name="ce6">
            <text:p>3.8</text:p>
          </table:table-cell>
          <table:table-cell office:value-type="float" office:value="190" table:style-name="ce6">
            <text:p>190</text:p>
          </table:table-cell>
          <table:table-cell office:value-type="string" office:string-value="Medium HP" table:formula="of:=COM.MICROSOFT.IFS([.I47]&gt;299;&quot;High HP&quot;;[.I47]&gt;99;&quot;Medium HP&quot;;[.I4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76.509184559999994" table:style-name="ce6">
            <text:p>76.50918456</text:p>
          </table:table-cell>
          <table:table-cell office:value-type="float" office:value="101.3" table:style-name="ce6">
            <text:p>101.3</text:p>
          </table:table-cell>
          <table:table-cell office:value-type="float" office:value="73.099999999999994" table:style-name="ce6">
            <text:p>73.1</text:p>
          </table:table-cell>
          <table:table-cell office:value-type="float" office:value="183.2" table:style-name="ce6">
            <text:p>183.2</text:p>
          </table:table-cell>
          <table:table-cell office:value-type="float" office:value="3.2029999999999998" table:style-name="ce6">
            <text:p>3.203</text:p>
          </table:table-cell>
          <table:table-cell office:value-type="float" office:value="15.7" table:style-name="ce6">
            <text:p>15.7</text:p>
          </table:table-cell>
          <table:table-cell office:value-type="date" office:date-value="2012-01-31T00:00:00" table:style-name="ce7">
            <text:p>1/31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Ford</text:p>
          </table:table-cell>
          <table:table-cell office:value-type="string" table:style-name="ce5">
            <text:p>Contour</text:p>
          </table:table-cell>
          <table:table-cell office:value-type="float" office:value="35068" table:style-name="ce11">
            <text:p>35068</text:p>
          </table:table-cell>
          <table:table-cell office:value-type="currency" office:value="17035" table:style-name="ce12">
            <text:p>$17,035</text:p>
          </table:table-cell>
          <table:table-cell office:value-type="currency" office:value="8835" table:style-name="ce12">
            <text:p>$8,835</text:p>
          </table:table-cell>
          <table:table-cell office:value-type="percentage" office:value="0.5186380980334605" table:formula="of:=SUM([.E48]/[.D48])" table:style-name="ce13">
            <text:p>52%</text:p>
          </table:table-cell>
          <table:table-cell office:value-type="string" office:string-value="POOR" table:formula="of:=IF([.F48]&gt;69%; &quot;GOOD&quot;; &quot;POOR&quot;)" table:style-name="ce20">
            <text:p>POOR</text:p>
          </table:table-cell>
          <table:table-cell office:value-type="float" office:value="2.5" table:style-name="ce6">
            <text:p>2.5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48]&gt;299;&quot;High HP&quot;;[.I48]&gt;99;&quot;Medium HP&quot;;[.I4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67.351010720000005" table:style-name="ce6">
            <text:p>67.35101072</text:p>
          </table:table-cell>
          <table:table-cell office:value-type="float" office:value="106.5" table:style-name="ce6">
            <text:p>106.5</text:p>
          </table:table-cell>
          <table:table-cell office:value-type="float" office:value="69.099999999999994" table:style-name="ce6">
            <text:p>69.1</text:p>
          </table:table-cell>
          <table:table-cell office:value-type="float" office:value="184.6" table:style-name="ce6">
            <text:p>184.6</text:p>
          </table:table-cell>
          <table:table-cell office:value-type="float" office:value="2.7690000000000001" table:style-name="ce6">
            <text:p>2.769</text:p>
          </table:table-cell>
          <table:table-cell office:value-type="float" office:value="15" table:style-name="ce6">
            <text:p>15</text:p>
          </table:table-cell>
          <table:table-cell office:value-type="date" office:date-value="2012-08-20T00:00:00" table:style-name="ce7">
            <text:p>8/20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Ford</text:p>
          </table:table-cell>
          <table:table-cell office:value-type="string" table:style-name="ce5">
            <text:p>Taurus</text:p>
          </table:table-cell>
          <table:table-cell office:value-type="float" office:value="245815" table:style-name="ce11">
            <text:p>245815</text:p>
          </table:table-cell>
          <table:table-cell office:value-type="currency" office:value="17885" table:style-name="ce12">
            <text:p>$17,885</text:p>
          </table:table-cell>
          <table:table-cell office:value-type="currency" office:value="10055" table:style-name="ce12">
            <text:p>$10,055</text:p>
          </table:table-cell>
          <table:table-cell office:value-type="percentage" office:value="0.56220296337713171" table:formula="of:=SUM([.E49]/[.D49])" table:style-name="ce13">
            <text:p>56%</text:p>
          </table:table-cell>
          <table:table-cell office:value-type="string" office:string-value="POOR" table:formula="of:=IF([.F49]&gt;69%; &quot;GOOD&quot;; &quot;POOR&quot;)" table:style-name="ce20">
            <text:p>POOR</text:p>
          </table:table-cell>
          <table:table-cell office:value-type="float" office:value="3" table:style-name="ce6">
            <text:p>3</text:p>
          </table:table-cell>
          <table:table-cell office:value-type="float" office:value="155" table:style-name="ce6">
            <text:p>155</text:p>
          </table:table-cell>
          <table:table-cell office:value-type="string" office:string-value="Medium HP" table:formula="of:=COM.MICROSOFT.IFS([.I49]&gt;299;&quot;High HP&quot;;[.I49]&gt;99;&quot;Medium HP&quot;;[.I4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62.503739500000002" table:style-name="ce6">
            <text:p>62.5037395</text:p>
          </table:table-cell>
          <table:table-cell office:value-type="float" office:value="108.5" table:style-name="ce6">
            <text:p>108.5</text:p>
          </table:table-cell>
          <table:table-cell office:value-type="float" office:value="73" table:style-name="ce6">
            <text:p>73</text:p>
          </table:table-cell>
          <table:table-cell office:value-type="float" office:value="197.6" table:style-name="ce6">
            <text:p>197.6</text:p>
          </table:table-cell>
          <table:table-cell office:value-type="float" office:value="3.3679999999999999" table:style-name="ce6">
            <text:p>3.368</text:p>
          </table:table-cell>
          <table:table-cell office:value-type="float" office:value="16" table:style-name="ce6">
            <text:p>16</text:p>
          </table:table-cell>
          <table:table-cell office:value-type="date" office:date-value="2011-12-20T00:00:00" table:style-name="ce7">
            <text:p>12/20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Ford</text:p>
          </table:table-cell>
          <table:table-cell office:value-type="string" table:style-name="ce5">
            <text:p>Focus</text:p>
          </table:table-cell>
          <table:table-cell office:value-type="float" office:value="175670" table:style-name="ce11">
            <text:p>175670</text:p>
          </table:table-cell>
          <table:table-cell office:value-type="currency" office:value="12315" table:style-name="ce12">
            <text:p>$12,315</text:p>
          </table:table-cell>
          <table:table-cell office:value-type="currency" office:value="8670" table:style-name="ce12">
            <text:p>$8,670</text:p>
          </table:table-cell>
          <table:table-cell office:value-type="percentage" office:value="0.7040194884287454" table:formula="of:=SUM([.E50]/[.D50])" table:style-name="ce13">
            <text:p>70%</text:p>
          </table:table-cell>
          <table:table-cell office:value-type="string" office:string-value="GOOD" table:formula="of:=IF([.F50]&gt;69%; &quot;GOOD&quot;; &quot;POOR&quot;)" table:style-name="ce20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07" table:style-name="ce6">
            <text:p>107</text:p>
          </table:table-cell>
          <table:table-cell office:value-type="string" office:string-value="Medium HP" table:formula="of:=COM.MICROSOFT.IFS([.I50]&gt;299;&quot;High HP&quot;;[.I50]&gt;99;&quot;Medium HP&quot;;[.I5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0" table:style-name="ce6">
            <text:p>30</text:p>
          </table:table-cell>
          <table:table-cell office:value-type="float" office:value="43.117132009999999" table:style-name="ce6">
            <text:p>43.11713201</text:p>
          </table:table-cell>
          <table:table-cell office:value-type="float" office:value="103" table:style-name="ce6">
            <text:p>103</text:p>
          </table:table-cell>
          <table:table-cell office:value-type="float" office:value="66.900000000000006" table:style-name="ce6">
            <text:p>66.9</text:p>
          </table:table-cell>
          <table:table-cell office:value-type="float" office:value="174.8" table:style-name="ce6">
            <text:p>174.8</text:p>
          </table:table-cell>
          <table:table-cell office:value-type="float" office:value="2.5640000000000001" table:style-name="ce6">
            <text:p>2.564</text:p>
          </table:table-cell>
          <table:table-cell office:value-type="float" office:value="13.2" table:style-name="ce6">
            <text:p>13.2</text:p>
          </table:table-cell>
          <table:table-cell office:value-type="date" office:date-value="2012-07-22T00:00:00" table:style-name="ce7">
            <text:p>7/22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Ford</text:p>
          </table:table-cell>
          <table:table-cell office:value-type="string" table:style-name="ce5">
            <text:p>Crown Victoria</text:p>
          </table:table-cell>
          <table:table-cell office:value-type="float" office:value="63403" table:style-name="ce11">
            <text:p>63403</text:p>
          </table:table-cell>
          <table:table-cell office:value-type="currency" office:value="22195" table:style-name="ce12">
            <text:p>$22,195</text:p>
          </table:table-cell>
          <table:table-cell office:value-type="currency" office:value="14210" table:style-name="ce12">
            <text:p>$14,210</text:p>
          </table:table-cell>
          <table:table-cell office:value-type="percentage" office:value="0.64023428700157692" table:formula="of:=SUM([.E51]/[.D51])" table:style-name="ce13">
            <text:p>64%</text:p>
          </table:table-cell>
          <table:table-cell office:value-type="string" office:string-value="POOR" table:formula="of:=IF([.F51]&gt;69%; &quot;GOOD&quot;; &quot;POOR&quot;)" table:style-name="ce20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00" table:style-name="ce6">
            <text:p>200</text:p>
          </table:table-cell>
          <table:table-cell office:value-type="string" office:string-value="Medium HP" table:formula="of:=COM.MICROSOFT.IFS([.I51]&gt;299;&quot;High HP&quot;;[.I51]&gt;99;&quot;Medium HP&quot;;[.I5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80.499536710000001" table:style-name="ce6">
            <text:p>80.49953671</text:p>
          </table:table-cell>
          <table:table-cell office:value-type="float" office:value="114.7" table:style-name="ce6">
            <text:p>114.7</text:p>
          </table:table-cell>
          <table:table-cell office:value-type="float" office:value="78.2" table:style-name="ce6">
            <text:p>78.2</text:p>
          </table:table-cell>
          <table:table-cell office:value-type="float" office:value="212" table:style-name="ce6">
            <text:p>212</text:p>
          </table:table-cell>
          <table:table-cell office:value-type="float" office:value="3.9079999999999999" table:style-name="ce6">
            <text:p>3.908</text:p>
          </table:table-cell>
          <table:table-cell office:value-type="float" office:value="19" table:style-name="ce6">
            <text:p>19</text:p>
          </table:table-cell>
          <table:table-cell office:value-type="date" office:date-value="2011-09-26T00:00:00" table:style-name="ce7">
            <text:p>9/26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Ford</text:p>
          </table:table-cell>
          <table:table-cell office:value-type="string" table:style-name="ce5">
            <text:p>Explorer</text:p>
          </table:table-cell>
          <table:table-cell office:value-type="float" office:value="276747" table:style-name="ce11">
            <text:p>276747</text:p>
          </table:table-cell>
          <table:table-cell office:value-type="currency" office:value="31930" table:style-name="ce12">
            <text:p>$31,930</text:p>
          </table:table-cell>
          <table:table-cell office:value-type="currency" office:value="16640" table:style-name="ce12">
            <text:p>$16,640</text:p>
          </table:table-cell>
          <table:table-cell office:value-type="percentage" office:value="0.52113999373629816" table:formula="of:=SUM([.E52]/[.D52])" table:style-name="ce13">
            <text:p>52%</text:p>
          </table:table-cell>
          <table:table-cell office:value-type="string" office:string-value="POOR" table:formula="of:=IF([.F52]&gt;69%; &quot;GOOD&quot;; &quot;POOR&quot;)" table:style-name="ce20">
            <text:p>POOR</text:p>
          </table:table-cell>
          <table:table-cell office:value-type="float" office:value="4" table:style-name="ce6">
            <text:p>4</text:p>
          </table:table-cell>
          <table:table-cell office:value-type="float" office:value="210" table:style-name="ce6">
            <text:p>210</text:p>
          </table:table-cell>
          <table:table-cell office:value-type="string" office:string-value="Medium HP" table:formula="of:=COM.MICROSOFT.IFS([.I52]&gt;299;&quot;High HP&quot;;[.I52]&gt;99;&quot;Medium HP&quot;;[.I5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9" table:style-name="ce6">
            <text:p>19</text:p>
          </table:table-cell>
          <table:table-cell office:value-type="float" office:value="87.635495779999999" table:style-name="ce6">
            <text:p>87.63549578</text:p>
          </table:table-cell>
          <table:table-cell office:value-type="float" office:value="111.6" table:style-name="ce6">
            <text:p>111.6</text:p>
          </table:table-cell>
          <table:table-cell office:value-type="float" office:value="70.2" table:style-name="ce6">
            <text:p>70.2</text:p>
          </table:table-cell>
          <table:table-cell office:value-type="float" office:value="190.7" table:style-name="ce6">
            <text:p>190.7</text:p>
          </table:table-cell>
          <table:table-cell office:value-type="float" office:value="3.8759999999999999" table:style-name="ce6">
            <text:p>3.876</text:p>
          </table:table-cell>
          <table:table-cell office:value-type="float" office:value="21" table:style-name="ce6">
            <text:p>21</text:p>
          </table:table-cell>
          <table:table-cell office:value-type="date" office:date-value="2012-04-25T00:00:00" table:style-name="ce7">
            <text:p>4/25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Ford</text:p>
          </table:table-cell>
          <table:table-cell office:value-type="string" table:style-name="ce5">
            <text:p>Windstar</text:p>
          </table:table-cell>
          <table:table-cell office:value-type="float" office:value="155787" table:style-name="ce11">
            <text:p>155787</text:p>
          </table:table-cell>
          <table:table-cell office:value-type="currency" office:value="21410" table:style-name="ce12">
            <text:p>$21,410</text:p>
          </table:table-cell>
          <table:table-cell office:value-type="currency" office:value="13175" table:style-name="ce12">
            <text:p>$13,175</text:p>
          </table:table-cell>
          <table:table-cell office:value-type="percentage" office:value="0.6153666510976179" table:formula="of:=SUM([.E53]/[.D53])" table:style-name="ce13">
            <text:p>62%</text:p>
          </table:table-cell>
          <table:table-cell office:value-type="string" office:string-value="POOR" table:formula="of:=IF([.F53]&gt;69%; &quot;GOOD&quot;; &quot;POOR&quot;)" table:style-name="ce20">
            <text:p>POOR</text:p>
          </table:table-cell>
          <table:table-cell office:value-type="float" office:value="3" table:style-name="ce6">
            <text:p>3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53]&gt;299;&quot;High HP&quot;;[.I53]&gt;99;&quot;Medium HP&quot;;[.I5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1" table:style-name="ce6">
            <text:p>21</text:p>
          </table:table-cell>
          <table:table-cell office:value-type="float" office:value="62.095048390000002" table:style-name="ce6">
            <text:p>62.09504839</text:p>
          </table:table-cell>
          <table:table-cell office:value-type="float" office:value="120.7" table:style-name="ce6">
            <text:p>120.7</text:p>
          </table:table-cell>
          <table:table-cell office:value-type="float" office:value="76.599999999999994" table:style-name="ce6">
            <text:p>76.6</text:p>
          </table:table-cell>
          <table:table-cell office:value-type="float" office:value="200.9" table:style-name="ce6">
            <text:p>200.9</text:p>
          </table:table-cell>
          <table:table-cell office:value-type="float" office:value="3.7610000000000001" table:style-name="ce6">
            <text:p>3.761</text:p>
          </table:table-cell>
          <table:table-cell office:value-type="float" office:value="26" table:style-name="ce6">
            <text:p>26</text:p>
          </table:table-cell>
          <table:table-cell office:value-type="date" office:date-value="2012-02-25T00:00:00" table:style-name="ce7">
            <text:p>2/25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Ford</text:p>
          </table:table-cell>
          <table:table-cell office:value-type="string" table:style-name="ce5">
            <text:p>Expedition</text:p>
          </table:table-cell>
          <table:table-cell office:value-type="float" office:value="125338" table:style-name="ce11">
            <text:p>125338</text:p>
          </table:table-cell>
          <table:table-cell office:value-type="currency" office:value="36135" table:style-name="ce12">
            <text:p>$36,135</text:p>
          </table:table-cell>
          <table:table-cell office:value-type="currency" office:value="23575" table:style-name="ce12">
            <text:p>$23,575</text:p>
          </table:table-cell>
          <table:table-cell office:value-type="percentage" office:value="0.65241455652414559" table:formula="of:=SUM([.E54]/[.D54])" table:style-name="ce13">
            <text:p>65%</text:p>
          </table:table-cell>
          <table:table-cell office:value-type="string" office:string-value="POOR" table:formula="of:=IF([.F54]&gt;69%; &quot;GOOD&quot;; &quot;POOR&quot;)" table:style-name="ce20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40" table:style-name="ce6">
            <text:p>240</text:p>
          </table:table-cell>
          <table:table-cell office:value-type="string" office:string-value="Medium HP" table:formula="of:=COM.MICROSOFT.IFS([.I54]&gt;299;&quot;High HP&quot;;[.I54]&gt;99;&quot;Medium HP&quot;;[.I5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6" table:style-name="ce6">
            <text:p>16</text:p>
          </table:table-cell>
          <table:table-cell office:value-type="float" office:value="100.0248023" table:style-name="ce6">
            <text:p>100.0248023</text:p>
          </table:table-cell>
          <table:table-cell office:value-type="float" office:value="119" table:style-name="ce6">
            <text:p>119</text:p>
          </table:table-cell>
          <table:table-cell office:value-type="float" office:value="78.7" table:style-name="ce6">
            <text:p>78.7</text:p>
          </table:table-cell>
          <table:table-cell office:value-type="float" office:value="204.6" table:style-name="ce6">
            <text:p>204.6</text:p>
          </table:table-cell>
          <table:table-cell office:value-type="float" office:value="4.8079999999999998" table:style-name="ce6">
            <text:p>4.808</text:p>
          </table:table-cell>
          <table:table-cell office:value-type="float" office:value="26" table:style-name="ce6">
            <text:p>26</text:p>
          </table:table-cell>
          <table:table-cell office:value-type="date" office:date-value="2012-09-14T00:00:00" table:style-name="ce7">
            <text:p>9/14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Ford</text:p>
          </table:table-cell>
          <table:table-cell office:value-type="string" table:style-name="ce5">
            <text:p>Ranger</text:p>
          </table:table-cell>
          <table:table-cell office:value-type="float" office:value="220650" table:style-name="ce11">
            <text:p>220650</text:p>
          </table:table-cell>
          <table:table-cell office:value-type="currency" office:value="12050" table:style-name="ce12">
            <text:p>$12,050</text:p>
          </table:table-cell>
          <table:table-cell office:value-type="currency" office:value="7850" table:style-name="ce12">
            <text:p>$7,850</text:p>
          </table:table-cell>
          <table:table-cell office:value-type="percentage" office:value="0.65145228215767637" table:formula="of:=SUM([.E55]/[.D55])" table:style-name="ce13">
            <text:p>65%</text:p>
          </table:table-cell>
          <table:table-cell office:value-type="string" office:string-value="POOR" table:formula="of:=IF([.F55]&gt;69%; &quot;GOOD&quot;; &quot;POOR&quot;)" table:style-name="ce20">
            <text:p>POOR</text:p>
          </table:table-cell>
          <table:table-cell office:value-type="float" office:value="2.5" table:style-name="ce6">
            <text:p>2.5</text:p>
          </table:table-cell>
          <table:table-cell office:value-type="float" office:value="119" table:style-name="ce6">
            <text:p>119</text:p>
          </table:table-cell>
          <table:table-cell office:value-type="string" office:string-value="Medium HP" table:formula="of:=COM.MICROSOFT.IFS([.I55]&gt;299;&quot;High HP&quot;;[.I55]&gt;99;&quot;Medium HP&quot;;[.I5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3" table:style-name="ce6">
            <text:p>23</text:p>
          </table:table-cell>
          <table:table-cell office:value-type="float" office:value="47.389531310000002" table:style-name="ce6">
            <text:p>47.38953131</text:p>
          </table:table-cell>
          <table:table-cell office:value-type="float" office:value="117.5" table:style-name="ce6">
            <text:p>117.5</text:p>
          </table:table-cell>
          <table:table-cell office:value-type="float" office:value="69.400000000000006" table:style-name="ce6">
            <text:p>69.4</text:p>
          </table:table-cell>
          <table:table-cell office:value-type="float" office:value="200.7" table:style-name="ce6">
            <text:p>200.7</text:p>
          </table:table-cell>
          <table:table-cell office:value-type="float" office:value="3.0859999999999999" table:style-name="ce6">
            <text:p>3.086</text:p>
          </table:table-cell>
          <table:table-cell office:value-type="float" office:value="20" table:style-name="ce6">
            <text:p>20</text:p>
          </table:table-cell>
          <table:table-cell office:value-type="date" office:date-value="2012-01-14T00:00:00" table:style-name="ce7">
            <text:p>1/14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Ford</text:p>
          </table:table-cell>
          <table:table-cell office:value-type="string" table:style-name="ce5">
            <text:p>F-Series</text:p>
          </table:table-cell>
          <table:table-cell office:value-type="float" office:value="540561" table:style-name="ce11">
            <text:p>540561</text:p>
          </table:table-cell>
          <table:table-cell office:value-type="currency" office:value="26935" table:style-name="ce12">
            <text:p>$26,935</text:p>
          </table:table-cell>
          <table:table-cell office:value-type="currency" office:value="15075" table:style-name="ce12">
            <text:p>$15,075</text:p>
          </table:table-cell>
          <table:table-cell office:value-type="percentage" office:value="0.55968071282717657" table:formula="of:=SUM([.E56]/[.D56])" table:style-name="ce13">
            <text:p>56%</text:p>
          </table:table-cell>
          <table:table-cell office:value-type="string" office:string-value="POOR" table:formula="of:=IF([.F56]&gt;69%; &quot;GOOD&quot;; &quot;POOR&quot;)" table:style-name="ce20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20" table:style-name="ce6">
            <text:p>220</text:p>
          </table:table-cell>
          <table:table-cell office:value-type="string" office:string-value="Medium HP" table:formula="of:=COM.MICROSOFT.IFS([.I56]&gt;299;&quot;High HP&quot;;[.I56]&gt;99;&quot;Medium HP&quot;;[.I5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8" table:style-name="ce6">
            <text:p>18</text:p>
          </table:table-cell>
          <table:table-cell office:value-type="float" office:value="89.401934729999994" table:style-name="ce6">
            <text:p>89.40193473</text:p>
          </table:table-cell>
          <table:table-cell office:value-type="float" office:value="138.5" table:style-name="ce6">
            <text:p>138.5</text:p>
          </table:table-cell>
          <table:table-cell office:value-type="float" office:value="79.099999999999994" table:style-name="ce6">
            <text:p>79.1</text:p>
          </table:table-cell>
          <table:table-cell office:value-type="float" office:value="224.5" table:style-name="ce6">
            <text:p>224.5</text:p>
          </table:table-cell>
          <table:table-cell office:value-type="float" office:value="4.2409999999999997" table:style-name="ce6">
            <text:p>4.241</text:p>
          </table:table-cell>
          <table:table-cell office:value-type="float" office:value="25.1" table:style-name="ce6">
            <text:p>25.1</text:p>
          </table:table-cell>
          <table:table-cell office:value-type="date" office:date-value="2012-08-16T00:00:00" table:style-name="ce7">
            <text:p>8/16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Honda</text:p>
          </table:table-cell>
          <table:table-cell office:value-type="string" table:style-name="ce5">
            <text:p>Civic</text:p>
          </table:table-cell>
          <table:table-cell office:value-type="float" office:value="199685" table:style-name="ce11">
            <text:p>199685</text:p>
          </table:table-cell>
          <table:table-cell office:value-type="currency" office:value="12885" table:style-name="ce12">
            <text:p>$12,885</text:p>
          </table:table-cell>
          <table:table-cell office:value-type="currency" office:value="9850" table:style-name="ce12">
            <text:p>$9,850</text:p>
          </table:table-cell>
          <table:table-cell office:value-type="percentage" office:value="0.76445479239425684" table:formula="of:=SUM([.E57]/[.D57])" table:style-name="ce13">
            <text:p>76%</text:p>
          </table:table-cell>
          <table:table-cell office:value-type="string" office:string-value="GOOD" table:formula="of:=IF([.F57]&gt;69%; &quot;GOOD&quot;; &quot;POOR&quot;)" table:style-name="ce20">
            <text:p>GOOD</text:p>
          </table:table-cell>
          <table:table-cell office:value-type="float" office:value="1.6" table:style-name="ce6">
            <text:p>1.6</text:p>
          </table:table-cell>
          <table:table-cell office:value-type="float" office:value="106" table:style-name="ce6">
            <text:p>106</text:p>
          </table:table-cell>
          <table:table-cell office:value-type="string" office:string-value="Medium HP" table:formula="of:=COM.MICROSOFT.IFS([.I57]&gt;299;&quot;High HP&quot;;[.I57]&gt;99;&quot;Medium HP&quot;;[.I5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2" table:style-name="ce6">
            <text:p>32</text:p>
          </table:table-cell>
          <table:table-cell office:value-type="float" office:value="42.879097340000001" table:style-name="ce6">
            <text:p>42.87909734</text:p>
          </table:table-cell>
          <table:table-cell office:value-type="float" office:value="103.2" table:style-name="ce6">
            <text:p>103.2</text:p>
          </table:table-cell>
          <table:table-cell office:value-type="float" office:value="67.099999999999994" table:style-name="ce6">
            <text:p>67.1</text:p>
          </table:table-cell>
          <table:table-cell office:value-type="float" office:value="175.1" table:style-name="ce6">
            <text:p>175.1</text:p>
          </table:table-cell>
          <table:table-cell office:value-type="float" office:value="2.339" table:style-name="ce6">
            <text:p>2.339</text:p>
          </table:table-cell>
          <table:table-cell office:value-type="float" office:value="11.9" table:style-name="ce6">
            <text:p>11.9</text:p>
          </table:table-cell>
          <table:table-cell office:value-type="date" office:date-value="2011-10-21T00:00:00" table:style-name="ce7">
            <text:p>10/2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Honda</text:p>
          </table:table-cell>
          <table:table-cell office:value-type="string" table:style-name="ce5">
            <text:p>Accord</text:p>
          </table:table-cell>
          <table:table-cell office:value-type="float" office:value="230902" table:style-name="ce11">
            <text:p>230902</text:p>
          </table:table-cell>
          <table:table-cell office:value-type="currency" office:value="15350" table:style-name="ce12">
            <text:p>$15,350</text:p>
          </table:table-cell>
          <table:table-cell office:value-type="currency" office:value="13210" table:style-name="ce12">
            <text:p>$13,210</text:p>
          </table:table-cell>
          <table:table-cell office:value-type="percentage" office:value="0.86058631921824102" table:formula="of:=SUM([.E58]/[.D58])" table:style-name="ce13">
            <text:p>86%</text:p>
          </table:table-cell>
          <table:table-cell office:value-type="string" office:string-value="GOOD" table:formula="of:=IF([.F58]&gt;69%; &quot;GOOD&quot;; &quot;POOR&quot;)" table:style-name="ce20">
            <text:p>GOOD</text:p>
          </table:table-cell>
          <table:table-cell office:value-type="float" office:value="2.2999999999999998" table:style-name="ce6">
            <text:p>2.3</text:p>
          </table:table-cell>
          <table:table-cell office:value-type="float" office:value="135" table:style-name="ce6">
            <text:p>135</text:p>
          </table:table-cell>
          <table:table-cell office:value-type="string" office:string-value="Medium HP" table:formula="of:=COM.MICROSOFT.IFS([.I58]&gt;299;&quot;High HP&quot;;[.I58]&gt;99;&quot;Medium HP&quot;;[.I5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54.269548290000003" table:style-name="ce6">
            <text:p>54.26954829</text:p>
          </table:table-cell>
          <table:table-cell office:value-type="float" office:value="106.9" table:style-name="ce6">
            <text:p>106.9</text:p>
          </table:table-cell>
          <table:table-cell office:value-type="float" office:value="70.3" table:style-name="ce6">
            <text:p>70.3</text:p>
          </table:table-cell>
          <table:table-cell office:value-type="float" office:value="188.8" table:style-name="ce6">
            <text:p>188.8</text:p>
          </table:table-cell>
          <table:table-cell office:value-type="float" office:value="2.9319999999999999" table:style-name="ce6">
            <text:p>2.932</text:p>
          </table:table-cell>
          <table:table-cell office:value-type="float" office:value="17.100000000000001" table:style-name="ce6">
            <text:p>17.1</text:p>
          </table:table-cell>
          <table:table-cell office:value-type="date" office:date-value="2012-05-20T00:00:00" table:style-name="ce7">
            <text:p>5/20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Honda</text:p>
          </table:table-cell>
          <table:table-cell office:value-type="string" table:style-name="ce5">
            <text:p>CR-V</text:p>
          </table:table-cell>
          <table:table-cell office:value-type="float" office:value="73203" table:style-name="ce11">
            <text:p>73203</text:p>
          </table:table-cell>
          <table:table-cell office:value-type="currency" office:value="20550" table:style-name="ce12">
            <text:p>$20,550</text:p>
          </table:table-cell>
          <table:table-cell office:value-type="currency" office:value="17710" table:style-name="ce12">
            <text:p>$17,710</text:p>
          </table:table-cell>
          <table:table-cell office:value-type="percentage" office:value="0.8618004866180049" table:formula="of:=SUM([.E59]/[.D59])" table:style-name="ce13">
            <text:p>86%</text:p>
          </table:table-cell>
          <table:table-cell office:value-type="string" office:string-value="GOOD" table:formula="of:=IF([.F59]&gt;69%; &quot;GOOD&quot;; &quot;POOR&quot;)" table:style-name="ce20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46" table:style-name="ce6">
            <text:p>146</text:p>
          </table:table-cell>
          <table:table-cell office:value-type="string" office:string-value="Medium HP" table:formula="of:=COM.MICROSOFT.IFS([.I59]&gt;299;&quot;High HP&quot;;[.I59]&gt;99;&quot;Medium HP&quot;;[.I5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4" table:style-name="ce6">
            <text:p>24</text:p>
          </table:table-cell>
          <table:table-cell office:value-type="float" office:value="60.087966620000003" table:style-name="ce6">
            <text:p>60.08796662</text:p>
          </table:table-cell>
          <table:table-cell office:value-type="float" office:value="103.2" table:style-name="ce6">
            <text:p>103.2</text:p>
          </table:table-cell>
          <table:table-cell office:value-type="float" office:value="68.900000000000006" table:style-name="ce6">
            <text:p>68.9</text:p>
          </table:table-cell>
          <table:table-cell office:value-type="float" office:value="177.6" table:style-name="ce6">
            <text:p>177.6</text:p>
          </table:table-cell>
          <table:table-cell office:value-type="float" office:value="3.2189999999999999" table:style-name="ce6">
            <text:p>3.219</text:p>
          </table:table-cell>
          <table:table-cell office:value-type="float" office:value="15.3" table:style-name="ce6">
            <text:p>15.3</text:p>
          </table:table-cell>
          <table:table-cell office:value-type="date" office:date-value="2012-03-21T00:00:00" table:style-name="ce7">
            <text:p>3/21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Honda</text:p>
          </table:table-cell>
          <table:table-cell office:value-type="string" table:style-name="ce5">
            <text:p>Passport</text:p>
          </table:table-cell>
          <table:table-cell office:value-type="float" office:value="12855" table:style-name="ce11">
            <text:p>12855</text:p>
          </table:table-cell>
          <table:table-cell office:value-type="currency" office:value="26600" table:style-name="ce12">
            <text:p>$26,600</text:p>
          </table:table-cell>
          <table:table-cell office:value-type="currency" office:value="17525" table:style-name="ce12">
            <text:p>$17,525</text:p>
          </table:table-cell>
          <table:table-cell office:value-type="percentage" office:value="0.65883458646616544" table:formula="of:=SUM([.E60]/[.D60])" table:style-name="ce13">
            <text:p>66%</text:p>
          </table:table-cell>
          <table:table-cell office:value-type="string" office:string-value="POOR" table:formula="of:=IF([.F60]&gt;69%; &quot;GOOD&quot;; &quot;POOR&quot;)" table:style-name="ce20">
            <text:p>POOR</text:p>
          </table:table-cell>
          <table:table-cell office:value-type="float" office:value="3.2" table:style-name="ce6">
            <text:p>3.2</text:p>
          </table:table-cell>
          <table:table-cell office:value-type="float" office:value="205" table:style-name="ce6">
            <text:p>205</text:p>
          </table:table-cell>
          <table:table-cell office:value-type="string" office:string-value="Medium HP" table:formula="of:=COM.MICROSOFT.IFS([.I60]&gt;299;&quot;High HP&quot;;[.I60]&gt;99;&quot;Medium HP&quot;;[.I6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9" table:style-name="ce6">
            <text:p>19</text:p>
          </table:table-cell>
          <table:table-cell office:value-type="float" office:value="83.602500800000001" table:style-name="ce6">
            <text:p>83.6025008</text:p>
          </table:table-cell>
          <table:table-cell office:value-type="float" office:value="106.4" table:style-name="ce6">
            <text:p>106.4</text:p>
          </table:table-cell>
          <table:table-cell office:value-type="float" office:value="70.400000000000006" table:style-name="ce6">
            <text:p>70.4</text:p>
          </table:table-cell>
          <table:table-cell office:value-type="float" office:value="178.2" table:style-name="ce6">
            <text:p>178.2</text:p>
          </table:table-cell>
          <table:table-cell office:value-type="float" office:value="3.8570000000000002" table:style-name="ce6">
            <text:p>3.857</text:p>
          </table:table-cell>
          <table:table-cell office:value-type="float" office:value="21.1" table:style-name="ce6">
            <text:p>21.1</text:p>
          </table:table-cell>
          <table:table-cell office:value-type="date" office:date-value="2012-10-09T00:00:00" table:style-name="ce7">
            <text:p>10/9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Honda</text:p>
          </table:table-cell>
          <table:table-cell office:value-type="string" table:style-name="ce5">
            <text:p>Odyssey</text:p>
          </table:table-cell>
          <table:table-cell office:value-type="float" office:value="76029" table:style-name="ce11">
            <text:p>76029</text:p>
          </table:table-cell>
          <table:table-cell office:value-type="currency" office:value="26000" table:style-name="ce12">
            <text:p>$26,000</text:p>
          </table:table-cell>
          <table:table-cell office:value-type="currency" office:value="19490" table:style-name="ce12">
            <text:p>$19,490</text:p>
          </table:table-cell>
          <table:table-cell office:value-type="percentage" office:value="0.74961538461538457" table:formula="of:=SUM([.E61]/[.D61])" table:style-name="ce13">
            <text:p>75%</text:p>
          </table:table-cell>
          <table:table-cell office:value-type="string" office:string-value="GOOD" table:formula="of:=IF([.F61]&gt;69%; &quot;GOOD&quot;; &quot;POOR&quot;)" table:style-name="ce20">
            <text:p>GOOD</text:p>
          </table:table-cell>
          <table:table-cell office:value-type="float" office:value="3.5" table:style-name="ce6">
            <text:p>3.5</text:p>
          </table:table-cell>
          <table:table-cell office:value-type="float" office:value="210" table:style-name="ce6">
            <text:p>210</text:p>
          </table:table-cell>
          <table:table-cell office:value-type="string" office:string-value="Medium HP" table:formula="of:=COM.MICROSOFT.IFS([.I61]&gt;299;&quot;High HP&quot;;[.I61]&gt;99;&quot;Medium HP&quot;;[.I6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3" table:style-name="ce6">
            <text:p>23</text:p>
          </table:table-cell>
          <table:table-cell office:value-type="float" office:value="85.217691340000002" table:style-name="ce6">
            <text:p>85.21769134</text:p>
          </table:table-cell>
          <table:table-cell office:value-type="float" office:value="118.1" table:style-name="ce6">
            <text:p>118.1</text:p>
          </table:table-cell>
          <table:table-cell office:value-type="float" office:value="75.599999999999994" table:style-name="ce6">
            <text:p>75.6</text:p>
          </table:table-cell>
          <table:table-cell office:value-type="float" office:value="201.2" table:style-name="ce6">
            <text:p>201.2</text:p>
          </table:table-cell>
          <table:table-cell office:value-type="float" office:value="4.2880000000000003" table:style-name="ce6">
            <text:p>4.288</text:p>
          </table:table-cell>
          <table:table-cell office:value-type="float" office:value="20" table:style-name="ce6">
            <text:p>20</text:p>
          </table:table-cell>
          <table:table-cell office:value-type="date" office:date-value="2012-02-08T00:00:00" table:style-name="ce7">
            <text:p>2/8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Hyundai</text:p>
          </table:table-cell>
          <table:table-cell office:value-type="string" table:style-name="ce5">
            <text:p>Accent</text:p>
          </table:table-cell>
          <table:table-cell office:value-type="float" office:value="41184" table:style-name="ce11">
            <text:p>41184</text:p>
          </table:table-cell>
          <table:table-cell office:value-type="currency" office:value="9699" table:style-name="ce12">
            <text:p>$9,699</text:p>
          </table:table-cell>
          <table:table-cell office:value-type="currency" office:value="5860" table:style-name="ce12">
            <text:p>$5,860</text:p>
          </table:table-cell>
          <table:table-cell office:value-type="percentage" office:value="0.6041859985565522" table:formula="of:=SUM([.E62]/[.D62])" table:style-name="ce13">
            <text:p>60%</text:p>
          </table:table-cell>
          <table:table-cell office:value-type="string" office:string-value="POOR" table:formula="of:=IF([.F62]&gt;69%; &quot;GOOD&quot;; &quot;POOR&quot;)" table:style-name="ce20">
            <text:p>POOR</text:p>
          </table:table-cell>
          <table:table-cell office:value-type="float" office:value="1.5" table:style-name="ce6">
            <text:p>1.5</text:p>
          </table:table-cell>
          <table:table-cell office:value-type="float" office:value="92" table:style-name="ce6">
            <text:p>92</text:p>
          </table:table-cell>
          <table:table-cell office:value-type="string" office:string-value="Low HP" table:formula="of:=COM.MICROSOFT.IFS([.I62]&gt;299;&quot;High HP&quot;;[.I62]&gt;99;&quot;Medium HP&quot;;[.I62]&lt;100;&quot;Low HP&quot;)" table:number-matrix-columns-spanned="1" table:number-matrix-rows-spanned="1" table:style-name="ce6">
            <text:p>Low HP</text:p>
          </table:table-cell>
          <table:table-cell office:value-type="string" table:style-name="ce6">
            <text:p>Passenger</text:p>
          </table:table-cell>
          <table:table-cell office:value-type="float" office:value="31" table:style-name="ce6">
            <text:p>31</text:p>
          </table:table-cell>
          <table:table-cell office:value-type="float" office:value="36.672283579999998" table:style-name="ce6">
            <text:p>36.67228358</text:p>
          </table:table-cell>
          <table:table-cell office:value-type="float" office:value="96.1" table:style-name="ce6">
            <text:p>96.1</text:p>
          </table:table-cell>
          <table:table-cell office:value-type="float" office:value="65.7" table:style-name="ce6">
            <text:p>65.7</text:p>
          </table:table-cell>
          <table:table-cell office:value-type="float" office:value="166.7" table:style-name="ce6">
            <text:p>166.7</text:p>
          </table:table-cell>
          <table:table-cell office:value-type="float" office:value="2.2400000000000002" table:style-name="ce6">
            <text:p>2.24</text:p>
          </table:table-cell>
          <table:table-cell office:value-type="float" office:value="11.9" table:style-name="ce6">
            <text:p>11.9</text:p>
          </table:table-cell>
          <table:table-cell office:value-type="date" office:date-value="2012-09-10T00:00:00" table:style-name="ce7">
            <text:p>9/10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Hyundai</text:p>
          </table:table-cell>
          <table:table-cell office:value-type="string" table:style-name="ce5">
            <text:p>Elantra</text:p>
          </table:table-cell>
          <table:table-cell office:value-type="float" office:value="66692" table:style-name="ce11">
            <text:p>66692</text:p>
          </table:table-cell>
          <table:table-cell office:value-type="currency" office:value="11799" table:style-name="ce12">
            <text:p>$11,799</text:p>
          </table:table-cell>
          <table:table-cell office:value-type="currency" office:value="7825" table:style-name="ce12">
            <text:p>$7,825</text:p>
          </table:table-cell>
          <table:table-cell office:value-type="percentage" office:value="0.66319179591490807" table:formula="of:=SUM([.E63]/[.D63])" table:style-name="ce13">
            <text:p>66%</text:p>
          </table:table-cell>
          <table:table-cell office:value-type="string" office:string-value="POOR" table:formula="of:=IF([.F63]&gt;69%; &quot;GOOD&quot;; &quot;POOR&quot;)" table:style-name="ce20">
            <text:p>POOR</text:p>
          </table:table-cell>
          <table:table-cell office:value-type="float" office:value="2" table:style-name="ce6">
            <text:p>2</text:p>
          </table:table-cell>
          <table:table-cell office:value-type="float" office:value="140" table:style-name="ce6">
            <text:p>140</text:p>
          </table:table-cell>
          <table:table-cell office:value-type="string" office:string-value="Medium HP" table:formula="of:=COM.MICROSOFT.IFS([.I63]&gt;299;&quot;High HP&quot;;[.I63]&gt;99;&quot;Medium HP&quot;;[.I6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54.590045160000003" table:style-name="ce6">
            <text:p>54.59004516</text:p>
          </table:table-cell>
          <table:table-cell office:value-type="float" office:value="100.4" table:style-name="ce6">
            <text:p>100.4</text:p>
          </table:table-cell>
          <table:table-cell office:value-type="float" office:value="66.900000000000006" table:style-name="ce6">
            <text:p>66.9</text:p>
          </table:table-cell>
          <table:table-cell office:value-type="float" office:value="174" table:style-name="ce6">
            <text:p>174</text:p>
          </table:table-cell>
          <table:table-cell office:value-type="float" office:value="2.6259999999999999" table:style-name="ce6">
            <text:p>2.626</text:p>
          </table:table-cell>
          <table:table-cell office:value-type="float" office:value="14.5" table:style-name="ce6">
            <text:p>14.5</text:p>
          </table:table-cell>
          <table:table-cell office:value-type="date" office:date-value="2011-11-15T00:00:00" table:style-name="ce7">
            <text:p>11/15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Hyundai</text:p>
          </table:table-cell>
          <table:table-cell office:value-type="string" table:style-name="ce5">
            <text:p>Sonata</text:p>
          </table:table-cell>
          <table:table-cell office:value-type="float" office:value="29450" table:style-name="ce11">
            <text:p>29450</text:p>
          </table:table-cell>
          <table:table-cell office:value-type="currency" office:value="14999" table:style-name="ce12">
            <text:p>$14,999</text:p>
          </table:table-cell>
          <table:table-cell office:value-type="currency" office:value="8910" table:style-name="ce12">
            <text:p>$8,910</text:p>
          </table:table-cell>
          <table:table-cell office:value-type="percentage" office:value="0.59403960264017597" table:formula="of:=SUM([.E64]/[.D64])" table:style-name="ce13">
            <text:p>59%</text:p>
          </table:table-cell>
          <table:table-cell office:value-type="string" office:string-value="POOR" table:formula="of:=IF([.F64]&gt;69%; &quot;GOOD&quot;; &quot;POOR&quot;)" table:style-name="ce20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48" table:style-name="ce6">
            <text:p>148</text:p>
          </table:table-cell>
          <table:table-cell office:value-type="string" office:string-value="Medium HP" table:formula="of:=COM.MICROSOFT.IFS([.I64]&gt;299;&quot;High HP&quot;;[.I64]&gt;99;&quot;Medium HP&quot;;[.I6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58.758248999999999" table:style-name="ce6">
            <text:p>58.758249</text:p>
          </table:table-cell>
          <table:table-cell office:value-type="float" office:value="106.3" table:style-name="ce6">
            <text:p>106.3</text:p>
          </table:table-cell>
          <table:table-cell office:value-type="float" office:value="71.599999999999994" table:style-name="ce6">
            <text:p>71.6</text:p>
          </table:table-cell>
          <table:table-cell office:value-type="float" office:value="185.4" table:style-name="ce6">
            <text:p>185.4</text:p>
          </table:table-cell>
          <table:table-cell office:value-type="float" office:value="3.0720000000000001" table:style-name="ce6">
            <text:p>3.072</text:p>
          </table:table-cell>
          <table:table-cell office:value-type="float" office:value="17.2" table:style-name="ce6">
            <text:p>17.2</text:p>
          </table:table-cell>
          <table:table-cell office:value-type="date" office:date-value="2012-06-14T00:00:00" table:style-name="ce7">
            <text:p>6/14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Infiniti</text:p>
          </table:table-cell>
          <table:table-cell office:value-type="string" table:style-name="ce5">
            <text:p>I30</text:p>
          </table:table-cell>
          <table:table-cell office:value-type="float" office:value="23713" table:style-name="ce11">
            <text:p>23713</text:p>
          </table:table-cell>
          <table:table-cell office:value-type="currency" office:value="29465" table:style-name="ce12">
            <text:p>$29,465</text:p>
          </table:table-cell>
          <table:table-cell office:value-type="currency" office:value="19690" table:style-name="ce12">
            <text:p>$19,690</text:p>
          </table:table-cell>
          <table:table-cell office:value-type="percentage" office:value="0.66825046665535381" table:formula="of:=SUM([.E65]/[.D65])" table:style-name="ce13">
            <text:p>67%</text:p>
          </table:table-cell>
          <table:table-cell office:value-type="string" office:string-value="POOR" table:formula="of:=IF([.F65]&gt;69%; &quot;GOOD&quot;; &quot;POOR&quot;)" table:style-name="ce20">
            <text:p>POOR</text:p>
          </table:table-cell>
          <table:table-cell office:value-type="float" office:value="3" table:style-name="ce6">
            <text:p>3</text:p>
          </table:table-cell>
          <table:table-cell office:value-type="float" office:value="227" table:style-name="ce6">
            <text:p>227</text:p>
          </table:table-cell>
          <table:table-cell office:value-type="string" office:string-value="Medium HP" table:formula="of:=COM.MICROSOFT.IFS([.I65]&gt;299;&quot;High HP&quot;;[.I65]&gt;99;&quot;Medium HP&quot;;[.I6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92.436889230000006" table:style-name="ce6">
            <text:p>92.43688923</text:p>
          </table:table-cell>
          <table:table-cell office:value-type="float" office:value="108.3" table:style-name="ce6">
            <text:p>108.3</text:p>
          </table:table-cell>
          <table:table-cell office:value-type="float" office:value="70.2" table:style-name="ce6">
            <text:p>70.2</text:p>
          </table:table-cell>
          <table:table-cell office:value-type="float" office:value="193.7" table:style-name="ce6">
            <text:p>193.7</text:p>
          </table:table-cell>
          <table:table-cell office:value-type="float" office:value="3.3420000000000001" table:style-name="ce6">
            <text:p>3.342</text:p>
          </table:table-cell>
          <table:table-cell office:value-type="float" office:value="18.5" table:style-name="ce6">
            <text:p>18.5</text:p>
          </table:table-cell>
          <table:table-cell office:value-type="date" office:date-value="2012-04-15T00:00:00" table:style-name="ce7">
            <text:p>4/15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Jaguar</text:p>
          </table:table-cell>
          <table:table-cell office:value-type="string" table:style-name="ce5">
            <text:p>S-Type</text:p>
          </table:table-cell>
          <table:table-cell office:value-type="float" office:value="15467" table:style-name="ce11">
            <text:p>15467</text:p>
          </table:table-cell>
          <table:table-cell office:value-type="currency" office:value="42800" table:style-name="ce12">
            <text:p>$42,800</text:p>
          </table:table-cell>
          <table:table-cell office:value-type="currency" office:value="33219" table:style-name="ce12">
            <text:p>$33,219</text:p>
          </table:table-cell>
          <table:table-cell office:value-type="percentage" office:value="0.77614485981308412" table:formula="of:=SUM([.E66]/[.D66])" table:style-name="ce13">
            <text:p>78%</text:p>
          </table:table-cell>
          <table:table-cell office:value-type="string" office:string-value="GOOD" table:formula="of:=IF([.F66]&gt;69%; &quot;GOOD&quot;; &quot;POOR&quot;)" table:style-name="ce20">
            <text:p>GOOD</text:p>
          </table:table-cell>
          <table:table-cell office:value-type="float" office:value="3" table:style-name="ce6">
            <text:p>3</text:p>
          </table:table-cell>
          <table:table-cell office:value-type="float" office:value="240" table:style-name="ce6">
            <text:p>240</text:p>
          </table:table-cell>
          <table:table-cell office:value-type="string" office:string-value="Medium HP" table:formula="of:=COM.MICROSOFT.IFS([.I66]&gt;299;&quot;High HP&quot;;[.I66]&gt;99;&quot;Medium HP&quot;;[.I6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102.17898479999999" table:style-name="ce6">
            <text:p>102.1789848</text:p>
          </table:table-cell>
          <table:table-cell office:value-type="float" office:value="114.5" table:style-name="ce6">
            <text:p>114.5</text:p>
          </table:table-cell>
          <table:table-cell office:value-type="float" office:value="71.599999999999994" table:style-name="ce6">
            <text:p>71.6</text:p>
          </table:table-cell>
          <table:table-cell office:value-type="float" office:value="191.3" table:style-name="ce6">
            <text:p>191.3</text:p>
          </table:table-cell>
          <table:table-cell office:value-type="float" office:value="3.65" table:style-name="ce6">
            <text:p>3.65</text:p>
          </table:table-cell>
          <table:table-cell office:value-type="float" office:value="18.399999999999999" table:style-name="ce6">
            <text:p>18.4</text:p>
          </table:table-cell>
          <table:table-cell office:value-type="date" office:date-value="2012-11-03T00:00:00" table:style-name="ce7">
            <text:p>11/3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Jeep</text:p>
          </table:table-cell>
          <table:table-cell office:value-type="string" table:style-name="ce5">
            <text:p>Wrangler</text:p>
          </table:table-cell>
          <table:table-cell office:value-type="float" office:value="55557" table:style-name="ce11">
            <text:p>55557</text:p>
          </table:table-cell>
          <table:table-cell office:value-type="currency" office:value="14460" table:style-name="ce12">
            <text:p>$14,460</text:p>
          </table:table-cell>
          <table:table-cell office:value-type="currency" office:value="13475" table:style-name="ce12">
            <text:p>$13,475</text:p>
          </table:table-cell>
          <table:table-cell office:value-type="percentage" office:value="0.931881051175657" table:formula="of:=SUM([.E67]/[.D67])" table:style-name="ce13">
            <text:p>93%</text:p>
          </table:table-cell>
          <table:table-cell office:value-type="string" office:string-value="GOOD" table:formula="of:=IF([.F67]&gt;69%; &quot;GOOD&quot;; &quot;POOR&quot;)" table:style-name="ce20">
            <text:p>GOOD</text:p>
          </table:table-cell>
          <table:table-cell office:value-type="float" office:value="2.5" table:style-name="ce6">
            <text:p>2.5</text:p>
          </table:table-cell>
          <table:table-cell office:value-type="float" office:value="120" table:style-name="ce6">
            <text:p>120</text:p>
          </table:table-cell>
          <table:table-cell office:value-type="string" office:string-value="Medium HP" table:formula="of:=COM.MICROSOFT.IFS([.I67]&gt;299;&quot;High HP&quot;;[.I67]&gt;99;&quot;Medium HP&quot;;[.I6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7" table:style-name="ce6">
            <text:p>17</text:p>
          </table:table-cell>
          <table:table-cell office:value-type="float" office:value="48.672897910000003" table:style-name="ce6">
            <text:p>48.67289791</text:p>
          </table:table-cell>
          <table:table-cell office:value-type="float" office:value="93.4" table:style-name="ce6">
            <text:p>93.4</text:p>
          </table:table-cell>
          <table:table-cell office:value-type="float" office:value="66.7" table:style-name="ce6">
            <text:p>66.7</text:p>
          </table:table-cell>
          <table:table-cell office:value-type="float" office:value="152" table:style-name="ce6">
            <text:p>152</text:p>
          </table:table-cell>
          <table:table-cell office:value-type="float" office:value="3.0449999999999999" table:style-name="ce6">
            <text:p>3.045</text:p>
          </table:table-cell>
          <table:table-cell office:value-type="float" office:value="19" table:style-name="ce6">
            <text:p>19</text:p>
          </table:table-cell>
          <table:table-cell office:value-type="date" office:date-value="2012-03-04T00:00:00" table:style-name="ce7">
            <text:p>3/4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Jeep</text:p>
          </table:table-cell>
          <table:table-cell office:value-type="string" table:style-name="ce5">
            <text:p>Cherokee</text:p>
          </table:table-cell>
          <table:table-cell office:value-type="float" office:value="80556" table:style-name="ce11">
            <text:p>80556</text:p>
          </table:table-cell>
          <table:table-cell office:value-type="currency" office:value="21620" table:style-name="ce12">
            <text:p>$21,620</text:p>
          </table:table-cell>
          <table:table-cell office:value-type="currency" office:value="13775" table:style-name="ce12">
            <text:p>$13,775</text:p>
          </table:table-cell>
          <table:table-cell office:value-type="percentage" office:value="0.63714153561517117" table:formula="of:=SUM([.E68]/[.D68])" table:style-name="ce13">
            <text:p>64%</text:p>
          </table:table-cell>
          <table:table-cell office:value-type="string" office:string-value="POOR" table:formula="of:=IF([.F68]&gt;69%; &quot;GOOD&quot;; &quot;POOR&quot;)" table:style-name="ce20">
            <text:p>POOR</text:p>
          </table:table-cell>
          <table:table-cell office:value-type="float" office:value="4" table:style-name="ce6">
            <text:p>4</text:p>
          </table:table-cell>
          <table:table-cell office:value-type="float" office:value="190" table:style-name="ce6">
            <text:p>190</text:p>
          </table:table-cell>
          <table:table-cell office:value-type="string" office:string-value="Medium HP" table:formula="of:=COM.MICROSOFT.IFS([.I68]&gt;299;&quot;High HP&quot;;[.I68]&gt;99;&quot;Medium HP&quot;;[.I6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0" table:style-name="ce6">
            <text:p>20</text:p>
          </table:table-cell>
          <table:table-cell office:value-type="float" office:value="76.584439619999998" table:style-name="ce6">
            <text:p>76.58443962</text:p>
          </table:table-cell>
          <table:table-cell office:value-type="float" office:value="101.4" table:style-name="ce6">
            <text:p>101.4</text:p>
          </table:table-cell>
          <table:table-cell office:value-type="float" office:value="69.400000000000006" table:style-name="ce6">
            <text:p>69.4</text:p>
          </table:table-cell>
          <table:table-cell office:value-type="float" office:value="167.5" table:style-name="ce6">
            <text:p>167.5</text:p>
          </table:table-cell>
          <table:table-cell office:value-type="float" office:value="3.194" table:style-name="ce6">
            <text:p>3.194</text:p>
          </table:table-cell>
          <table:table-cell office:value-type="float" office:value="20" table:style-name="ce6">
            <text:p>20</text:p>
          </table:table-cell>
          <table:table-cell office:value-type="date" office:date-value="2012-10-05T00:00:00" table:style-name="ce7">
            <text:p>10/5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Jeep</text:p>
          </table:table-cell>
          <table:table-cell office:value-type="string" table:style-name="ce5">
            <text:p>Grand Cherokee</text:p>
          </table:table-cell>
          <table:table-cell office:value-type="float" office:value="157040" table:style-name="ce11">
            <text:p>157040</text:p>
          </table:table-cell>
          <table:table-cell office:value-type="currency" office:value="26895" table:style-name="ce12">
            <text:p>$26,895</text:p>
          </table:table-cell>
          <table:table-cell office:value-type="currency" office:value="18810" table:style-name="ce12">
            <text:p>$18,810</text:p>
          </table:table-cell>
          <table:table-cell office:value-type="percentage" office:value="0.69938650306748462" table:formula="of:=SUM([.E69]/[.D69])" table:style-name="ce13">
            <text:p>70%</text:p>
          </table:table-cell>
          <table:table-cell office:value-type="string" office:string-value="GOOD" table:formula="of:=IF([.F69]&gt;69%; &quot;GOOD&quot;; &quot;POOR&quot;)" table:style-name="ce20">
            <text:p>GOOD</text:p>
          </table:table-cell>
          <table:table-cell office:value-type="float" office:value="4" table:style-name="ce6">
            <text:p>4</text:p>
          </table:table-cell>
          <table:table-cell office:value-type="float" office:value="195" table:style-name="ce6">
            <text:p>195</text:p>
          </table:table-cell>
          <table:table-cell office:value-type="string" office:string-value="Medium HP" table:formula="of:=COM.MICROSOFT.IFS([.I69]&gt;299;&quot;High HP&quot;;[.I69]&gt;99;&quot;Medium HP&quot;;[.I6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9" table:style-name="ce6">
            <text:p>19</text:p>
          </table:table-cell>
          <table:table-cell office:value-type="float" office:value="80.387779120000005" table:style-name="ce6">
            <text:p>80.38777912</text:p>
          </table:table-cell>
          <table:table-cell office:value-type="float" office:value="105.9" table:style-name="ce6">
            <text:p>105.9</text:p>
          </table:table-cell>
          <table:table-cell office:value-type="float" office:value="72.3" table:style-name="ce6">
            <text:p>72.3</text:p>
          </table:table-cell>
          <table:table-cell office:value-type="float" office:value="181.5" table:style-name="ce6">
            <text:p>181.5</text:p>
          </table:table-cell>
          <table:table-cell office:value-type="float" office:value="3.88" table:style-name="ce6">
            <text:p>3.88</text:p>
          </table:table-cell>
          <table:table-cell office:value-type="float" office:value="20.5" table:style-name="ce6">
            <text:p>20.5</text:p>
          </table:table-cell>
          <table:table-cell office:value-type="date" office:date-value="2011-12-10T00:00:00" table:style-name="ce7">
            <text:p>12/10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Lexus</text:p>
          </table:table-cell>
          <table:table-cell office:value-type="string" table:style-name="ce5">
            <text:p>ES300</text:p>
          </table:table-cell>
          <table:table-cell office:value-type="float" office:value="24072" table:style-name="ce11">
            <text:p>24072</text:p>
          </table:table-cell>
          <table:table-cell office:value-type="currency" office:value="31505" table:style-name="ce12">
            <text:p>$31,505</text:p>
          </table:table-cell>
          <table:table-cell office:value-type="currency" office:value="26975" table:style-name="ce12">
            <text:p>$26,975</text:p>
          </table:table-cell>
          <table:table-cell office:value-type="percentage" office:value="0.85621329947627356" table:formula="of:=SUM([.E70]/[.D70])" table:style-name="ce13">
            <text:p>86%</text:p>
          </table:table-cell>
          <table:table-cell office:value-type="string" office:string-value="GOOD" table:formula="of:=IF([.F70]&gt;69%; &quot;GOOD&quot;; &quot;POOR&quot;)" table:style-name="ce20">
            <text:p>GOOD</text:p>
          </table:table-cell>
          <table:table-cell office:value-type="float" office:value="3" table:style-name="ce6">
            <text:p>3</text:p>
          </table:table-cell>
          <table:table-cell office:value-type="float" office:value="210" table:style-name="ce6">
            <text:p>210</text:p>
          </table:table-cell>
          <table:table-cell office:value-type="string" office:string-value="Medium HP" table:formula="of:=COM.MICROSOFT.IFS([.I70]&gt;299;&quot;High HP&quot;;[.I70]&gt;99;&quot;Medium HP&quot;;[.I7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87.211001039999999" table:style-name="ce6">
            <text:p>87.21100104</text:p>
          </table:table-cell>
          <table:table-cell office:value-type="float" office:value="105.1" table:style-name="ce6">
            <text:p>105.1</text:p>
          </table:table-cell>
          <table:table-cell office:value-type="float" office:value="70.5" table:style-name="ce6">
            <text:p>70.5</text:p>
          </table:table-cell>
          <table:table-cell office:value-type="float" office:value="190.2" table:style-name="ce6">
            <text:p>190.2</text:p>
          </table:table-cell>
          <table:table-cell office:value-type="float" office:value="3.3730000000000002" table:style-name="ce6">
            <text:p>3.373</text:p>
          </table:table-cell>
          <table:table-cell office:value-type="float" office:value="18.5" table:style-name="ce6">
            <text:p>18.5</text:p>
          </table:table-cell>
          <table:table-cell office:value-type="date" office:date-value="2012-07-09T00:00:00" table:style-name="ce7">
            <text:p>7/9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Lexus</text:p>
          </table:table-cell>
          <table:table-cell office:value-type="string" table:style-name="ce5">
            <text:p>GS300</text:p>
          </table:table-cell>
          <table:table-cell office:value-type="float" office:value="12698" table:style-name="ce11">
            <text:p>12698</text:p>
          </table:table-cell>
          <table:table-cell office:value-type="currency" office:value="37805" table:style-name="ce12">
            <text:p>$37,805</text:p>
          </table:table-cell>
          <table:table-cell office:value-type="currency" office:value="32075.000000000004" table:style-name="ce12">
            <text:p>$32,075</text:p>
          </table:table-cell>
          <table:table-cell office:value-type="percentage" office:value="0.8484327469911388" table:formula="of:=SUM([.E71]/[.D71])" table:style-name="ce13">
            <text:p>85%</text:p>
          </table:table-cell>
          <table:table-cell office:value-type="string" office:string-value="GOOD" table:formula="of:=IF([.F71]&gt;69%; &quot;GOOD&quot;; &quot;POOR&quot;)" table:style-name="ce20">
            <text:p>GOOD</text:p>
          </table:table-cell>
          <table:table-cell office:value-type="float" office:value="3" table:style-name="ce6">
            <text:p>3</text:p>
          </table:table-cell>
          <table:table-cell office:value-type="float" office:value="225" table:style-name="ce6">
            <text:p>225</text:p>
          </table:table-cell>
          <table:table-cell office:value-type="string" office:string-value="Medium HP" table:formula="of:=COM.MICROSOFT.IFS([.I71]&gt;299;&quot;High HP&quot;;[.I71]&gt;99;&quot;Medium HP&quot;;[.I7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94.946698400000002" table:style-name="ce6">
            <text:p>94.9466984</text:p>
          </table:table-cell>
          <table:table-cell office:value-type="float" office:value="110.2" table:style-name="ce6">
            <text:p>110.2</text:p>
          </table:table-cell>
          <table:table-cell office:value-type="float" office:value="70.900000000000006" table:style-name="ce6">
            <text:p>70.9</text:p>
          </table:table-cell>
          <table:table-cell office:value-type="float" office:value="189.2" table:style-name="ce6">
            <text:p>189.2</text:p>
          </table:table-cell>
          <table:table-cell office:value-type="float" office:value="3.6379999999999999" table:style-name="ce6">
            <text:p>3.638</text:p>
          </table:table-cell>
          <table:table-cell office:value-type="float" office:value="19.8" table:style-name="ce6">
            <text:p>19.8</text:p>
          </table:table-cell>
          <table:table-cell office:value-type="date" office:date-value="2012-05-10T00:00:00" table:style-name="ce7">
            <text:p>5/10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Lexus</text:p>
          </table:table-cell>
          <table:table-cell office:value-type="string" table:style-name="ce5">
            <text:p>GS400</text:p>
          </table:table-cell>
          <table:table-cell office:value-type="float" office:value="3334" table:style-name="ce11">
            <text:p>3334</text:p>
          </table:table-cell>
          <table:table-cell office:value-type="currency" office:value="46305" table:style-name="ce12">
            <text:p>$46,305</text:p>
          </table:table-cell>
          <table:table-cell office:value-type="currency" office:value="38955" table:style-name="ce12">
            <text:p>$38,955</text:p>
          </table:table-cell>
          <table:table-cell office:value-type="percentage" office:value="0.84126984126984128" table:formula="of:=SUM([.E72]/[.D72])" table:style-name="ce13">
            <text:p>84%</text:p>
          </table:table-cell>
          <table:table-cell office:value-type="string" office:string-value="GOOD" table:formula="of:=IF([.F72]&gt;69%; &quot;GOOD&quot;; &quot;POOR&quot;)" table:style-name="ce20">
            <text:p>GOOD</text:p>
          </table:table-cell>
          <table:table-cell office:value-type="float" office:value="4" table:style-name="ce6">
            <text:p>4</text:p>
          </table:table-cell>
          <table:table-cell office:value-type="float" office:value="300" table:style-name="ce6">
            <text:p>300</text:p>
          </table:table-cell>
          <table:table-cell office:value-type="string" office:string-value="High HP" table:formula="of:=COM.MICROSOFT.IFS([.I72]&gt;299;&quot;High HP&quot;;[.I72]&gt;99;&quot;Medium HP&quot;;[.I72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125.0133574" table:style-name="ce6">
            <text:p>125.0133574</text:p>
          </table:table-cell>
          <table:table-cell office:value-type="float" office:value="110.2" table:style-name="ce6">
            <text:p>110.2</text:p>
          </table:table-cell>
          <table:table-cell office:value-type="float" office:value="70.900000000000006" table:style-name="ce6">
            <text:p>70.9</text:p>
          </table:table-cell>
          <table:table-cell office:value-type="float" office:value="189.2" table:style-name="ce6">
            <text:p>189.2</text:p>
          </table:table-cell>
          <table:table-cell office:value-type="float" office:value="3.6930000000000001" table:style-name="ce6">
            <text:p>3.693</text:p>
          </table:table-cell>
          <table:table-cell office:value-type="float" office:value="19.8" table:style-name="ce6">
            <text:p>19.8</text:p>
          </table:table-cell>
          <table:table-cell office:value-type="date" office:date-value="2012-11-28T00:00:00" table:style-name="ce7">
            <text:p>11/28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Lexus</text:p>
          </table:table-cell>
          <table:table-cell office:value-type="string" table:style-name="ce5">
            <text:p>LS400</text:p>
          </table:table-cell>
          <table:table-cell office:value-type="float" office:value="6375" table:style-name="ce11">
            <text:p>6375</text:p>
          </table:table-cell>
          <table:table-cell office:value-type="currency" office:value="54005" table:style-name="ce12">
            <text:p>$54,005</text:p>
          </table:table-cell>
          <table:table-cell office:value-type="currency" office:value="40375" table:style-name="ce12">
            <text:p>$40,375</text:p>
          </table:table-cell>
          <table:table-cell office:value-type="percentage" office:value="0.74761596148504772" table:formula="of:=SUM([.E73]/[.D73])" table:style-name="ce13">
            <text:p>75%</text:p>
          </table:table-cell>
          <table:table-cell office:value-type="string" office:string-value="GOOD" table:formula="of:=IF([.F73]&gt;69%; &quot;GOOD&quot;; &quot;POOR&quot;)" table:style-name="ce20">
            <text:p>GOOD</text:p>
          </table:table-cell>
          <table:table-cell office:value-type="float" office:value="4" table:style-name="ce6">
            <text:p>4</text:p>
          </table:table-cell>
          <table:table-cell office:value-type="float" office:value="290" table:style-name="ce6">
            <text:p>290</text:p>
          </table:table-cell>
          <table:table-cell office:value-type="string" office:string-value="Medium HP" table:formula="of:=COM.MICROSOFT.IFS([.I73]&gt;299;&quot;High HP&quot;;[.I73]&gt;99;&quot;Medium HP&quot;;[.I7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124.44671630000001" table:style-name="ce6">
            <text:p>124.4467163</text:p>
          </table:table-cell>
          <table:table-cell office:value-type="float" office:value="112.2" table:style-name="ce6">
            <text:p>112.2</text:p>
          </table:table-cell>
          <table:table-cell office:value-type="float" office:value="72" table:style-name="ce6">
            <text:p>72</text:p>
          </table:table-cell>
          <table:table-cell office:value-type="float" office:value="196.7" table:style-name="ce6">
            <text:p>196.7</text:p>
          </table:table-cell>
          <table:table-cell office:value-type="float" office:value="3.89" table:style-name="ce6">
            <text:p>3.89</text:p>
          </table:table-cell>
          <table:table-cell office:value-type="float" office:value="22.5" table:style-name="ce6">
            <text:p>22.5</text:p>
          </table:table-cell>
          <table:table-cell office:value-type="date" office:date-value="2012-03-29T00:00:00" table:style-name="ce7">
            <text:p>3/29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Lexus</text:p>
          </table:table-cell>
          <table:table-cell office:value-type="string" table:style-name="ce5">
            <text:p>LX470</text:p>
          </table:table-cell>
          <table:table-cell office:value-type="float" office:value="9126" table:style-name="ce11">
            <text:p>9126</text:p>
          </table:table-cell>
          <table:table-cell office:value-type="currency" office:value="60105" table:style-name="ce12">
            <text:p>$60,105</text:p>
          </table:table-cell>
          <table:table-cell office:value-type="currency" office:value="43870" table:style-name="ce12">
            <text:p>$43,870</text:p>
          </table:table-cell>
          <table:table-cell office:value-type="percentage" office:value="0.72988936028616591" table:formula="of:=SUM([.E74]/[.D74])" table:style-name="ce13">
            <text:p>73%</text:p>
          </table:table-cell>
          <table:table-cell office:value-type="string" office:string-value="GOOD" table:formula="of:=IF([.F74]&gt;69%; &quot;GOOD&quot;; &quot;POOR&quot;)" table:style-name="ce20">
            <text:p>GOOD</text:p>
          </table:table-cell>
          <table:table-cell office:value-type="float" office:value="4.7" table:style-name="ce6">
            <text:p>4.7</text:p>
          </table:table-cell>
          <table:table-cell office:value-type="float" office:value="230" table:style-name="ce6">
            <text:p>230</text:p>
          </table:table-cell>
          <table:table-cell office:value-type="string" office:string-value="Medium HP" table:formula="of:=COM.MICROSOFT.IFS([.I74]&gt;299;&quot;High HP&quot;;[.I74]&gt;99;&quot;Medium HP&quot;;[.I7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5" table:style-name="ce6">
            <text:p>15</text:p>
          </table:table-cell>
          <table:table-cell office:value-type="float" office:value="105.760458" table:style-name="ce6">
            <text:p>105.760458</text:p>
          </table:table-cell>
          <table:table-cell office:value-type="float" office:value="112.2" table:style-name="ce6">
            <text:p>112.2</text:p>
          </table:table-cell>
          <table:table-cell office:value-type="float" office:value="76.400000000000006" table:style-name="ce6">
            <text:p>76.4</text:p>
          </table:table-cell>
          <table:table-cell office:value-type="float" office:value="192.5" table:style-name="ce6">
            <text:p>192.5</text:p>
          </table:table-cell>
          <table:table-cell office:value-type="float" office:value="5.4009999999999998" table:style-name="ce6">
            <text:p>5.401</text:p>
          </table:table-cell>
          <table:table-cell office:value-type="float" office:value="25.4" table:style-name="ce6">
            <text:p>25.4</text:p>
          </table:table-cell>
          <table:table-cell office:value-type="date" office:date-value="2012-10-30T00:00:00" table:style-name="ce7">
            <text:p>10/30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Lexus</text:p>
          </table:table-cell>
          <table:table-cell office:value-type="string" table:style-name="ce5">
            <text:p>RX300</text:p>
          </table:table-cell>
          <table:table-cell office:value-type="float" office:value="51238" table:style-name="ce11">
            <text:p>51238</text:p>
          </table:table-cell>
          <table:table-cell office:value-type="currency" office:value="34605" table:style-name="ce12">
            <text:p>$34,605</text:p>
          </table:table-cell>
          <table:table-cell office:value-type="currency" office:value="29140" table:style-name="ce12">
            <text:p>$29,140</text:p>
          </table:table-cell>
          <table:table-cell office:value-type="percentage" office:value="0.84207484467562488" table:formula="of:=SUM([.E75]/[.D75])" table:style-name="ce13">
            <text:p>84%</text:p>
          </table:table-cell>
          <table:table-cell office:value-type="string" office:string-value="GOOD" table:formula="of:=IF([.F75]&gt;69%; &quot;GOOD&quot;; &quot;POOR&quot;)" table:style-name="ce20">
            <text:p>GOOD</text:p>
          </table:table-cell>
          <table:table-cell office:value-type="float" office:value="3" table:style-name="ce6">
            <text:p>3</text:p>
          </table:table-cell>
          <table:table-cell office:value-type="float" office:value="220" table:style-name="ce6">
            <text:p>220</text:p>
          </table:table-cell>
          <table:table-cell office:value-type="string" office:string-value="Medium HP" table:formula="of:=COM.MICROSOFT.IFS([.I75]&gt;299;&quot;High HP&quot;;[.I75]&gt;99;&quot;Medium HP&quot;;[.I7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1" table:style-name="ce6">
            <text:p>21</text:p>
          </table:table-cell>
          <table:table-cell office:value-type="float" office:value="91.943801559999997" table:style-name="ce6">
            <text:p>91.94380156</text:p>
          </table:table-cell>
          <table:table-cell office:value-type="float" office:value="103" table:style-name="ce6">
            <text:p>103</text:p>
          </table:table-cell>
          <table:table-cell office:value-type="float" office:value="71.5" table:style-name="ce6">
            <text:p>71.5</text:p>
          </table:table-cell>
          <table:table-cell office:value-type="float" office:value="180.1" table:style-name="ce6">
            <text:p>180.1</text:p>
          </table:table-cell>
          <table:table-cell office:value-type="float" office:value="3.9" table:style-name="ce6">
            <text:p>3.9</text:p>
          </table:table-cell>
          <table:table-cell office:value-type="float" office:value="17.2" table:style-name="ce6">
            <text:p>17.2</text:p>
          </table:table-cell>
          <table:table-cell office:value-type="date" office:date-value="2012-01-04T00:00:00" table:style-name="ce7">
            <text:p>1/4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Lincoln</text:p>
          </table:table-cell>
          <table:table-cell office:value-type="string" table:style-name="ce5">
            <text:p>Continental</text:p>
          </table:table-cell>
          <table:table-cell office:value-type="float" office:value="13798" table:style-name="ce11">
            <text:p>13798</text:p>
          </table:table-cell>
          <table:table-cell office:value-type="currency" office:value="39080" table:style-name="ce12">
            <text:p>$39,080</text:p>
          </table:table-cell>
          <table:table-cell office:value-type="currency" office:value="20525" table:style-name="ce12">
            <text:p>$20,525</text:p>
          </table:table-cell>
          <table:table-cell office:value-type="percentage" office:value="0.52520470829068577" table:formula="of:=SUM([.E76]/[.D76])" table:style-name="ce13">
            <text:p>53%</text:p>
          </table:table-cell>
          <table:table-cell office:value-type="string" office:string-value="POOR" table:formula="of:=IF([.F76]&gt;69%; &quot;GOOD&quot;; &quot;POOR&quot;)" table:style-name="ce20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75" table:style-name="ce6">
            <text:p>275</text:p>
          </table:table-cell>
          <table:table-cell office:value-type="string" office:string-value="Medium HP" table:formula="of:=COM.MICROSOFT.IFS([.I76]&gt;299;&quot;High HP&quot;;[.I76]&gt;99;&quot;Medium HP&quot;;[.I7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113.5402069" table:style-name="ce6">
            <text:p>113.5402069</text:p>
          </table:table-cell>
          <table:table-cell office:value-type="float" office:value="109" table:style-name="ce6">
            <text:p>109</text:p>
          </table:table-cell>
          <table:table-cell office:value-type="float" office:value="73.599999999999994" table:style-name="ce6">
            <text:p>73.6</text:p>
          </table:table-cell>
          <table:table-cell office:value-type="float" office:value="208.5" table:style-name="ce6">
            <text:p>208.5</text:p>
          </table:table-cell>
          <table:table-cell office:value-type="float" office:value="3.8679999999999999" table:style-name="ce6">
            <text:p>3.868</text:p>
          </table:table-cell>
          <table:table-cell office:value-type="float" office:value="20" table:style-name="ce6">
            <text:p>20</text:p>
          </table:table-cell>
          <table:table-cell office:value-type="date" office:date-value="2012-08-03T00:00:00" table:style-name="ce7">
            <text:p>8/3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Lincoln</text:p>
          </table:table-cell>
          <table:table-cell office:value-type="string" table:style-name="ce5">
            <text:p>Town car</text:p>
          </table:table-cell>
          <table:table-cell office:value-type="float" office:value="48911" table:style-name="ce11">
            <text:p>48911</text:p>
          </table:table-cell>
          <table:table-cell office:value-type="currency" office:value="43330" table:style-name="ce12">
            <text:p>$43,330</text:p>
          </table:table-cell>
          <table:table-cell office:value-type="currency" office:value="21725" table:style-name="ce12">
            <text:p>$21,725</text:p>
          </table:table-cell>
          <table:table-cell office:value-type="percentage" office:value="0.5013847219016847" table:formula="of:=SUM([.E77]/[.D77])" table:style-name="ce13">
            <text:p>50%</text:p>
          </table:table-cell>
          <table:table-cell office:value-type="string" office:string-value="POOR" table:formula="of:=IF([.F77]&gt;69%; &quot;GOOD&quot;; &quot;POOR&quot;)" table:style-name="ce20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15" table:style-name="ce6">
            <text:p>215</text:p>
          </table:table-cell>
          <table:table-cell office:value-type="string" office:string-value="Medium HP" table:formula="of:=COM.MICROSOFT.IFS([.I77]&gt;299;&quot;High HP&quot;;[.I77]&gt;99;&quot;Medium HP&quot;;[.I7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93.957916900000001" table:style-name="ce6">
            <text:p>93.9579169</text:p>
          </table:table-cell>
          <table:table-cell office:value-type="float" office:value="117.7" table:style-name="ce6">
            <text:p>117.7</text:p>
          </table:table-cell>
          <table:table-cell office:value-type="float" office:value="78.2" table:style-name="ce6">
            <text:p>78.2</text:p>
          </table:table-cell>
          <table:table-cell office:value-type="float" office:value="215.3" table:style-name="ce6">
            <text:p>215.3</text:p>
          </table:table-cell>
          <table:table-cell office:value-type="float" office:value="4.1210000000000004" table:style-name="ce6">
            <text:p>4.121</text:p>
          </table:table-cell>
          <table:table-cell office:value-type="float" office:value="19" table:style-name="ce6">
            <text:p>19</text:p>
          </table:table-cell>
          <table:table-cell office:value-type="date" office:date-value="2012-06-04T00:00:00" table:style-name="ce7">
            <text:p>6/4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Lincoln</text:p>
          </table:table-cell>
          <table:table-cell office:value-type="string" table:style-name="ce5">
            <text:p>Navigator</text:p>
          </table:table-cell>
          <table:table-cell office:value-type="float" office:value="22925" table:style-name="ce11">
            <text:p>22925</text:p>
          </table:table-cell>
          <table:table-cell office:value-type="currency" office:value="42660" table:style-name="ce12">
            <text:p>$42,660</text:p>
          </table:table-cell>
          <table:table-cell office:value-type="currency" office:value="20765" table:style-name="ce12">
            <text:p>$20,765</text:p>
          </table:table-cell>
          <table:table-cell office:value-type="percentage" office:value="0.48675574308485703" table:formula="of:=SUM([.E78]/[.D78])" table:style-name="ce13">
            <text:p>49%</text:p>
          </table:table-cell>
          <table:table-cell office:value-type="string" office:string-value="POOR" table:formula="of:=IF([.F78]&gt;69%; &quot;GOOD&quot;; &quot;POOR&quot;)" table:style-name="ce20">
            <text:p>POOR</text:p>
          </table:table-cell>
          <table:table-cell office:value-type="float" office:value="5.4" table:style-name="ce6">
            <text:p>5.4</text:p>
          </table:table-cell>
          <table:table-cell office:value-type="float" office:value="300" table:style-name="ce6">
            <text:p>300</text:p>
          </table:table-cell>
          <table:table-cell office:value-type="string" office:string-value="High HP" table:formula="of:=COM.MICROSOFT.IFS([.I78]&gt;299;&quot;High HP&quot;;[.I78]&gt;99;&quot;Medium HP&quot;;[.I78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Car</text:p>
          </table:table-cell>
          <table:table-cell office:value-type="float" office:value="15" table:style-name="ce6">
            <text:p>15</text:p>
          </table:table-cell>
          <table:table-cell office:value-type="float" office:value="123.97204670000001" table:style-name="ce6">
            <text:p>123.9720467</text:p>
          </table:table-cell>
          <table:table-cell office:value-type="float" office:value="119" table:style-name="ce6">
            <text:p>119</text:p>
          </table:table-cell>
          <table:table-cell office:value-type="float" office:value="79.900000000000006" table:style-name="ce6">
            <text:p>79.9</text:p>
          </table:table-cell>
          <table:table-cell office:value-type="float" office:value="204.8" table:style-name="ce6">
            <text:p>204.8</text:p>
          </table:table-cell>
          <table:table-cell office:value-type="float" office:value="5.3929999999999998" table:style-name="ce6">
            <text:p>5.393</text:p>
          </table:table-cell>
          <table:table-cell office:value-type="float" office:value="30" table:style-name="ce6">
            <text:p>30</text:p>
          </table:table-cell>
          <table:table-cell office:value-type="date" office:date-value="2012-12-23T00:00:00" table:style-name="ce7">
            <text:p>12/23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itsubishi</text:p>
          </table:table-cell>
          <table:table-cell office:value-type="string" table:style-name="ce5">
            <text:p>Mirage</text:p>
          </table:table-cell>
          <table:table-cell office:value-type="float" office:value="26232" table:style-name="ce11">
            <text:p>26232</text:p>
          </table:table-cell>
          <table:table-cell office:value-type="currency" office:value="13987" table:style-name="ce12">
            <text:p>$13,987</text:p>
          </table:table-cell>
          <table:table-cell office:value-type="currency" office:value="8325" table:style-name="ce12">
            <text:p>$8,325</text:p>
          </table:table-cell>
          <table:table-cell office:value-type="percentage" office:value="0.59519553871452058" table:formula="of:=SUM([.E79]/[.D79])" table:style-name="ce13">
            <text:p>60%</text:p>
          </table:table-cell>
          <table:table-cell office:value-type="string" office:string-value="POOR" table:formula="of:=IF([.F79]&gt;69%; &quot;GOOD&quot;; &quot;POOR&quot;)" table:style-name="ce20">
            <text:p>POOR</text:p>
          </table:table-cell>
          <table:table-cell office:value-type="float" office:value="1.8" table:style-name="ce6">
            <text:p>1.8</text:p>
          </table:table-cell>
          <table:table-cell office:value-type="float" office:value="113" table:style-name="ce6">
            <text:p>113</text:p>
          </table:table-cell>
          <table:table-cell office:value-type="string" office:string-value="Medium HP" table:formula="of:=COM.MICROSOFT.IFS([.I79]&gt;299;&quot;High HP&quot;;[.I79]&gt;99;&quot;Medium HP&quot;;[.I7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0" table:style-name="ce6">
            <text:p>30</text:p>
          </table:table-cell>
          <table:table-cell office:value-type="float" office:value="45.832180559999998" table:style-name="ce6">
            <text:p>45.83218056</text:p>
          </table:table-cell>
          <table:table-cell office:value-type="float" office:value="98.4" table:style-name="ce6">
            <text:p>98.4</text:p>
          </table:table-cell>
          <table:table-cell office:value-type="float" office:value="66.5" table:style-name="ce6">
            <text:p>66.5</text:p>
          </table:table-cell>
          <table:table-cell office:value-type="float" office:value="173.6" table:style-name="ce6">
            <text:p>173.6</text:p>
          </table:table-cell>
          <table:table-cell office:value-type="float" office:value="2.25" table:style-name="ce6">
            <text:p>2.25</text:p>
          </table:table-cell>
          <table:table-cell office:value-type="float" office:value="13.2" table:style-name="ce6">
            <text:p>13.2</text:p>
          </table:table-cell>
          <table:table-cell office:value-type="date" office:date-value="2012-04-23T00:00:00" table:style-name="ce7">
            <text:p>4/23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itsubishi</text:p>
          </table:table-cell>
          <table:table-cell office:value-type="string" table:style-name="ce5">
            <text:p>Eclipse</text:p>
          </table:table-cell>
          <table:table-cell office:value-type="float" office:value="42541" table:style-name="ce11">
            <text:p>42541</text:p>
          </table:table-cell>
          <table:table-cell office:value-type="currency" office:value="19047" table:style-name="ce12">
            <text:p>$19,047</text:p>
          </table:table-cell>
          <table:table-cell office:value-type="currency" office:value="10395" table:style-name="ce12">
            <text:p>$10,395</text:p>
          </table:table-cell>
          <table:table-cell office:value-type="percentage" office:value="0.54575523704520401" table:formula="of:=SUM([.E80]/[.D80])" table:style-name="ce13">
            <text:p>55%</text:p>
          </table:table-cell>
          <table:table-cell office:value-type="string" office:string-value="POOR" table:formula="of:=IF([.F80]&gt;69%; &quot;GOOD&quot;; &quot;POOR&quot;)" table:style-name="ce20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54" table:style-name="ce6">
            <text:p>154</text:p>
          </table:table-cell>
          <table:table-cell office:value-type="string" office:string-value="Medium HP" table:formula="of:=COM.MICROSOFT.IFS([.I80]&gt;299;&quot;High HP&quot;;[.I80]&gt;99;&quot;Medium HP&quot;;[.I8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62.441962349999997" table:style-name="ce6">
            <text:p>62.44196235</text:p>
          </table:table-cell>
          <table:table-cell office:value-type="float" office:value="100.8" table:style-name="ce6">
            <text:p>100.8</text:p>
          </table:table-cell>
          <table:table-cell office:value-type="float" office:value="68.900000000000006" table:style-name="ce6">
            <text:p>68.9</text:p>
          </table:table-cell>
          <table:table-cell office:value-type="float" office:value="175.4" table:style-name="ce6">
            <text:p>175.4</text:p>
          </table:table-cell>
          <table:table-cell office:value-type="float" office:value="2.91" table:style-name="ce6">
            <text:p>2.91</text:p>
          </table:table-cell>
          <table:table-cell office:value-type="float" office:value="15.9" table:style-name="ce6">
            <text:p>15.9</text:p>
          </table:table-cell>
          <table:table-cell office:value-type="date" office:date-value="2012-11-24T00:00:00" table:style-name="ce7">
            <text:p>11/24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itsubishi</text:p>
          </table:table-cell>
          <table:table-cell office:value-type="string" table:style-name="ce5">
            <text:p>Galant</text:p>
          </table:table-cell>
          <table:table-cell office:value-type="float" office:value="55616" table:style-name="ce11">
            <text:p>55616</text:p>
          </table:table-cell>
          <table:table-cell office:value-type="currency" office:value="17357" table:style-name="ce12">
            <text:p>$17,357</text:p>
          </table:table-cell>
          <table:table-cell office:value-type="currency" office:value="10595" table:style-name="ce12">
            <text:p>$10,595</text:p>
          </table:table-cell>
          <table:table-cell office:value-type="percentage" office:value="0.61041654663824396" table:formula="of:=SUM([.E81]/[.D81])" table:style-name="ce13">
            <text:p>61%</text:p>
          </table:table-cell>
          <table:table-cell office:value-type="string" office:string-value="POOR" table:formula="of:=IF([.F81]&gt;69%; &quot;GOOD&quot;; &quot;POOR&quot;)" table:style-name="ce20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45" table:style-name="ce6">
            <text:p>145</text:p>
          </table:table-cell>
          <table:table-cell office:value-type="string" office:string-value="Medium HP" table:formula="of:=COM.MICROSOFT.IFS([.I81]&gt;299;&quot;High HP&quot;;[.I81]&gt;99;&quot;Medium HP&quot;;[.I8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58.606772919999997" table:style-name="ce6">
            <text:p>58.60677292</text:p>
          </table:table-cell>
          <table:table-cell office:value-type="float" office:value="103.7" table:style-name="ce6">
            <text:p>103.7</text:p>
          </table:table-cell>
          <table:table-cell office:value-type="float" office:value="68.5" table:style-name="ce6">
            <text:p>68.5</text:p>
          </table:table-cell>
          <table:table-cell office:value-type="float" office:value="187.8" table:style-name="ce6">
            <text:p>187.8</text:p>
          </table:table-cell>
          <table:table-cell office:value-type="float" office:value="2.9449999999999998" table:style-name="ce6">
            <text:p>2.945</text:p>
          </table:table-cell>
          <table:table-cell office:value-type="float" office:value="16.3" table:style-name="ce6">
            <text:p>16.3</text:p>
          </table:table-cell>
          <table:table-cell office:value-type="date" office:date-value="2012-01-29T00:00:00" table:style-name="ce7">
            <text:p>1/29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itsubishi</text:p>
          </table:table-cell>
          <table:table-cell office:value-type="string" table:style-name="ce5">
            <text:p>Diamante</text:p>
          </table:table-cell>
          <table:table-cell office:value-type="float" office:value="5711" table:style-name="ce11">
            <text:p>5711</text:p>
          </table:table-cell>
          <table:table-cell office:value-type="currency" office:value="24997" table:style-name="ce12">
            <text:p>$24,997</text:p>
          </table:table-cell>
          <table:table-cell office:value-type="currency" office:value="16575" table:style-name="ce12">
            <text:p>$16,575</text:p>
          </table:table-cell>
          <table:table-cell office:value-type="percentage" office:value="0.66307956954834579" table:formula="of:=SUM([.E82]/[.D82])" table:style-name="ce13">
            <text:p>66%</text:p>
          </table:table-cell>
          <table:table-cell office:value-type="string" office:string-value="POOR" table:formula="of:=IF([.F82]&gt;69%; &quot;GOOD&quot;; &quot;POOR&quot;)" table:style-name="ce20">
            <text:p>POOR</text:p>
          </table:table-cell>
          <table:table-cell office:value-type="float" office:value="3.5" table:style-name="ce6">
            <text:p>3.5</text:p>
          </table:table-cell>
          <table:table-cell office:value-type="float" office:value="210" table:style-name="ce6">
            <text:p>210</text:p>
          </table:table-cell>
          <table:table-cell office:value-type="string" office:string-value="Medium HP" table:formula="of:=COM.MICROSOFT.IFS([.I82]&gt;299;&quot;High HP&quot;;[.I82]&gt;99;&quot;Medium HP&quot;;[.I8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84.83077858" table:style-name="ce6">
            <text:p>84.83077858</text:p>
          </table:table-cell>
          <table:table-cell office:value-type="float" office:value="107.1" table:style-name="ce6">
            <text:p>107.1</text:p>
          </table:table-cell>
          <table:table-cell office:value-type="float" office:value="70.3" table:style-name="ce6">
            <text:p>70.3</text:p>
          </table:table-cell>
          <table:table-cell office:value-type="float" office:value="194.1" table:style-name="ce6">
            <text:p>194.1</text:p>
          </table:table-cell>
          <table:table-cell office:value-type="float" office:value="3.4430000000000001" table:style-name="ce6">
            <text:p>3.443</text:p>
          </table:table-cell>
          <table:table-cell office:value-type="float" office:value="19" table:style-name="ce6">
            <text:p>19</text:p>
          </table:table-cell>
          <table:table-cell office:value-type="date" office:date-value="2012-08-28T00:00:00" table:style-name="ce7">
            <text:p>8/28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itsubishi</text:p>
          </table:table-cell>
          <table:table-cell office:value-type="string" table:style-name="ce5">
            <text:p>3000GT</text:p>
          </table:table-cell>
          <table:table-cell office:value-type="float" office:value="110" table:style-name="ce11">
            <text:p>110</text:p>
          </table:table-cell>
          <table:table-cell office:value-type="currency" office:value="25450" table:style-name="ce12">
            <text:p>$25,450</text:p>
          </table:table-cell>
          <table:table-cell office:value-type="currency" office:value="20940" table:style-name="ce12">
            <text:p>$20,940</text:p>
          </table:table-cell>
          <table:table-cell office:value-type="percentage" office:value="0.82278978388998036" table:formula="of:=SUM([.E83]/[.D83])" table:style-name="ce13">
            <text:p>82%</text:p>
          </table:table-cell>
          <table:table-cell office:value-type="string" office:string-value="GOOD" table:formula="of:=IF([.F83]&gt;69%; &quot;GOOD&quot;; &quot;POOR&quot;)" table:style-name="ce20">
            <text:p>GOOD</text:p>
          </table:table-cell>
          <table:table-cell office:value-type="float" office:value="3" table:style-name="ce6">
            <text:p>3</text:p>
          </table:table-cell>
          <table:table-cell office:value-type="float" office:value="161" table:style-name="ce6">
            <text:p>161</text:p>
          </table:table-cell>
          <table:table-cell office:value-type="string" office:string-value="Medium HP" table:formula="of:=COM.MICROSOFT.IFS([.I83]&gt;299;&quot;High HP&quot;;[.I83]&gt;99;&quot;Medium HP&quot;;[.I8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67.544154939999999" table:style-name="ce6">
            <text:p>67.54415494</text:p>
          </table:table-cell>
          <table:table-cell office:value-type="float" office:value="97.2" table:style-name="ce6">
            <text:p>97.2</text:p>
          </table:table-cell>
          <table:table-cell office:value-type="float" office:value="72.400000000000006" table:style-name="ce6">
            <text:p>72.4</text:p>
          </table:table-cell>
          <table:table-cell office:value-type="float" office:value="180.3" table:style-name="ce6">
            <text:p>180.3</text:p>
          </table:table-cell>
          <table:table-cell office:value-type="float" office:value="3.1309999999999998" table:style-name="ce6">
            <text:p>3.131</text:p>
          </table:table-cell>
          <table:table-cell office:value-type="float" office:value="19.8" table:style-name="ce6">
            <text:p>19.8</text:p>
          </table:table-cell>
          <table:table-cell office:value-type="date" office:date-value="2012-06-29T00:00:00" table:style-name="ce7">
            <text:p>6/29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itsubishi</text:p>
          </table:table-cell>
          <table:table-cell office:value-type="string" table:style-name="ce5">
            <text:p>Montero</text:p>
          </table:table-cell>
          <table:table-cell office:value-type="float" office:value="11337" table:style-name="ce11">
            <text:p>11337</text:p>
          </table:table-cell>
          <table:table-cell office:value-type="currency" office:value="31807" table:style-name="ce12">
            <text:p>$31,807</text:p>
          </table:table-cell>
          <table:table-cell office:value-type="currency" office:value="19125" table:style-name="ce12">
            <text:p>$19,125</text:p>
          </table:table-cell>
          <table:table-cell office:value-type="percentage" office:value="0.601282736504543" table:formula="of:=SUM([.E84]/[.D84])" table:style-name="ce13">
            <text:p>60%</text:p>
          </table:table-cell>
          <table:table-cell office:value-type="string" office:string-value="POOR" table:formula="of:=IF([.F84]&gt;69%; &quot;GOOD&quot;; &quot;POOR&quot;)" table:style-name="ce20">
            <text:p>POOR</text:p>
          </table:table-cell>
          <table:table-cell office:value-type="float" office:value="3.5" table:style-name="ce6">
            <text:p>3.5</text:p>
          </table:table-cell>
          <table:table-cell office:value-type="float" office:value="200" table:style-name="ce6">
            <text:p>200</text:p>
          </table:table-cell>
          <table:table-cell office:value-type="string" office:string-value="Medium HP" table:formula="of:=COM.MICROSOFT.IFS([.I84]&gt;299;&quot;High HP&quot;;[.I84]&gt;99;&quot;Medium HP&quot;;[.I8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8" table:style-name="ce6">
            <text:p>18</text:p>
          </table:table-cell>
          <table:table-cell office:value-type="float" office:value="83.920815039999994" table:style-name="ce6">
            <text:p>83.92081504</text:p>
          </table:table-cell>
          <table:table-cell office:value-type="float" office:value="107.3" table:style-name="ce6">
            <text:p>107.3</text:p>
          </table:table-cell>
          <table:table-cell office:value-type="float" office:value="69.900000000000006" table:style-name="ce6">
            <text:p>69.9</text:p>
          </table:table-cell>
          <table:table-cell office:value-type="float" office:value="186.6" table:style-name="ce6">
            <text:p>186.6</text:p>
          </table:table-cell>
          <table:table-cell office:value-type="float" office:value="4.5199999999999996" table:style-name="ce6">
            <text:p>4.52</text:p>
          </table:table-cell>
          <table:table-cell office:value-type="float" office:value="24.3" table:style-name="ce6">
            <text:p>24.3</text:p>
          </table:table-cell>
          <table:table-cell office:value-type="date" office:date-value="2012-01-17T00:00:00" table:style-name="ce7">
            <text:p>1/17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itsubishi</text:p>
          </table:table-cell>
          <table:table-cell office:value-type="string" table:style-name="ce5">
            <text:p>Montero Sport</text:p>
          </table:table-cell>
          <table:table-cell office:value-type="float" office:value="39348" table:style-name="ce11">
            <text:p>39348</text:p>
          </table:table-cell>
          <table:table-cell office:value-type="currency" office:value="22527" table:style-name="ce12">
            <text:p>$22,527</text:p>
          </table:table-cell>
          <table:table-cell office:value-type="currency" office:value="13880" table:style-name="ce12">
            <text:p>$13,880</text:p>
          </table:table-cell>
          <table:table-cell office:value-type="percentage" office:value="0.6161495094775159" table:formula="of:=SUM([.E85]/[.D85])" table:style-name="ce13">
            <text:p>62%</text:p>
          </table:table-cell>
          <table:table-cell office:value-type="string" office:string-value="POOR" table:formula="of:=IF([.F85]&gt;69%; &quot;GOOD&quot;; &quot;POOR&quot;)" table:style-name="ce20">
            <text:p>POOR</text:p>
          </table:table-cell>
          <table:table-cell office:value-type="float" office:value="3" table:style-name="ce6">
            <text:p>3</text:p>
          </table:table-cell>
          <table:table-cell office:value-type="float" office:value="173" table:style-name="ce6">
            <text:p>173</text:p>
          </table:table-cell>
          <table:table-cell office:value-type="string" office:string-value="Medium HP" table:formula="of:=COM.MICROSOFT.IFS([.I85]&gt;299;&quot;High HP&quot;;[.I85]&gt;99;&quot;Medium HP&quot;;[.I8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0" table:style-name="ce6">
            <text:p>20</text:p>
          </table:table-cell>
          <table:table-cell office:value-type="float" office:value="70.660941789999995" table:style-name="ce6">
            <text:p>70.66094179</text:p>
          </table:table-cell>
          <table:table-cell office:value-type="float" office:value="107.3" table:style-name="ce6">
            <text:p>107.3</text:p>
          </table:table-cell>
          <table:table-cell office:value-type="float" office:value="66.7" table:style-name="ce6">
            <text:p>66.7</text:p>
          </table:table-cell>
          <table:table-cell office:value-type="float" office:value="178.3" table:style-name="ce6">
            <text:p>178.3</text:p>
          </table:table-cell>
          <table:table-cell office:value-type="float" office:value="3.51" table:style-name="ce6">
            <text:p>3.51</text:p>
          </table:table-cell>
          <table:table-cell office:value-type="float" office:value="19.5" table:style-name="ce6">
            <text:p>19.5</text:p>
          </table:table-cell>
          <table:table-cell office:value-type="date" office:date-value="2012-05-18T00:00:00" table:style-name="ce7">
            <text:p>5/18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ercury</text:p>
          </table:table-cell>
          <table:table-cell office:value-type="string" table:style-name="ce5">
            <text:p>Mystique</text:p>
          </table:table-cell>
          <table:table-cell office:value-type="float" office:value="14351" table:style-name="ce11">
            <text:p>14351</text:p>
          </table:table-cell>
          <table:table-cell office:value-type="currency" office:value="16239.999999999998" table:style-name="ce12">
            <text:p>$16,240</text:p>
          </table:table-cell>
          <table:table-cell office:value-type="currency" office:value="8800" table:style-name="ce12">
            <text:p>$8,800</text:p>
          </table:table-cell>
          <table:table-cell office:value-type="percentage" office:value="0.54187192118226613" table:formula="of:=SUM([.E86]/[.D86])" table:style-name="ce13">
            <text:p>54%</text:p>
          </table:table-cell>
          <table:table-cell office:value-type="string" office:string-value="POOR" table:formula="of:=IF([.F86]&gt;69%; &quot;GOOD&quot;; &quot;POOR&quot;)" table:style-name="ce20">
            <text:p>POOR</text:p>
          </table:table-cell>
          <table:table-cell office:value-type="float" office:value="2" table:style-name="ce6">
            <text:p>2</text:p>
          </table:table-cell>
          <table:table-cell office:value-type="float" office:value="125" table:style-name="ce6">
            <text:p>125</text:p>
          </table:table-cell>
          <table:table-cell office:value-type="string" office:string-value="Medium HP" table:formula="of:=COM.MICROSOFT.IFS([.I86]&gt;299;&quot;High HP&quot;;[.I86]&gt;99;&quot;Medium HP&quot;;[.I8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8" table:style-name="ce6">
            <text:p>28</text:p>
          </table:table-cell>
          <table:table-cell office:value-type="float" office:value="50.997747609999998" table:style-name="ce6">
            <text:p>50.99774761</text:p>
          </table:table-cell>
          <table:table-cell office:value-type="float" office:value="106.5" table:style-name="ce6">
            <text:p>106.5</text:p>
          </table:table-cell>
          <table:table-cell office:value-type="float" office:value="69.099999999999994" table:style-name="ce6">
            <text:p>69.1</text:p>
          </table:table-cell>
          <table:table-cell office:value-type="float" office:value="184.8" table:style-name="ce6">
            <text:p>184.8</text:p>
          </table:table-cell>
          <table:table-cell office:value-type="float" office:value="2.7690000000000001" table:style-name="ce6">
            <text:p>2.769</text:p>
          </table:table-cell>
          <table:table-cell office:value-type="float" office:value="15" table:style-name="ce6">
            <text:p>15</text:p>
          </table:table-cell>
          <table:table-cell office:value-type="date" office:date-value="2012-12-19T00:00:00" table:style-name="ce7">
            <text:p>12/19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ercury</text:p>
          </table:table-cell>
          <table:table-cell office:value-type="string" table:style-name="ce5">
            <text:p>Cougar</text:p>
          </table:table-cell>
          <table:table-cell office:value-type="float" office:value="26529" table:style-name="ce11">
            <text:p>26529</text:p>
          </table:table-cell>
          <table:table-cell office:value-type="currency" office:value="16540" table:style-name="ce12">
            <text:p>$16,540</text:p>
          </table:table-cell>
          <table:table-cell office:value-type="currency" office:value="13890" table:style-name="ce12">
            <text:p>$13,890</text:p>
          </table:table-cell>
          <table:table-cell office:value-type="percentage" office:value="0.83978234582829503" table:formula="of:=SUM([.E87]/[.D87])" table:style-name="ce13">
            <text:p>84%</text:p>
          </table:table-cell>
          <table:table-cell office:value-type="string" office:string-value="GOOD" table:formula="of:=IF([.F87]&gt;69%; &quot;GOOD&quot;; &quot;POOR&quot;)" table:style-name="ce20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25" table:style-name="ce6">
            <text:p>125</text:p>
          </table:table-cell>
          <table:table-cell office:value-type="string" office:string-value="Medium HP" table:formula="of:=COM.MICROSOFT.IFS([.I87]&gt;299;&quot;High HP&quot;;[.I87]&gt;99;&quot;Medium HP&quot;;[.I8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0" table:style-name="ce6">
            <text:p>30</text:p>
          </table:table-cell>
          <table:table-cell office:value-type="float" office:value="51.113474259999997" table:style-name="ce6">
            <text:p>51.11347426</text:p>
          </table:table-cell>
          <table:table-cell office:value-type="float" office:value="106.4" table:style-name="ce6">
            <text:p>106.4</text:p>
          </table:table-cell>
          <table:table-cell office:value-type="float" office:value="69.599999999999994" table:style-name="ce6">
            <text:p>69.6</text:p>
          </table:table-cell>
          <table:table-cell office:value-type="float" office:value="185" table:style-name="ce6">
            <text:p>185</text:p>
          </table:table-cell>
          <table:table-cell office:value-type="float" office:value="2.8919999999999999" table:style-name="ce6">
            <text:p>2.892</text:p>
          </table:table-cell>
          <table:table-cell office:value-type="float" office:value="16" table:style-name="ce6">
            <text:p>16</text:p>
          </table:table-cell>
          <table:table-cell office:value-type="date" office:date-value="2012-02-23T00:00:00" table:style-name="ce7">
            <text:p>2/23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ercury</text:p>
          </table:table-cell>
          <table:table-cell office:value-type="string" table:style-name="ce5">
            <text:p>Sable</text:p>
          </table:table-cell>
          <table:table-cell office:value-type="float" office:value="67956" table:style-name="ce11">
            <text:p>67956</text:p>
          </table:table-cell>
          <table:table-cell office:value-type="currency" office:value="19035" table:style-name="ce12">
            <text:p>$19,035</text:p>
          </table:table-cell>
          <table:table-cell office:value-type="currency" office:value="11030" table:style-name="ce12">
            <text:p>$11,030</text:p>
          </table:table-cell>
          <table:table-cell office:value-type="percentage" office:value="0.57945889151562913" table:formula="of:=SUM([.E88]/[.D88])" table:style-name="ce13">
            <text:p>58%</text:p>
          </table:table-cell>
          <table:table-cell office:value-type="string" office:string-value="POOR" table:formula="of:=IF([.F88]&gt;69%; &quot;GOOD&quot;; &quot;POOR&quot;)" table:style-name="ce20">
            <text:p>POOR</text:p>
          </table:table-cell>
          <table:table-cell office:value-type="float" office:value="3" table:style-name="ce6">
            <text:p>3</text:p>
          </table:table-cell>
          <table:table-cell office:value-type="float" office:value="153" table:style-name="ce6">
            <text:p>153</text:p>
          </table:table-cell>
          <table:table-cell office:value-type="string" office:string-value="Medium HP" table:formula="of:=COM.MICROSOFT.IFS([.I88]&gt;299;&quot;High HP&quot;;[.I88]&gt;99;&quot;Medium HP&quot;;[.I8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62.239966629999998" table:style-name="ce6">
            <text:p>62.23996663</text:p>
          </table:table-cell>
          <table:table-cell office:value-type="float" office:value="108.5" table:style-name="ce6">
            <text:p>108.5</text:p>
          </table:table-cell>
          <table:table-cell office:value-type="float" office:value="73" table:style-name="ce6">
            <text:p>73</text:p>
          </table:table-cell>
          <table:table-cell office:value-type="float" office:value="199.7" table:style-name="ce6">
            <text:p>199.7</text:p>
          </table:table-cell>
          <table:table-cell office:value-type="float" office:value="3.379" table:style-name="ce6">
            <text:p>3.379</text:p>
          </table:table-cell>
          <table:table-cell office:value-type="float" office:value="16" table:style-name="ce6">
            <text:p>16</text:p>
          </table:table-cell>
          <table:table-cell office:value-type="date" office:date-value="2012-09-22T00:00:00" table:style-name="ce7">
            <text:p>9/22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ercury</text:p>
          </table:table-cell>
          <table:table-cell office:value-type="string" table:style-name="ce5">
            <text:p>Grand Marquis</text:p>
          </table:table-cell>
          <table:table-cell office:value-type="float" office:value="81174" table:style-name="ce11">
            <text:p>81174</text:p>
          </table:table-cell>
          <table:table-cell office:value-type="currency" office:value="22605" table:style-name="ce12">
            <text:p>$22,605</text:p>
          </table:table-cell>
          <table:table-cell office:value-type="currency" office:value="14875" table:style-name="ce12">
            <text:p>$14,875</text:p>
          </table:table-cell>
          <table:table-cell office:value-type="percentage" office:value="0.65804025658040255" table:formula="of:=SUM([.E89]/[.D89])" table:style-name="ce13">
            <text:p>66%</text:p>
          </table:table-cell>
          <table:table-cell office:value-type="string" office:string-value="POOR" table:formula="of:=IF([.F89]&gt;69%; &quot;GOOD&quot;; &quot;POOR&quot;)" table:style-name="ce20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00" table:style-name="ce6">
            <text:p>200</text:p>
          </table:table-cell>
          <table:table-cell office:value-type="string" office:string-value="Medium HP" table:formula="of:=COM.MICROSOFT.IFS([.I89]&gt;299;&quot;High HP&quot;;[.I89]&gt;99;&quot;Medium HP&quot;;[.I8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80.657696459999997" table:style-name="ce6">
            <text:p>80.65769646</text:p>
          </table:table-cell>
          <table:table-cell office:value-type="float" office:value="114.7" table:style-name="ce6">
            <text:p>114.7</text:p>
          </table:table-cell>
          <table:table-cell office:value-type="float" office:value="78.2" table:style-name="ce6">
            <text:p>78.2</text:p>
          </table:table-cell>
          <table:table-cell office:value-type="float" office:value="212" table:style-name="ce6">
            <text:p>212</text:p>
          </table:table-cell>
          <table:table-cell office:value-type="float" office:value="3.9580000000000002" table:style-name="ce6">
            <text:p>3.958</text:p>
          </table:table-cell>
          <table:table-cell office:value-type="float" office:value="19" table:style-name="ce6">
            <text:p>19</text:p>
          </table:table-cell>
          <table:table-cell office:value-type="date" office:date-value="2012-07-24T00:00:00" table:style-name="ce7">
            <text:p>7/24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ercury</text:p>
          </table:table-cell>
          <table:table-cell office:value-type="string" table:style-name="ce5">
            <text:p>Mountaineer</text:p>
          </table:table-cell>
          <table:table-cell office:value-type="float" office:value="27609" table:style-name="ce11">
            <text:p>27609</text:p>
          </table:table-cell>
          <table:table-cell office:value-type="currency" office:value="27560" table:style-name="ce12">
            <text:p>$27,560</text:p>
          </table:table-cell>
          <table:table-cell office:value-type="currency" office:value="20430" table:style-name="ce12">
            <text:p>$20,430</text:p>
          </table:table-cell>
          <table:table-cell office:value-type="percentage" office:value="0.74129172714078373" table:formula="of:=SUM([.E90]/[.D90])" table:style-name="ce13">
            <text:p>74%</text:p>
          </table:table-cell>
          <table:table-cell office:value-type="string" office:string-value="GOOD" table:formula="of:=IF([.F90]&gt;69%; &quot;GOOD&quot;; &quot;POOR&quot;)" table:style-name="ce20">
            <text:p>GOOD</text:p>
          </table:table-cell>
          <table:table-cell office:value-type="float" office:value="4" table:style-name="ce6">
            <text:p>4</text:p>
          </table:table-cell>
          <table:table-cell office:value-type="float" office:value="210" table:style-name="ce6">
            <text:p>210</text:p>
          </table:table-cell>
          <table:table-cell office:value-type="string" office:string-value="Medium HP" table:formula="of:=COM.MICROSOFT.IFS([.I90]&gt;299;&quot;High HP&quot;;[.I90]&gt;99;&quot;Medium HP&quot;;[.I9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8" table:style-name="ce6">
            <text:p>18</text:p>
          </table:table-cell>
          <table:table-cell office:value-type="float" office:value="85.949744249999995" table:style-name="ce6">
            <text:p>85.94974425</text:p>
          </table:table-cell>
          <table:table-cell office:value-type="float" office:value="111.6" table:style-name="ce6">
            <text:p>111.6</text:p>
          </table:table-cell>
          <table:table-cell office:value-type="float" office:value="70.2" table:style-name="ce6">
            <text:p>70.2</text:p>
          </table:table-cell>
          <table:table-cell office:value-type="float" office:value="190.1" table:style-name="ce6">
            <text:p>190.1</text:p>
          </table:table-cell>
          <table:table-cell office:value-type="float" office:value="3.8759999999999999" table:style-name="ce6">
            <text:p>3.876</text:p>
          </table:table-cell>
          <table:table-cell office:value-type="float" office:value="21" table:style-name="ce6">
            <text:p>21</text:p>
          </table:table-cell>
          <table:table-cell office:value-type="date" office:date-value="2008-02-13T00:00:00" table:style-name="ce7">
            <text:p>2/13/2008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ercury</text:p>
          </table:table-cell>
          <table:table-cell office:value-type="string" table:style-name="ce5">
            <text:p>Villager</text:p>
          </table:table-cell>
          <table:table-cell office:value-type="float" office:value="20380" table:style-name="ce11">
            <text:p>20380</text:p>
          </table:table-cell>
          <table:table-cell office:value-type="currency" office:value="22510" table:style-name="ce12">
            <text:p>$22,510</text:p>
          </table:table-cell>
          <table:table-cell office:value-type="currency" office:value="14795" table:style-name="ce12">
            <text:p>$14,795</text:p>
          </table:table-cell>
          <table:table-cell office:value-type="percentage" office:value="0.65726343847179036" table:formula="of:=SUM([.E91]/[.D91])" table:style-name="ce13">
            <text:p>66%</text:p>
          </table:table-cell>
          <table:table-cell office:value-type="string" office:string-value="POOR" table:formula="of:=IF([.F91]&gt;69%; &quot;GOOD&quot;; &quot;POOR&quot;)" table:style-name="ce20">
            <text:p>POOR</text:p>
          </table:table-cell>
          <table:table-cell office:value-type="float" office:value="3.3" table:style-name="ce6">
            <text:p>3.3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91]&gt;299;&quot;High HP&quot;;[.I91]&gt;99;&quot;Medium HP&quot;;[.I9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1" table:style-name="ce6">
            <text:p>21</text:p>
          </table:table-cell>
          <table:table-cell office:value-type="float" office:value="69.671460999999994" table:style-name="ce6">
            <text:p>69.671461</text:p>
          </table:table-cell>
          <table:table-cell office:value-type="float" office:value="112.2" table:style-name="ce6">
            <text:p>112.2</text:p>
          </table:table-cell>
          <table:table-cell office:value-type="float" office:value="74.900000000000006" table:style-name="ce6">
            <text:p>74.9</text:p>
          </table:table-cell>
          <table:table-cell office:value-type="float" office:value="194.7" table:style-name="ce6">
            <text:p>194.7</text:p>
          </table:table-cell>
          <table:table-cell office:value-type="float" office:value="3.944" table:style-name="ce6">
            <text:p>3.944</text:p>
          </table:table-cell>
          <table:table-cell office:value-type="float" office:value="20" table:style-name="ce6">
            <text:p>20</text:p>
          </table:table-cell>
          <table:table-cell office:value-type="date" office:date-value="2009-10-20T00:00:00" table:style-name="ce7">
            <text:p>10/20/2009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ercedes-B</text:p>
          </table:table-cell>
          <table:table-cell office:value-type="string" table:style-name="ce5">
            <text:p>C-Class</text:p>
          </table:table-cell>
          <table:table-cell office:value-type="float" office:value="18392" table:style-name="ce11">
            <text:p>18392</text:p>
          </table:table-cell>
          <table:table-cell office:value-type="currency" office:value="31750" table:style-name="ce12">
            <text:p>$31,750</text:p>
          </table:table-cell>
          <table:table-cell office:value-type="currency" office:value="26050" table:style-name="ce12">
            <text:p>$26,050</text:p>
          </table:table-cell>
          <table:table-cell office:value-type="percentage" office:value="0.82047244094488192" table:formula="of:=SUM([.E92]/[.D92])" table:style-name="ce13">
            <text:p>82%</text:p>
          </table:table-cell>
          <table:table-cell office:value-type="string" office:string-value="GOOD" table:formula="of:=IF([.F92]&gt;69%; &quot;GOOD&quot;; &quot;POOR&quot;)" table:style-name="ce20">
            <text:p>GOOD</text:p>
          </table:table-cell>
          <table:table-cell office:value-type="float" office:value="2.2999999999999998" table:style-name="ce6">
            <text:p>2.3</text:p>
          </table:table-cell>
          <table:table-cell office:value-type="float" office:value="185" table:style-name="ce6">
            <text:p>185</text:p>
          </table:table-cell>
          <table:table-cell office:value-type="string" office:string-value="Medium HP" table:formula="of:=COM.MICROSOFT.IFS([.I92]&gt;299;&quot;High HP&quot;;[.I92]&gt;99;&quot;Medium HP&quot;;[.I9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78.280730879999993" table:style-name="ce6">
            <text:p>78.28073088</text:p>
          </table:table-cell>
          <table:table-cell office:value-type="float" office:value="105.9" table:style-name="ce6">
            <text:p>105.9</text:p>
          </table:table-cell>
          <table:table-cell office:value-type="float" office:value="67.7" table:style-name="ce6">
            <text:p>67.7</text:p>
          </table:table-cell>
          <table:table-cell office:value-type="float" office:value="177.4" table:style-name="ce6">
            <text:p>177.4</text:p>
          </table:table-cell>
          <table:table-cell office:value-type="float" office:value="3.25" table:style-name="ce6">
            <text:p>3.25</text:p>
          </table:table-cell>
          <table:table-cell office:value-type="float" office:value="16.399999999999999" table:style-name="ce6">
            <text:p>16.4</text:p>
          </table:table-cell>
          <table:table-cell office:value-type="date" office:date-value="2011-04-24T00:00:00" table:style-name="ce7">
            <text:p>4/24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ercedes-B</text:p>
          </table:table-cell>
          <table:table-cell office:value-type="string" table:style-name="ce5">
            <text:p>E-Class</text:p>
          </table:table-cell>
          <table:table-cell office:value-type="float" office:value="27602" table:style-name="ce11">
            <text:p>27602</text:p>
          </table:table-cell>
          <table:table-cell office:value-type="currency" office:value="49900" table:style-name="ce12">
            <text:p>$49,900</text:p>
          </table:table-cell>
          <table:table-cell office:value-type="currency" office:value="41450" table:style-name="ce12">
            <text:p>$41,450</text:p>
          </table:table-cell>
          <table:table-cell office:value-type="percentage" office:value="0.83066132264529058" table:formula="of:=SUM([.E93]/[.D93])" table:style-name="ce13">
            <text:p>83%</text:p>
          </table:table-cell>
          <table:table-cell office:value-type="string" office:string-value="GOOD" table:formula="of:=IF([.F93]&gt;69%; &quot;GOOD&quot;; &quot;POOR&quot;)" table:style-name="ce20">
            <text:p>GOOD</text:p>
          </table:table-cell>
          <table:table-cell office:value-type="float" office:value="3.2" table:style-name="ce6">
            <text:p>3.2</text:p>
          </table:table-cell>
          <table:table-cell office:value-type="float" office:value="221" table:style-name="ce6">
            <text:p>221</text:p>
          </table:table-cell>
          <table:table-cell office:value-type="string" office:string-value="Medium HP" table:formula="of:=COM.MICROSOFT.IFS([.I93]&gt;299;&quot;High HP&quot;;[.I93]&gt;99;&quot;Medium HP&quot;;[.I9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98.249737499999995" table:style-name="ce6">
            <text:p>98.2497375</text:p>
          </table:table-cell>
          <table:table-cell office:value-type="float" office:value="111.5" table:style-name="ce6">
            <text:p>111.5</text:p>
          </table:table-cell>
          <table:table-cell office:value-type="float" office:value="70.8" table:style-name="ce6">
            <text:p>70.8</text:p>
          </table:table-cell>
          <table:table-cell office:value-type="float" office:value="189.4" table:style-name="ce6">
            <text:p>189.4</text:p>
          </table:table-cell>
          <table:table-cell office:value-type="float" office:value="3.823" table:style-name="ce6">
            <text:p>3.823</text:p>
          </table:table-cell>
          <table:table-cell office:value-type="float" office:value="21.1" table:style-name="ce6">
            <text:p>21.1</text:p>
          </table:table-cell>
          <table:table-cell office:value-type="date" office:date-value="2011-07-12T00:00:00" table:style-name="ce7">
            <text:p>7/12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ercedes-B</text:p>
          </table:table-cell>
          <table:table-cell office:value-type="string" table:style-name="ce5">
            <text:p>S-Class</text:p>
          </table:table-cell>
          <table:table-cell office:value-type="float" office:value="16774" table:style-name="ce11">
            <text:p>16774</text:p>
          </table:table-cell>
          <table:table-cell office:value-type="currency" office:value="69700" table:style-name="ce12">
            <text:p>$69,700</text:p>
          </table:table-cell>
          <table:table-cell office:value-type="currency" office:value="50375" table:style-name="ce12">
            <text:p>$50,375</text:p>
          </table:table-cell>
          <table:table-cell office:value-type="percentage" office:value="0.72274031563845054" table:formula="of:=SUM([.E94]/[.D94])" table:style-name="ce13">
            <text:p>72%</text:p>
          </table:table-cell>
          <table:table-cell office:value-type="string" office:string-value="GOOD" table:formula="of:=IF([.F94]&gt;69%; &quot;GOOD&quot;; &quot;POOR&quot;)" table:style-name="ce20">
            <text:p>GOOD</text:p>
          </table:table-cell>
          <table:table-cell office:value-type="float" office:value="4.3" table:style-name="ce6">
            <text:p>4.3</text:p>
          </table:table-cell>
          <table:table-cell office:value-type="float" office:value="275" table:style-name="ce6">
            <text:p>275</text:p>
          </table:table-cell>
          <table:table-cell office:value-type="string" office:string-value="Medium HP" table:formula="of:=COM.MICROSOFT.IFS([.I94]&gt;299;&quot;High HP&quot;;[.I94]&gt;99;&quot;Medium HP&quot;;[.I9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125.2738757" table:style-name="ce6">
            <text:p>125.2738757</text:p>
          </table:table-cell>
          <table:table-cell office:value-type="float" office:value="121.5" table:style-name="ce6">
            <text:p>121.5</text:p>
          </table:table-cell>
          <table:table-cell office:value-type="float" office:value="73.099999999999994" table:style-name="ce6">
            <text:p>73.1</text:p>
          </table:table-cell>
          <table:table-cell office:value-type="float" office:value="203.1" table:style-name="ce6">
            <text:p>203.1</text:p>
          </table:table-cell>
          <table:table-cell office:value-type="float" office:value="4.133" table:style-name="ce6">
            <text:p>4.133</text:p>
          </table:table-cell>
          <table:table-cell office:value-type="float" office:value="23.2" table:style-name="ce6">
            <text:p>23.2</text:p>
          </table:table-cell>
          <table:table-cell office:value-type="date" office:date-value="2011-06-13T00:00:00" table:style-name="ce7">
            <text:p>6/13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ercedes-B</text:p>
          </table:table-cell>
          <table:table-cell office:value-type="string" table:style-name="ce5">
            <text:p>SL-Class</text:p>
          </table:table-cell>
          <table:table-cell office:value-type="float" office:value="3311" table:style-name="ce11">
            <text:p>3311</text:p>
          </table:table-cell>
          <table:table-cell office:value-type="currency" office:value="82600" table:style-name="ce12">
            <text:p>$82,600</text:p>
          </table:table-cell>
          <table:table-cell office:value-type="currency" office:value="58600" table:style-name="ce12">
            <text:p>$58,600</text:p>
          </table:table-cell>
          <table:table-cell office:value-type="percentage" office:value="0.70944309927360771" table:formula="of:=SUM([.E95]/[.D95])" table:style-name="ce13">
            <text:p>71%</text:p>
          </table:table-cell>
          <table:table-cell office:value-type="string" office:string-value="GOOD" table:formula="of:=IF([.F95]&gt;69%; &quot;GOOD&quot;; &quot;POOR&quot;)" table:style-name="ce20">
            <text:p>GOOD</text:p>
          </table:table-cell>
          <table:table-cell office:value-type="float" office:value="5" table:style-name="ce6">
            <text:p>5</text:p>
          </table:table-cell>
          <table:table-cell office:value-type="float" office:value="302" table:style-name="ce6">
            <text:p>302</text:p>
          </table:table-cell>
          <table:table-cell office:value-type="string" office:string-value="High HP" table:formula="of:=COM.MICROSOFT.IFS([.I95]&gt;299;&quot;High HP&quot;;[.I95]&gt;99;&quot;Medium HP&quot;;[.I95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Passenger</text:p>
          </table:table-cell>
          <table:table-cell office:value-type="float" office:value="20" table:style-name="ce6">
            <text:p>20</text:p>
          </table:table-cell>
          <table:table-cell office:value-type="float" office:value="139.98229359999999" table:style-name="ce6">
            <text:p>139.9822936</text:p>
          </table:table-cell>
          <table:table-cell office:value-type="float" office:value="99" table:style-name="ce6">
            <text:p>99</text:p>
          </table:table-cell>
          <table:table-cell office:value-type="float" office:value="71.3" table:style-name="ce6">
            <text:p>71.3</text:p>
          </table:table-cell>
          <table:table-cell office:value-type="float" office:value="177.1" table:style-name="ce6">
            <text:p>177.1</text:p>
          </table:table-cell>
          <table:table-cell office:value-type="float" office:value="4.125" table:style-name="ce6">
            <text:p>4.125</text:p>
          </table:table-cell>
          <table:table-cell office:value-type="float" office:value="21.1" table:style-name="ce6">
            <text:p>21.1</text:p>
          </table:table-cell>
          <table:table-cell office:value-type="date" office:date-value="2011-03-17T00:00:00" table:style-name="ce7">
            <text:p>3/17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ercedes-B</text:p>
          </table:table-cell>
          <table:table-cell office:value-type="string" table:style-name="ce5">
            <text:p>SLK</text:p>
          </table:table-cell>
          <table:table-cell office:value-type="float" office:value="7998" table:style-name="ce11">
            <text:p>7998</text:p>
          </table:table-cell>
          <table:table-cell office:value-type="currency" office:value="38900" table:style-name="ce12">
            <text:p>$38,900</text:p>
          </table:table-cell>
          <table:table-cell office:value-type="currency" office:value="32436" table:style-name="ce12">
            <text:p>$32,436</text:p>
          </table:table-cell>
          <table:table-cell office:value-type="percentage" office:value="0.83383033419023134" table:formula="of:=SUM([.E96]/[.D96])" table:style-name="ce13">
            <text:p>83%</text:p>
          </table:table-cell>
          <table:table-cell office:value-type="string" office:string-value="GOOD" table:formula="of:=IF([.F96]&gt;69%; &quot;GOOD&quot;; &quot;POOR&quot;)" table:style-name="ce20">
            <text:p>GOOD</text:p>
          </table:table-cell>
          <table:table-cell office:value-type="float" office:value="2.2999999999999998" table:style-name="ce6">
            <text:p>2.3</text:p>
          </table:table-cell>
          <table:table-cell office:value-type="float" office:value="190" table:style-name="ce6">
            <text:p>190</text:p>
          </table:table-cell>
          <table:table-cell office:value-type="string" office:string-value="Medium HP" table:formula="of:=COM.MICROSOFT.IFS([.I96]&gt;299;&quot;High HP&quot;;[.I96]&gt;99;&quot;Medium HP&quot;;[.I9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82.807361929999999" table:style-name="ce6">
            <text:p>82.80736193</text:p>
          </table:table-cell>
          <table:table-cell office:value-type="float" office:value="94.5" table:style-name="ce6">
            <text:p>94.5</text:p>
          </table:table-cell>
          <table:table-cell office:value-type="float" office:value="67.5" table:style-name="ce6">
            <text:p>67.5</text:p>
          </table:table-cell>
          <table:table-cell office:value-type="float" office:value="157.9" table:style-name="ce6">
            <text:p>157.9</text:p>
          </table:table-cell>
          <table:table-cell office:value-type="float" office:value="3.0550000000000002" table:style-name="ce6">
            <text:p>3.055</text:p>
          </table:table-cell>
          <table:table-cell office:value-type="float" office:value="15.9" table:style-name="ce6">
            <text:p>15.9</text:p>
          </table:table-cell>
          <table:table-cell office:value-type="date" office:date-value="2011-01-16T00:00:00" table:style-name="ce7">
            <text:p>1/16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ercedes-B</text:p>
          </table:table-cell>
          <table:table-cell office:value-type="string" table:style-name="ce5">
            <text:p>SLK230</text:p>
          </table:table-cell>
          <table:table-cell office:value-type="float" office:value="1526" table:style-name="ce11">
            <text:p>1526</text:p>
          </table:table-cell>
          <table:table-cell office:value-type="currency" office:value="41000" table:style-name="ce12">
            <text:p>$41,000</text:p>
          </table:table-cell>
          <table:table-cell office:value-type="currency" office:value="28635" table:style-name="ce12">
            <text:p>$28,635</text:p>
          </table:table-cell>
          <table:table-cell office:value-type="percentage" office:value="0.69841463414634142" table:formula="of:=SUM([.E97]/[.D97])" table:style-name="ce13">
            <text:p>70%</text:p>
          </table:table-cell>
          <table:table-cell office:value-type="string" office:string-value="GOOD" table:formula="of:=IF([.F97]&gt;69%; &quot;GOOD&quot;; &quot;POOR&quot;)" table:style-name="ce20">
            <text:p>GOOD</text:p>
          </table:table-cell>
          <table:table-cell office:value-type="float" office:value="2.2999999999999998" table:style-name="ce6">
            <text:p>2.3</text:p>
          </table:table-cell>
          <table:table-cell office:value-type="float" office:value="185" table:style-name="ce6">
            <text:p>185</text:p>
          </table:table-cell>
          <table:table-cell office:value-type="string" office:string-value="Medium HP" table:formula="of:=COM.MICROSOFT.IFS([.I97]&gt;299;&quot;High HP&quot;;[.I97]&gt;99;&quot;Medium HP&quot;;[.I9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81.848969240000002" table:style-name="ce6">
            <text:p>81.84896924</text:p>
          </table:table-cell>
          <table:table-cell office:value-type="float" office:value="94.5" table:style-name="ce6">
            <text:p>94.5</text:p>
          </table:table-cell>
          <table:table-cell office:value-type="float" office:value="67.5" table:style-name="ce6">
            <text:p>67.5</text:p>
          </table:table-cell>
          <table:table-cell office:value-type="float" office:value="157.30000000000001" table:style-name="ce6">
            <text:p>157.3</text:p>
          </table:table-cell>
          <table:table-cell office:value-type="float" office:value="2.9750000000000001" table:style-name="ce6">
            <text:p>2.975</text:p>
          </table:table-cell>
          <table:table-cell office:value-type="float" office:value="14" table:style-name="ce6">
            <text:p>14</text:p>
          </table:table-cell>
          <table:table-cell office:value-type="date" office:date-value="2011-08-06T00:00:00" table:style-name="ce7">
            <text:p>8/6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ercedes-B</text:p>
          </table:table-cell>
          <table:table-cell office:value-type="string" table:style-name="ce5">
            <text:p>CLK Coupe</text:p>
          </table:table-cell>
          <table:table-cell office:value-type="float" office:value="11592" table:style-name="ce11">
            <text:p>11592</text:p>
          </table:table-cell>
          <table:table-cell office:value-type="currency" office:value="41600" table:style-name="ce12">
            <text:p>$41,600</text:p>
          </table:table-cell>
          <table:table-cell office:value-type="currency" office:value="29200" table:style-name="ce12">
            <text:p>$29,200</text:p>
          </table:table-cell>
          <table:table-cell office:value-type="percentage" office:value="0.70192307692307687" table:formula="of:=SUM([.E98]/[.D98])" table:style-name="ce13">
            <text:p>70%</text:p>
          </table:table-cell>
          <table:table-cell office:value-type="string" office:string-value="GOOD" table:formula="of:=IF([.F98]&gt;69%; &quot;GOOD&quot;; &quot;POOR&quot;)" table:style-name="ce20">
            <text:p>GOOD</text:p>
          </table:table-cell>
          <table:table-cell office:value-type="float" office:value="3.2" table:style-name="ce6">
            <text:p>3.2</text:p>
          </table:table-cell>
          <table:table-cell office:value-type="float" office:value="215" table:style-name="ce6">
            <text:p>215</text:p>
          </table:table-cell>
          <table:table-cell office:value-type="string" office:string-value="Medium HP" table:formula="of:=COM.MICROSOFT.IFS([.I98]&gt;299;&quot;High HP&quot;;[.I98]&gt;99;&quot;Medium HP&quot;;[.I9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92.925791770000004" table:style-name="ce6">
            <text:p>92.92579177</text:p>
          </table:table-cell>
          <table:table-cell office:value-type="float" office:value="105.9" table:style-name="ce6">
            <text:p>105.9</text:p>
          </table:table-cell>
          <table:table-cell office:value-type="float" office:value="67.8" table:style-name="ce6">
            <text:p>67.8</text:p>
          </table:table-cell>
          <table:table-cell office:value-type="float" office:value="180.3" table:style-name="ce6">
            <text:p>180.3</text:p>
          </table:table-cell>
          <table:table-cell office:value-type="float" office:value="3.2130000000000001" table:style-name="ce6">
            <text:p>3.213</text:p>
          </table:table-cell>
          <table:table-cell office:value-type="float" office:value="16.399999999999999" table:style-name="ce6">
            <text:p>16.4</text:p>
          </table:table-cell>
          <table:table-cell office:value-type="date" office:date-value="2011-07-08T00:00:00" table:style-name="ce7">
            <text:p>7/8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ercedes-B</text:p>
          </table:table-cell>
          <table:table-cell office:value-type="string" table:style-name="ce5">
            <text:p>CL500</text:p>
          </table:table-cell>
          <table:table-cell office:value-type="float" office:value="954" table:style-name="ce11">
            <text:p>954</text:p>
          </table:table-cell>
          <table:table-cell office:value-type="currency" office:value="85500" table:style-name="ce12">
            <text:p>$85,500</text:p>
          </table:table-cell>
          <table:table-cell office:value-type="currency" office:value="63423" table:style-name="ce12">
            <text:p>$63,423</text:p>
          </table:table-cell>
          <table:table-cell office:value-type="percentage" office:value="0.74178947368421055" table:formula="of:=SUM([.E99]/[.D99])" table:style-name="ce13">
            <text:p>74%</text:p>
          </table:table-cell>
          <table:table-cell office:value-type="string" office:string-value="GOOD" table:formula="of:=IF([.F99]&gt;69%; &quot;GOOD&quot;; &quot;POOR&quot;)" table:style-name="ce20">
            <text:p>GOOD</text:p>
          </table:table-cell>
          <table:table-cell office:value-type="float" office:value="5" table:style-name="ce6">
            <text:p>5</text:p>
          </table:table-cell>
          <table:table-cell office:value-type="float" office:value="302" table:style-name="ce6">
            <text:p>302</text:p>
          </table:table-cell>
          <table:table-cell office:value-type="string" office:string-value="High HP" table:formula="of:=COM.MICROSOFT.IFS([.I99]&gt;299;&quot;High HP&quot;;[.I99]&gt;99;&quot;Medium HP&quot;;[.I99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Passenger</text:p>
          </table:table-cell>
          <table:table-cell office:value-type="float" office:value="20" table:style-name="ce6">
            <text:p>20</text:p>
          </table:table-cell>
          <table:table-cell office:value-type="float" office:value="141.10098450000001" table:style-name="ce6">
            <text:p>141.1009845</text:p>
          </table:table-cell>
          <table:table-cell office:value-type="float" office:value="113.6" table:style-name="ce6">
            <text:p>113.6</text:p>
          </table:table-cell>
          <table:table-cell office:value-type="float" office:value="73.099999999999994" table:style-name="ce6">
            <text:p>73.1</text:p>
          </table:table-cell>
          <table:table-cell office:value-type="float" office:value="196.6" table:style-name="ce6">
            <text:p>196.6</text:p>
          </table:table-cell>
          <table:table-cell office:value-type="float" office:value="4.1150000000000002" table:style-name="ce6">
            <text:p>4.115</text:p>
          </table:table-cell>
          <table:table-cell office:value-type="float" office:value="23.2" table:style-name="ce6">
            <text:p>23.2</text:p>
          </table:table-cell>
          <table:table-cell office:value-type="date" office:date-value="2011-04-11T00:00:00" table:style-name="ce7">
            <text:p>4/1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ercedes-B</text:p>
          </table:table-cell>
          <table:table-cell office:value-type="string" table:style-name="ce5">
            <text:p>M-Class</text:p>
          </table:table-cell>
          <table:table-cell office:value-type="float" office:value="28976" table:style-name="ce11">
            <text:p>28976</text:p>
          </table:table-cell>
          <table:table-cell office:value-type="currency" office:value="35300" table:style-name="ce12">
            <text:p>$35,300</text:p>
          </table:table-cell>
          <table:table-cell office:value-type="currency" office:value="28720" table:style-name="ce12">
            <text:p>$28,720</text:p>
          </table:table-cell>
          <table:table-cell office:value-type="percentage" office:value="0.81359773371104815" table:formula="of:=SUM([.E100]/[.D100])" table:style-name="ce13">
            <text:p>81%</text:p>
          </table:table-cell>
          <table:table-cell office:value-type="string" office:string-value="GOOD" table:formula="of:=IF([.F100]&gt;69%; &quot;GOOD&quot;; &quot;POOR&quot;)" table:style-name="ce20">
            <text:p>GOOD</text:p>
          </table:table-cell>
          <table:table-cell office:value-type="float" office:value="3.2" table:style-name="ce6">
            <text:p>3.2</text:p>
          </table:table-cell>
          <table:table-cell office:value-type="float" office:value="215" table:style-name="ce6">
            <text:p>215</text:p>
          </table:table-cell>
          <table:table-cell office:value-type="string" office:string-value="Medium HP" table:formula="of:=COM.MICROSOFT.IFS([.I100]&gt;299;&quot;High HP&quot;;[.I100]&gt;99;&quot;Medium HP&quot;;[.I10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0" table:style-name="ce6">
            <text:p>20</text:p>
          </table:table-cell>
          <table:table-cell office:value-type="float" office:value="90.495532130000001" table:style-name="ce6">
            <text:p>90.49553213</text:p>
          </table:table-cell>
          <table:table-cell office:value-type="float" office:value="111" table:style-name="ce6">
            <text:p>111</text:p>
          </table:table-cell>
          <table:table-cell office:value-type="float" office:value="72.2" table:style-name="ce6">
            <text:p>72.2</text:p>
          </table:table-cell>
          <table:table-cell office:value-type="float" office:value="180.6" table:style-name="ce6">
            <text:p>180.6</text:p>
          </table:table-cell>
          <table:table-cell office:value-type="float" office:value="4.3869999999999996" table:style-name="ce6">
            <text:p>4.387</text:p>
          </table:table-cell>
          <table:table-cell office:value-type="float" office:value="19" table:style-name="ce6">
            <text:p>19</text:p>
          </table:table-cell>
          <table:table-cell office:value-type="date" office:date-value="2011-02-10T00:00:00" table:style-name="ce7">
            <text:p>2/10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Nissan</text:p>
          </table:table-cell>
          <table:table-cell office:value-type="string" table:style-name="ce5">
            <text:p>Sentra</text:p>
          </table:table-cell>
          <table:table-cell office:value-type="float" office:value="42643" table:style-name="ce11">
            <text:p>42643</text:p>
          </table:table-cell>
          <table:table-cell office:value-type="currency" office:value="13499" table:style-name="ce12">
            <text:p>$13,499</text:p>
          </table:table-cell>
          <table:table-cell office:value-type="currency" office:value="8450" table:style-name="ce12">
            <text:p>$8,450</text:p>
          </table:table-cell>
          <table:table-cell office:value-type="percentage" office:value="0.62597229424401812" table:formula="of:=SUM([.E101]/[.D101])" table:style-name="ce13">
            <text:p>63%</text:p>
          </table:table-cell>
          <table:table-cell office:value-type="string" office:string-value="POOR" table:formula="of:=IF([.F101]&gt;69%; &quot;GOOD&quot;; &quot;POOR&quot;)" table:style-name="ce20">
            <text:p>POOR</text:p>
          </table:table-cell>
          <table:table-cell office:value-type="float" office:value="1.8" table:style-name="ce6">
            <text:p>1.8</text:p>
          </table:table-cell>
          <table:table-cell office:value-type="float" office:value="126" table:style-name="ce6">
            <text:p>126</text:p>
          </table:table-cell>
          <table:table-cell office:value-type="string" office:string-value="Medium HP" table:formula="of:=COM.MICROSOFT.IFS([.I101]&gt;299;&quot;High HP&quot;;[.I101]&gt;99;&quot;Medium HP&quot;;[.I10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0" table:style-name="ce6">
            <text:p>30</text:p>
          </table:table-cell>
          <table:table-cell office:value-type="float" office:value="50.241977910000003" table:style-name="ce6">
            <text:p>50.24197791</text:p>
          </table:table-cell>
          <table:table-cell office:value-type="float" office:value="99.8" table:style-name="ce6">
            <text:p>99.8</text:p>
          </table:table-cell>
          <table:table-cell office:value-type="float" office:value="67.3" table:style-name="ce6">
            <text:p>67.3</text:p>
          </table:table-cell>
          <table:table-cell office:value-type="float" office:value="177.5" table:style-name="ce6">
            <text:p>177.5</text:p>
          </table:table-cell>
          <table:table-cell office:value-type="float" office:value="2.593" table:style-name="ce6">
            <text:p>2.593</text:p>
          </table:table-cell>
          <table:table-cell office:value-type="float" office:value="13.2" table:style-name="ce6">
            <text:p>13.2</text:p>
          </table:table-cell>
          <table:table-cell office:value-type="date" office:date-value="2011-08-31T00:00:00" table:style-name="ce7">
            <text:p>8/3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Nissan</text:p>
          </table:table-cell>
          <table:table-cell office:value-type="string" table:style-name="ce5">
            <text:p>Altima</text:p>
          </table:table-cell>
          <table:table-cell office:value-type="float" office:value="88094" table:style-name="ce11">
            <text:p>88094</text:p>
          </table:table-cell>
          <table:table-cell office:value-type="currency" office:value="20390" table:style-name="ce12">
            <text:p>$20,390</text:p>
          </table:table-cell>
          <table:table-cell office:value-type="currency" office:value="11295" table:style-name="ce12">
            <text:p>$11,295</text:p>
          </table:table-cell>
          <table:table-cell office:value-type="percentage" office:value="0.55394801373222169" table:formula="of:=SUM([.E102]/[.D102])" table:style-name="ce13">
            <text:p>55%</text:p>
          </table:table-cell>
          <table:table-cell office:value-type="string" office:string-value="POOR" table:formula="of:=IF([.F102]&gt;69%; &quot;GOOD&quot;; &quot;POOR&quot;)" table:style-name="ce20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55" table:style-name="ce6">
            <text:p>155</text:p>
          </table:table-cell>
          <table:table-cell office:value-type="string" office:string-value="Medium HP" table:formula="of:=COM.MICROSOFT.IFS([.I102]&gt;299;&quot;High HP&quot;;[.I102]&gt;99;&quot;Medium HP&quot;;[.I10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63.313727829999998" table:style-name="ce6">
            <text:p>63.31372783</text:p>
          </table:table-cell>
          <table:table-cell office:value-type="float" office:value="103.1" table:style-name="ce6">
            <text:p>103.1</text:p>
          </table:table-cell>
          <table:table-cell office:value-type="float" office:value="69.099999999999994" table:style-name="ce6">
            <text:p>69.1</text:p>
          </table:table-cell>
          <table:table-cell office:value-type="float" office:value="183.5" table:style-name="ce6">
            <text:p>183.5</text:p>
          </table:table-cell>
          <table:table-cell office:value-type="float" office:value="3.012" table:style-name="ce6">
            <text:p>3.012</text:p>
          </table:table-cell>
          <table:table-cell office:value-type="float" office:value="15.9" table:style-name="ce6">
            <text:p>15.9</text:p>
          </table:table-cell>
          <table:table-cell office:value-type="date" office:date-value="2011-08-02T00:00:00" table:style-name="ce7">
            <text:p>8/2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Nissan</text:p>
          </table:table-cell>
          <table:table-cell office:value-type="string" table:style-name="ce5">
            <text:p>Maxima</text:p>
          </table:table-cell>
          <table:table-cell office:value-type="float" office:value="79853" table:style-name="ce11">
            <text:p>79853</text:p>
          </table:table-cell>
          <table:table-cell office:value-type="currency" office:value="26249" table:style-name="ce12">
            <text:p>$26,249</text:p>
          </table:table-cell>
          <table:table-cell office:value-type="currency" office:value="15125" table:style-name="ce12">
            <text:p>$15,125</text:p>
          </table:table-cell>
          <table:table-cell office:value-type="percentage" office:value="0.57621242714008147" table:formula="of:=SUM([.E103]/[.D103])" table:style-name="ce13">
            <text:p>58%</text:p>
          </table:table-cell>
          <table:table-cell office:value-type="string" office:string-value="POOR" table:formula="of:=IF([.F103]&gt;69%; &quot;GOOD&quot;; &quot;POOR&quot;)" table:style-name="ce20">
            <text:p>POOR</text:p>
          </table:table-cell>
          <table:table-cell office:value-type="float" office:value="3" table:style-name="ce6">
            <text:p>3</text:p>
          </table:table-cell>
          <table:table-cell office:value-type="float" office:value="222" table:style-name="ce6">
            <text:p>222</text:p>
          </table:table-cell>
          <table:table-cell office:value-type="string" office:string-value="Medium HP" table:formula="of:=COM.MICROSOFT.IFS([.I103]&gt;299;&quot;High HP&quot;;[.I103]&gt;99;&quot;Medium HP&quot;;[.I10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89.427820310000001" table:style-name="ce6">
            <text:p>89.42782031</text:p>
          </table:table-cell>
          <table:table-cell office:value-type="float" office:value="108.3" table:style-name="ce6">
            <text:p>108.3</text:p>
          </table:table-cell>
          <table:table-cell office:value-type="float" office:value="70.3" table:style-name="ce6">
            <text:p>70.3</text:p>
          </table:table-cell>
          <table:table-cell office:value-type="float" office:value="190.5" table:style-name="ce6">
            <text:p>190.5</text:p>
          </table:table-cell>
          <table:table-cell office:value-type="float" office:value="3.294" table:style-name="ce6">
            <text:p>3.294</text:p>
          </table:table-cell>
          <table:table-cell office:value-type="float" office:value="18.5" table:style-name="ce6">
            <text:p>18.5</text:p>
          </table:table-cell>
          <table:table-cell office:value-type="date" office:date-value="2011-05-06T00:00:00" table:style-name="ce7">
            <text:p>5/6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Nissan</text:p>
          </table:table-cell>
          <table:table-cell office:value-type="string" table:style-name="ce5">
            <text:p>Quest</text:p>
          </table:table-cell>
          <table:table-cell office:value-type="float" office:value="27308" table:style-name="ce11">
            <text:p>27308</text:p>
          </table:table-cell>
          <table:table-cell office:value-type="currency" office:value="26399" table:style-name="ce12">
            <text:p>$26,399</text:p>
          </table:table-cell>
          <table:table-cell office:value-type="currency" office:value="15380" table:style-name="ce12">
            <text:p>$15,380</text:p>
          </table:table-cell>
          <table:table-cell office:value-type="percentage" office:value="0.58259782567521501" table:formula="of:=SUM([.E104]/[.D104])" table:style-name="ce13">
            <text:p>58%</text:p>
          </table:table-cell>
          <table:table-cell office:value-type="string" office:string-value="POOR" table:formula="of:=IF([.F104]&gt;69%; &quot;GOOD&quot;; &quot;POOR&quot;)" table:style-name="ce20">
            <text:p>POOR</text:p>
          </table:table-cell>
          <table:table-cell office:value-type="float" office:value="3.3" table:style-name="ce6">
            <text:p>3.3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104]&gt;299;&quot;High HP&quot;;[.I104]&gt;99;&quot;Medium HP&quot;;[.I10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1" table:style-name="ce6">
            <text:p>21</text:p>
          </table:table-cell>
          <table:table-cell office:value-type="float" office:value="71.171664129999996" table:style-name="ce6">
            <text:p>71.17166413</text:p>
          </table:table-cell>
          <table:table-cell office:value-type="float" office:value="112.2" table:style-name="ce6">
            <text:p>112.2</text:p>
          </table:table-cell>
          <table:table-cell office:value-type="float" office:value="74.900000000000006" table:style-name="ce6">
            <text:p>74.9</text:p>
          </table:table-cell>
          <table:table-cell office:value-type="float" office:value="194.8" table:style-name="ce6">
            <text:p>194.8</text:p>
          </table:table-cell>
          <table:table-cell office:value-type="float" office:value="3.9910000000000001" table:style-name="ce6">
            <text:p>3.991</text:p>
          </table:table-cell>
          <table:table-cell office:value-type="float" office:value="20" table:style-name="ce6">
            <text:p>20</text:p>
          </table:table-cell>
          <table:table-cell office:value-type="date" office:date-value="2011-03-07T00:00:00" table:style-name="ce7">
            <text:p>3/7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Nissan</text:p>
          </table:table-cell>
          <table:table-cell office:value-type="string" table:style-name="ce5">
            <text:p>Pathfinder</text:p>
          </table:table-cell>
          <table:table-cell office:value-type="float" office:value="42574" table:style-name="ce11">
            <text:p>42574</text:p>
          </table:table-cell>
          <table:table-cell office:value-type="currency" office:value="29299" table:style-name="ce12">
            <text:p>$29,299</text:p>
          </table:table-cell>
          <table:table-cell office:value-type="currency" office:value="17810" table:style-name="ce12">
            <text:p>$17,810</text:p>
          </table:table-cell>
          <table:table-cell office:value-type="percentage" office:value="0.60787057578756953" table:formula="of:=SUM([.E105]/[.D105])" table:style-name="ce13">
            <text:p>61%</text:p>
          </table:table-cell>
          <table:table-cell office:value-type="string" office:string-value="POOR" table:formula="of:=IF([.F105]&gt;69%; &quot;GOOD&quot;; &quot;POOR&quot;)" table:style-name="ce20">
            <text:p>POOR</text:p>
          </table:table-cell>
          <table:table-cell office:value-type="float" office:value="3.3" table:style-name="ce6">
            <text:p>3.3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105]&gt;299;&quot;High HP&quot;;[.I105]&gt;99;&quot;Medium HP&quot;;[.I10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9" table:style-name="ce6">
            <text:p>19</text:p>
          </table:table-cell>
          <table:table-cell office:value-type="float" office:value="72.290355079999998" table:style-name="ce6">
            <text:p>72.29035508</text:p>
          </table:table-cell>
          <table:table-cell office:value-type="float" office:value="106.3" table:style-name="ce6">
            <text:p>106.3</text:p>
          </table:table-cell>
          <table:table-cell office:value-type="float" office:value="71.7" table:style-name="ce6">
            <text:p>71.7</text:p>
          </table:table-cell>
          <table:table-cell office:value-type="float" office:value="182.6" table:style-name="ce6">
            <text:p>182.6</text:p>
          </table:table-cell>
          <table:table-cell office:value-type="float" office:value="3.9470000000000001" table:style-name="ce6">
            <text:p>3.947</text:p>
          </table:table-cell>
          <table:table-cell office:value-type="float" office:value="21" table:style-name="ce6">
            <text:p>21</text:p>
          </table:table-cell>
          <table:table-cell office:value-type="date" office:date-value="2011-09-25T00:00:00" table:style-name="ce7">
            <text:p>9/25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Nissan</text:p>
          </table:table-cell>
          <table:table-cell office:value-type="string" table:style-name="ce5">
            <text:p>Xterra</text:p>
          </table:table-cell>
          <table:table-cell office:value-type="float" office:value="54158" table:style-name="ce11">
            <text:p>54158</text:p>
          </table:table-cell>
          <table:table-cell office:value-type="currency" office:value="22799" table:style-name="ce12">
            <text:p>$22,799</text:p>
          </table:table-cell>
          <table:table-cell office:value-type="currency" office:value="13093" table:style-name="ce12">
            <text:p>$13,093</text:p>
          </table:table-cell>
          <table:table-cell office:value-type="percentage" office:value="0.57427957366551163" table:formula="of:=SUM([.E106]/[.D106])" table:style-name="ce13">
            <text:p>57%</text:p>
          </table:table-cell>
          <table:table-cell office:value-type="string" office:string-value="POOR" table:formula="of:=IF([.F106]&gt;69%; &quot;GOOD&quot;; &quot;POOR&quot;)" table:style-name="ce20">
            <text:p>POOR</text:p>
          </table:table-cell>
          <table:table-cell office:value-type="float" office:value="3.3" table:style-name="ce6">
            <text:p>3.3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106]&gt;299;&quot;High HP&quot;;[.I106]&gt;99;&quot;Medium HP&quot;;[.I10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8" table:style-name="ce6">
            <text:p>18</text:p>
          </table:table-cell>
          <table:table-cell office:value-type="float" office:value="69.78294434" table:style-name="ce6">
            <text:p>69.78294434</text:p>
          </table:table-cell>
          <table:table-cell office:value-type="float" office:value="104.3" table:style-name="ce6">
            <text:p>104.3</text:p>
          </table:table-cell>
          <table:table-cell office:value-type="float" office:value="70.400000000000006" table:style-name="ce6">
            <text:p>70.4</text:p>
          </table:table-cell>
          <table:table-cell office:value-type="float" office:value="178" table:style-name="ce6">
            <text:p>178</text:p>
          </table:table-cell>
          <table:table-cell office:value-type="float" office:value="3.8210000000000002" table:style-name="ce6">
            <text:p>3.821</text:p>
          </table:table-cell>
          <table:table-cell office:value-type="float" office:value="19.399999999999999" table:style-name="ce6">
            <text:p>19.4</text:p>
          </table:table-cell>
          <table:table-cell office:value-type="date" office:date-value="2011-01-24T00:00:00" table:style-name="ce7">
            <text:p>1/24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Nissan</text:p>
          </table:table-cell>
          <table:table-cell office:value-type="string" table:style-name="ce5">
            <text:p>Frontier</text:p>
          </table:table-cell>
          <table:table-cell office:value-type="float" office:value="65004.999999999993" table:style-name="ce11">
            <text:p>65005</text:p>
          </table:table-cell>
          <table:table-cell office:value-type="currency" office:value="17890" table:style-name="ce12">
            <text:p>$17,890</text:p>
          </table:table-cell>
          <table:table-cell office:value-type="currency" office:value="10670" table:style-name="ce12">
            <text:p>$10,670</text:p>
          </table:table-cell>
          <table:table-cell office:value-type="percentage" office:value="0.59642258244829516" table:formula="of:=SUM([.E107]/[.D107])" table:style-name="ce13">
            <text:p>60%</text:p>
          </table:table-cell>
          <table:table-cell office:value-type="string" office:string-value="POOR" table:formula="of:=IF([.F107]&gt;69%; &quot;GOOD&quot;; &quot;POOR&quot;)" table:style-name="ce20">
            <text:p>POOR</text:p>
          </table:table-cell>
          <table:table-cell office:value-type="float" office:value="3.3" table:style-name="ce6">
            <text:p>3.3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107]&gt;299;&quot;High HP&quot;;[.I107]&gt;99;&quot;Medium HP&quot;;[.I10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8" table:style-name="ce6">
            <text:p>18</text:p>
          </table:table-cell>
          <table:table-cell office:value-type="float" office:value="67.889270589999995" table:style-name="ce6">
            <text:p>67.88927059</text:p>
          </table:table-cell>
          <table:table-cell office:value-type="float" office:value="116.1" table:style-name="ce6">
            <text:p>116.1</text:p>
          </table:table-cell>
          <table:table-cell office:value-type="float" office:value="66.5" table:style-name="ce6">
            <text:p>66.5</text:p>
          </table:table-cell>
          <table:table-cell office:value-type="float" office:value="196.1" table:style-name="ce6">
            <text:p>196.1</text:p>
          </table:table-cell>
          <table:table-cell office:value-type="float" office:value="3.2170000000000001" table:style-name="ce6">
            <text:p>3.217</text:p>
          </table:table-cell>
          <table:table-cell office:value-type="float" office:value="19.399999999999999" table:style-name="ce6">
            <text:p>19.4</text:p>
          </table:table-cell>
          <table:table-cell office:value-type="date" office:date-value="2011-08-27T00:00:00" table:style-name="ce7">
            <text:p>8/27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Oldsmobile</text:p>
          </table:table-cell>
          <table:table-cell office:value-type="string" table:style-name="ce5">
            <text:p>Cutlass</text:p>
          </table:table-cell>
          <table:table-cell office:value-type="float" office:value="1112" table:style-name="ce11">
            <text:p>1112</text:p>
          </table:table-cell>
          <table:table-cell office:value-type="currency" office:value="18145" table:style-name="ce12">
            <text:p>$18,145</text:p>
          </table:table-cell>
          <table:table-cell office:value-type="currency" office:value="11240" table:style-name="ce12">
            <text:p>$11,240</text:p>
          </table:table-cell>
          <table:table-cell office:value-type="percentage" office:value="0.61945439515017908" table:formula="of:=SUM([.E108]/[.D108])" table:style-name="ce13">
            <text:p>62%</text:p>
          </table:table-cell>
          <table:table-cell office:value-type="string" office:string-value="POOR" table:formula="of:=IF([.F108]&gt;69%; &quot;GOOD&quot;; &quot;POOR&quot;)" table:style-name="ce20">
            <text:p>POOR</text:p>
          </table:table-cell>
          <table:table-cell office:value-type="float" office:value="3.1" table:style-name="ce6">
            <text:p>3.1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108]&gt;299;&quot;High HP&quot;;[.I108]&gt;99;&quot;Medium HP&quot;;[.I10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60.861611549999999" table:style-name="ce6">
            <text:p>60.86161155</text:p>
          </table:table-cell>
          <table:table-cell office:value-type="float" office:value="107" table:style-name="ce6">
            <text:p>107</text:p>
          </table:table-cell>
          <table:table-cell office:value-type="float" office:value="69.400000000000006" table:style-name="ce6">
            <text:p>69.4</text:p>
          </table:table-cell>
          <table:table-cell office:value-type="float" office:value="192" table:style-name="ce6">
            <text:p>192</text:p>
          </table:table-cell>
          <table:table-cell office:value-type="float" office:value="3.1019999999999999" table:style-name="ce6">
            <text:p>3.102</text:p>
          </table:table-cell>
          <table:table-cell office:value-type="float" office:value="15.2" table:style-name="ce6">
            <text:p>15.2</text:p>
          </table:table-cell>
          <table:table-cell office:value-type="date" office:date-value="2011-05-31T00:00:00" table:style-name="ce7">
            <text:p>5/3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Oldsmobile</text:p>
          </table:table-cell>
          <table:table-cell office:value-type="string" table:style-name="ce5">
            <text:p>Intrigue</text:p>
          </table:table-cell>
          <table:table-cell office:value-type="float" office:value="38554" table:style-name="ce11">
            <text:p>38554</text:p>
          </table:table-cell>
          <table:table-cell office:value-type="currency" office:value="24150" table:style-name="ce12">
            <text:p>$24,150</text:p>
          </table:table-cell>
          <table:table-cell office:value-type="currency" office:value="17100" table:style-name="ce12">
            <text:p>$17,100</text:p>
          </table:table-cell>
          <table:table-cell office:value-type="percentage" office:value="0.70807453416149069" table:formula="of:=SUM([.E109]/[.D109])" table:style-name="ce13">
            <text:p>71%</text:p>
          </table:table-cell>
          <table:table-cell office:value-type="string" office:string-value="GOOD" table:formula="of:=IF([.F109]&gt;69%; &quot;GOOD&quot;; &quot;POOR&quot;)" table:style-name="ce20">
            <text:p>GOOD</text:p>
          </table:table-cell>
          <table:table-cell office:value-type="float" office:value="3.5" table:style-name="ce6">
            <text:p>3.5</text:p>
          </table:table-cell>
          <table:table-cell office:value-type="float" office:value="215" table:style-name="ce6">
            <text:p>215</text:p>
          </table:table-cell>
          <table:table-cell office:value-type="string" office:string-value="Medium HP" table:formula="of:=COM.MICROSOFT.IFS([.I109]&gt;299;&quot;High HP&quot;;[.I109]&gt;99;&quot;Medium HP&quot;;[.I10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86.272522910000006" table:style-name="ce6">
            <text:p>86.27252291</text:p>
          </table:table-cell>
          <table:table-cell office:value-type="float" office:value="109" table:style-name="ce6">
            <text:p>109</text:p>
          </table:table-cell>
          <table:table-cell office:value-type="float" office:value="73.599999999999994" table:style-name="ce6">
            <text:p>73.6</text:p>
          </table:table-cell>
          <table:table-cell office:value-type="float" office:value="195.9" table:style-name="ce6">
            <text:p>195.9</text:p>
          </table:table-cell>
          <table:table-cell office:value-type="float" office:value="3.4550000000000001" table:style-name="ce6">
            <text:p>3.455</text:p>
          </table:table-cell>
          <table:table-cell office:value-type="float" office:value="18" table:style-name="ce6">
            <text:p>18</text:p>
          </table:table-cell>
          <table:table-cell office:value-type="date" office:date-value="2011-04-01T00:00:00" table:style-name="ce7">
            <text:p>4/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Oldsmobile</text:p>
          </table:table-cell>
          <table:table-cell office:value-type="string" table:style-name="ce5">
            <text:p>Alero</text:p>
          </table:table-cell>
          <table:table-cell office:value-type="float" office:value="80255" table:style-name="ce11">
            <text:p>80255</text:p>
          </table:table-cell>
          <table:table-cell office:value-type="currency" office:value="18270" table:style-name="ce12">
            <text:p>$18,270</text:p>
          </table:table-cell>
          <table:table-cell office:value-type="currency" office:value="11459" table:style-name="ce12">
            <text:p>$11,459</text:p>
          </table:table-cell>
          <table:table-cell office:value-type="percentage" office:value="0.62720306513409962" table:formula="of:=SUM([.E110]/[.D110])" table:style-name="ce13">
            <text:p>63%</text:p>
          </table:table-cell>
          <table:table-cell office:value-type="string" office:string-value="POOR" table:formula="of:=IF([.F110]&gt;69%; &quot;GOOD&quot;; &quot;POOR&quot;)" table:style-name="ce20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110]&gt;299;&quot;High HP&quot;;[.I110]&gt;99;&quot;Medium HP&quot;;[.I11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60.727446929999999" table:style-name="ce6">
            <text:p>60.72744693</text:p>
          </table:table-cell>
          <table:table-cell office:value-type="float" office:value="107" table:style-name="ce6">
            <text:p>107</text:p>
          </table:table-cell>
          <table:table-cell office:value-type="float" office:value="70.099999999999994" table:style-name="ce6">
            <text:p>70.1</text:p>
          </table:table-cell>
          <table:table-cell office:value-type="float" office:value="186.7" table:style-name="ce6">
            <text:p>186.7</text:p>
          </table:table-cell>
          <table:table-cell office:value-type="float" office:value="2.9580000000000002" table:style-name="ce6">
            <text:p>2.958</text:p>
          </table:table-cell>
          <table:table-cell office:value-type="float" office:value="15" table:style-name="ce6">
            <text:p>15</text:p>
          </table:table-cell>
          <table:table-cell office:value-type="date" office:date-value="2009-10-20T00:00:00" table:style-name="ce7">
            <text:p>10/20/2009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Oldsmobile</text:p>
          </table:table-cell>
          <table:table-cell office:value-type="string" table:style-name="ce5">
            <text:p>Aurora</text:p>
          </table:table-cell>
          <table:table-cell office:value-type="float" office:value="14690" table:style-name="ce11">
            <text:p>14690</text:p>
          </table:table-cell>
          <table:table-cell office:value-type="currency" office:value="36229" table:style-name="ce12">
            <text:p>$36,229</text:p>
          </table:table-cell>
          <table:table-cell office:value-type="currency" office:value="19890" table:style-name="ce12">
            <text:p>$19,890</text:p>
          </table:table-cell>
          <table:table-cell office:value-type="percentage" office:value="0.54900770101300067" table:formula="of:=SUM([.E111]/[.D111])" table:style-name="ce13">
            <text:p>55%</text:p>
          </table:table-cell>
          <table:table-cell office:value-type="string" office:string-value="POOR" table:formula="of:=IF([.F111]&gt;69%; &quot;GOOD&quot;; &quot;POOR&quot;)" table:style-name="ce20">
            <text:p>POOR</text:p>
          </table:table-cell>
          <table:table-cell office:value-type="float" office:value="4" table:style-name="ce6">
            <text:p>4</text:p>
          </table:table-cell>
          <table:table-cell office:value-type="float" office:value="250" table:style-name="ce6">
            <text:p>250</text:p>
          </table:table-cell>
          <table:table-cell office:value-type="string" office:string-value="Medium HP" table:formula="of:=COM.MICROSOFT.IFS([.I111]&gt;299;&quot;High HP&quot;;[.I111]&gt;99;&quot;Medium HP&quot;;[.I11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103.4416926" table:style-name="ce6">
            <text:p>103.4416926</text:p>
          </table:table-cell>
          <table:table-cell office:value-type="float" office:value="113.8" table:style-name="ce6">
            <text:p>113.8</text:p>
          </table:table-cell>
          <table:table-cell office:value-type="float" office:value="74.400000000000006" table:style-name="ce6">
            <text:p>74.4</text:p>
          </table:table-cell>
          <table:table-cell office:value-type="float" office:value="205.4" table:style-name="ce6">
            <text:p>205.4</text:p>
          </table:table-cell>
          <table:table-cell office:value-type="float" office:value="3.9670000000000001" table:style-name="ce6">
            <text:p>3.967</text:p>
          </table:table-cell>
          <table:table-cell office:value-type="float" office:value="18.5" table:style-name="ce6">
            <text:p>18.5</text:p>
          </table:table-cell>
          <table:table-cell office:value-type="date" office:date-value="2011-02-18T00:00:00" table:style-name="ce7">
            <text:p>2/18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Oldsmobile</text:p>
          </table:table-cell>
          <table:table-cell office:value-type="string" table:style-name="ce5">
            <text:p>Bravada</text:p>
          </table:table-cell>
          <table:table-cell office:value-type="float" office:value="20017" table:style-name="ce11">
            <text:p>20017</text:p>
          </table:table-cell>
          <table:table-cell office:value-type="currency" office:value="31598" table:style-name="ce12">
            <text:p>$31,598</text:p>
          </table:table-cell>
          <table:table-cell office:value-type="currency" office:value="19925" table:style-name="ce12">
            <text:p>$19,925</text:p>
          </table:table-cell>
          <table:table-cell office:value-type="percentage" office:value="0.63057788467624531" table:formula="of:=SUM([.E112]/[.D112])" table:style-name="ce13">
            <text:p>63%</text:p>
          </table:table-cell>
          <table:table-cell office:value-type="string" office:string-value="POOR" table:formula="of:=IF([.F112]&gt;69%; &quot;GOOD&quot;; &quot;POOR&quot;)" table:style-name="ce20">
            <text:p>POOR</text:p>
          </table:table-cell>
          <table:table-cell office:value-type="float" office:value="4.3" table:style-name="ce6">
            <text:p>4.3</text:p>
          </table:table-cell>
          <table:table-cell office:value-type="float" office:value="190" table:style-name="ce6">
            <text:p>190</text:p>
          </table:table-cell>
          <table:table-cell office:value-type="string" office:string-value="Medium HP" table:formula="of:=COM.MICROSOFT.IFS([.I112]&gt;299;&quot;High HP&quot;;[.I112]&gt;99;&quot;Medium HP&quot;;[.I11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9" table:style-name="ce6">
            <text:p>19</text:p>
          </table:table-cell>
          <table:table-cell office:value-type="float" office:value="80.511672590000003" table:style-name="ce6">
            <text:p>80.51167259</text:p>
          </table:table-cell>
          <table:table-cell office:value-type="float" office:value="107" table:style-name="ce6">
            <text:p>107</text:p>
          </table:table-cell>
          <table:table-cell office:value-type="float" office:value="67.8" table:style-name="ce6">
            <text:p>67.8</text:p>
          </table:table-cell>
          <table:table-cell office:value-type="float" office:value="181.2" table:style-name="ce6">
            <text:p>181.2</text:p>
          </table:table-cell>
          <table:table-cell office:value-type="float" office:value="4.0679999999999996" table:style-name="ce6">
            <text:p>4.068</text:p>
          </table:table-cell>
          <table:table-cell office:value-type="float" office:value="17.5" table:style-name="ce6">
            <text:p>17.5</text:p>
          </table:table-cell>
          <table:table-cell office:value-type="date" office:date-value="2011-09-21T00:00:00" table:style-name="ce7">
            <text:p>9/2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Oldsmobile</text:p>
          </table:table-cell>
          <table:table-cell office:value-type="string" table:style-name="ce5">
            <text:p>Silhouette</text:p>
          </table:table-cell>
          <table:table-cell office:value-type="float" office:value="24361" table:style-name="ce11">
            <text:p>24361</text:p>
          </table:table-cell>
          <table:table-cell office:value-type="currency" office:value="25345" table:style-name="ce12">
            <text:p>$25,345</text:p>
          </table:table-cell>
          <table:table-cell office:value-type="currency" office:value="15240" table:style-name="ce12">
            <text:p>$15,240</text:p>
          </table:table-cell>
          <table:table-cell office:value-type="percentage" office:value="0.60130203195896625" table:formula="of:=SUM([.E113]/[.D113])" table:style-name="ce13">
            <text:p>60%</text:p>
          </table:table-cell>
          <table:table-cell office:value-type="string" office:string-value="POOR" table:formula="of:=IF([.F113]&gt;69%; &quot;GOOD&quot;; &quot;POOR&quot;)" table:style-name="ce20">
            <text:p>POOR</text:p>
          </table:table-cell>
          <table:table-cell office:value-type="float" office:value="3.4" table:style-name="ce6">
            <text:p>3.4</text:p>
          </table:table-cell>
          <table:table-cell office:value-type="float" office:value="185" table:style-name="ce6">
            <text:p>185</text:p>
          </table:table-cell>
          <table:table-cell office:value-type="string" office:string-value="Medium HP" table:formula="of:=COM.MICROSOFT.IFS([.I113]&gt;299;&quot;High HP&quot;;[.I113]&gt;99;&quot;Medium HP&quot;;[.I11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2" table:style-name="ce6">
            <text:p>22</text:p>
          </table:table-cell>
          <table:table-cell office:value-type="float" office:value="76.096570420000006" table:style-name="ce6">
            <text:p>76.09657042</text:p>
          </table:table-cell>
          <table:table-cell office:value-type="float" office:value="120" table:style-name="ce6">
            <text:p>120</text:p>
          </table:table-cell>
          <table:table-cell office:value-type="float" office:value="72.2" table:style-name="ce6">
            <text:p>72.2</text:p>
          </table:table-cell>
          <table:table-cell office:value-type="float" office:value="201.4" table:style-name="ce6">
            <text:p>201.4</text:p>
          </table:table-cell>
          <table:table-cell office:value-type="float" office:value="3.948" table:style-name="ce6">
            <text:p>3.948</text:p>
          </table:table-cell>
          <table:table-cell office:value-type="float" office:value="25" table:style-name="ce6">
            <text:p>25</text:p>
          </table:table-cell>
          <table:table-cell office:value-type="date" office:date-value="2011-06-25T00:00:00" table:style-name="ce7">
            <text:p>6/25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Plymouth</text:p>
          </table:table-cell>
          <table:table-cell office:value-type="string" table:style-name="ce5">
            <text:p>Neon</text:p>
          </table:table-cell>
          <table:table-cell office:value-type="float" office:value="32734" table:style-name="ce11">
            <text:p>32734</text:p>
          </table:table-cell>
          <table:table-cell office:value-type="currency" office:value="12640" table:style-name="ce12">
            <text:p>$12,640</text:p>
          </table:table-cell>
          <table:table-cell office:value-type="currency" office:value="7750" table:style-name="ce12">
            <text:p>$7,750</text:p>
          </table:table-cell>
          <table:table-cell office:value-type="percentage" office:value="0.61313291139240511" table:formula="of:=SUM([.E114]/[.D114])" table:style-name="ce13">
            <text:p>61%</text:p>
          </table:table-cell>
          <table:table-cell office:value-type="string" office:string-value="POOR" table:formula="of:=IF([.F114]&gt;69%; &quot;GOOD&quot;; &quot;POOR&quot;)" table:style-name="ce20">
            <text:p>POOR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6">
            <text:p>132</text:p>
          </table:table-cell>
          <table:table-cell office:value-type="string" office:string-value="Medium HP" table:formula="of:=COM.MICROSOFT.IFS([.I114]&gt;299;&quot;High HP&quot;;[.I114]&gt;99;&quot;Medium HP&quot;;[.I11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9" table:style-name="ce6">
            <text:p>29</text:p>
          </table:table-cell>
          <table:table-cell office:value-type="float" office:value="52.084898750000001" table:style-name="ce6">
            <text:p>52.08489875</text:p>
          </table:table-cell>
          <table:table-cell office:value-type="float" office:value="105" table:style-name="ce6">
            <text:p>105</text:p>
          </table:table-cell>
          <table:table-cell office:value-type="float" office:value="74.400000000000006" table:style-name="ce6">
            <text:p>74.4</text:p>
          </table:table-cell>
          <table:table-cell office:value-type="float" office:value="174.4" table:style-name="ce6">
            <text:p>174.4</text:p>
          </table:table-cell>
          <table:table-cell office:value-type="float" office:value="2.5590000000000002" table:style-name="ce6">
            <text:p>2.559</text:p>
          </table:table-cell>
          <table:table-cell office:value-type="float" office:value="12.5" table:style-name="ce6">
            <text:p>12.5</text:p>
          </table:table-cell>
          <table:table-cell office:value-type="date" office:date-value="2011-04-26T00:00:00" table:style-name="ce7">
            <text:p>4/26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Plymouth</text:p>
          </table:table-cell>
          <table:table-cell office:value-type="string" table:style-name="ce5">
            <text:p>Breeze</text:p>
          </table:table-cell>
          <table:table-cell office:value-type="float" office:value="5240" table:style-name="ce11">
            <text:p>5240</text:p>
          </table:table-cell>
          <table:table-cell office:value-type="currency" office:value="16079.999999999998" table:style-name="ce12">
            <text:p>$16,080</text:p>
          </table:table-cell>
          <table:table-cell office:value-type="currency" office:value="9800" table:style-name="ce12">
            <text:p>$9,800</text:p>
          </table:table-cell>
          <table:table-cell office:value-type="percentage" office:value="0.60945273631840802" table:formula="of:=SUM([.E115]/[.D115])" table:style-name="ce13">
            <text:p>61%</text:p>
          </table:table-cell>
          <table:table-cell office:value-type="string" office:string-value="POOR" table:formula="of:=IF([.F115]&gt;69%; &quot;GOOD&quot;; &quot;POOR&quot;)" table:style-name="ce20">
            <text:p>POOR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6">
            <text:p>132</text:p>
          </table:table-cell>
          <table:table-cell office:value-type="string" office:string-value="Medium HP" table:formula="of:=COM.MICROSOFT.IFS([.I115]&gt;299;&quot;High HP&quot;;[.I115]&gt;99;&quot;Medium HP&quot;;[.I11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53.411897670000002" table:style-name="ce6">
            <text:p>53.41189767</text:p>
          </table:table-cell>
          <table:table-cell office:value-type="float" office:value="108" table:style-name="ce6">
            <text:p>108</text:p>
          </table:table-cell>
          <table:table-cell office:value-type="float" office:value="71" table:style-name="ce6">
            <text:p>71</text:p>
          </table:table-cell>
          <table:table-cell office:value-type="float" office:value="186.3" table:style-name="ce6">
            <text:p>186.3</text:p>
          </table:table-cell>
          <table:table-cell office:value-type="float" office:value="2.9420000000000002" table:style-name="ce6">
            <text:p>2.942</text:p>
          </table:table-cell>
          <table:table-cell office:value-type="float" office:value="16" table:style-name="ce6">
            <text:p>16</text:p>
          </table:table-cell>
          <table:table-cell office:value-type="date" office:date-value="2011-11-14T00:00:00" table:style-name="ce7">
            <text:p>11/14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Plymouth</text:p>
          </table:table-cell>
          <table:table-cell office:value-type="string" table:style-name="ce5">
            <text:p>Voyager</text:p>
          </table:table-cell>
          <table:table-cell office:value-type="float" office:value="24155" table:style-name="ce11">
            <text:p>24155</text:p>
          </table:table-cell>
          <table:table-cell office:value-type="currency" office:value="18850" table:style-name="ce12">
            <text:p>$18,850</text:p>
          </table:table-cell>
          <table:table-cell office:value-type="currency" office:value="12025" table:style-name="ce12">
            <text:p>$12,025</text:p>
          </table:table-cell>
          <table:table-cell office:value-type="percentage" office:value="0.63793103448275867" table:formula="of:=SUM([.E116]/[.D116])" table:style-name="ce13">
            <text:p>64%</text:p>
          </table:table-cell>
          <table:table-cell office:value-type="string" office:string-value="POOR" table:formula="of:=IF([.F116]&gt;69%; &quot;GOOD&quot;; &quot;POOR&quot;)" table:style-name="ce20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116]&gt;299;&quot;High HP&quot;;[.I116]&gt;99;&quot;Medium HP&quot;;[.I11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4" table:style-name="ce6">
            <text:p>24</text:p>
          </table:table-cell>
          <table:table-cell office:value-type="float" office:value="60.951185119999998" table:style-name="ce6">
            <text:p>60.95118512</text:p>
          </table:table-cell>
          <table:table-cell office:value-type="float" office:value="113.3" table:style-name="ce6">
            <text:p>113.3</text:p>
          </table:table-cell>
          <table:table-cell office:value-type="float" office:value="76.8" table:style-name="ce6">
            <text:p>76.8</text:p>
          </table:table-cell>
          <table:table-cell office:value-type="float" office:value="186.3" table:style-name="ce6">
            <text:p>186.3</text:p>
          </table:table-cell>
          <table:table-cell office:value-type="float" office:value="3.528" table:style-name="ce6">
            <text:p>3.528</text:p>
          </table:table-cell>
          <table:table-cell office:value-type="float" office:value="20" table:style-name="ce6">
            <text:p>20</text:p>
          </table:table-cell>
          <table:table-cell office:value-type="date" office:date-value="2011-04-24T00:00:00" table:style-name="ce7">
            <text:p>4/24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Plymouth</text:p>
          </table:table-cell>
          <table:table-cell office:value-type="string" table:style-name="ce5">
            <text:p>Prowler</text:p>
          </table:table-cell>
          <table:table-cell office:value-type="float" office:value="1872" table:style-name="ce11">
            <text:p>1872</text:p>
          </table:table-cell>
          <table:table-cell office:value-type="currency" office:value="43000" table:style-name="ce12">
            <text:p>$43,000</text:p>
          </table:table-cell>
          <table:table-cell office:value-type="currency" office:value="30434" table:style-name="ce12">
            <text:p>$30,434</text:p>
          </table:table-cell>
          <table:table-cell office:value-type="percentage" office:value="0.70776744186046514" table:formula="of:=SUM([.E117]/[.D117])" table:style-name="ce13">
            <text:p>71%</text:p>
          </table:table-cell>
          <table:table-cell office:value-type="string" office:string-value="GOOD" table:formula="of:=IF([.F117]&gt;69%; &quot;GOOD&quot;; &quot;POOR&quot;)" table:style-name="ce20">
            <text:p>GOOD</text:p>
          </table:table-cell>
          <table:table-cell office:value-type="float" office:value="3.5" table:style-name="ce6">
            <text:p>3.5</text:p>
          </table:table-cell>
          <table:table-cell office:value-type="float" office:value="253" table:style-name="ce6">
            <text:p>253</text:p>
          </table:table-cell>
          <table:table-cell office:value-type="string" office:string-value="Medium HP" table:formula="of:=COM.MICROSOFT.IFS([.I117]&gt;299;&quot;High HP&quot;;[.I117]&gt;99;&quot;Medium HP&quot;;[.I11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106.98445630000001" table:style-name="ce6">
            <text:p>106.9844563</text:p>
          </table:table-cell>
          <table:table-cell office:value-type="float" office:value="113.3" table:style-name="ce6">
            <text:p>113.3</text:p>
          </table:table-cell>
          <table:table-cell office:value-type="float" office:value="76.3" table:style-name="ce6">
            <text:p>76.3</text:p>
          </table:table-cell>
          <table:table-cell office:value-type="float" office:value="165.4" table:style-name="ce6">
            <text:p>165.4</text:p>
          </table:table-cell>
          <table:table-cell office:value-type="float" office:value="2.85" table:style-name="ce6">
            <text:p>2.85</text:p>
          </table:table-cell>
          <table:table-cell office:value-type="float" office:value="12" table:style-name="ce6">
            <text:p>12</text:p>
          </table:table-cell>
          <table:table-cell office:value-type="date" office:date-value="2012-06-27T00:00:00" table:style-name="ce7">
            <text:p>6/27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Pontiac</text:p>
          </table:table-cell>
          <table:table-cell office:value-type="string" table:style-name="ce5">
            <text:p>Sunfire</text:p>
          </table:table-cell>
          <table:table-cell office:value-type="float" office:value="51645" table:style-name="ce11">
            <text:p>51645</text:p>
          </table:table-cell>
          <table:table-cell office:value-type="currency" office:value="21610" table:style-name="ce12">
            <text:p>$21,610</text:p>
          </table:table-cell>
          <table:table-cell office:value-type="currency" office:value="13790" table:style-name="ce12">
            <text:p>$13,790</text:p>
          </table:table-cell>
          <table:table-cell office:value-type="percentage" office:value="0.6381304951411384" table:formula="of:=SUM([.E118]/[.D118])" table:style-name="ce13">
            <text:p>64%</text:p>
          </table:table-cell>
          <table:table-cell office:value-type="string" office:string-value="POOR" table:formula="of:=IF([.F118]&gt;69%; &quot;GOOD&quot;; &quot;POOR&quot;)" table:style-name="ce20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118]&gt;299;&quot;High HP&quot;;[.I118]&gt;99;&quot;Medium HP&quot;;[.I11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62.015870300000003" table:style-name="ce6">
            <text:p>62.0158703</text:p>
          </table:table-cell>
          <table:table-cell office:value-type="float" office:value="104.1" table:style-name="ce6">
            <text:p>104.1</text:p>
          </table:table-cell>
          <table:table-cell office:value-type="float" office:value="68.400000000000006" table:style-name="ce6">
            <text:p>68.4</text:p>
          </table:table-cell>
          <table:table-cell office:value-type="float" office:value="181.9" table:style-name="ce6">
            <text:p>181.9</text:p>
          </table:table-cell>
          <table:table-cell office:value-type="float" office:value="2.9060000000000001" table:style-name="ce6">
            <text:p>2.906</text:p>
          </table:table-cell>
          <table:table-cell office:value-type="float" office:value="15" table:style-name="ce6">
            <text:p>15</text:p>
          </table:table-cell>
          <table:table-cell office:value-type="date" office:date-value="2012-01-25T00:00:00" table:style-name="ce7">
            <text:p>1/25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Pontiac</text:p>
          </table:table-cell>
          <table:table-cell office:value-type="string" table:style-name="ce5">
            <text:p>Grand Am</text:p>
          </table:table-cell>
          <table:table-cell office:value-type="float" office:value="131097" table:style-name="ce11">
            <text:p>131097</text:p>
          </table:table-cell>
          <table:table-cell office:value-type="currency" office:value="19720" table:style-name="ce12">
            <text:p>$19,720</text:p>
          </table:table-cell>
          <table:table-cell office:value-type="currency" office:value="10290" table:style-name="ce12">
            <text:p>$10,290</text:p>
          </table:table-cell>
          <table:table-cell office:value-type="percentage" office:value="0.52180527383367137" table:formula="of:=SUM([.E119]/[.D119])" table:style-name="ce13">
            <text:p>52%</text:p>
          </table:table-cell>
          <table:table-cell office:value-type="string" office:string-value="POOR" table:formula="of:=IF([.F119]&gt;69%; &quot;GOOD&quot;; &quot;POOR&quot;)" table:style-name="ce20">
            <text:p>POOR</text:p>
          </table:table-cell>
          <table:table-cell office:value-type="float" office:value="3.4" table:style-name="ce6">
            <text:p>3.4</text:p>
          </table:table-cell>
          <table:table-cell office:value-type="float" office:value="175" table:style-name="ce6">
            <text:p>175</text:p>
          </table:table-cell>
          <table:table-cell office:value-type="string" office:string-value="Medium HP" table:formula="of:=COM.MICROSOFT.IFS([.I119]&gt;299;&quot;High HP&quot;;[.I119]&gt;99;&quot;Medium HP&quot;;[.I11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70.389737260000004" table:style-name="ce6">
            <text:p>70.38973726</text:p>
          </table:table-cell>
          <table:table-cell office:value-type="float" office:value="107" table:style-name="ce6">
            <text:p>107</text:p>
          </table:table-cell>
          <table:table-cell office:value-type="float" office:value="70.400000000000006" table:style-name="ce6">
            <text:p>70.4</text:p>
          </table:table-cell>
          <table:table-cell office:value-type="float" office:value="186.3" table:style-name="ce6">
            <text:p>186.3</text:p>
          </table:table-cell>
          <table:table-cell office:value-type="float" office:value="3.0910000000000002" table:style-name="ce6">
            <text:p>3.091</text:p>
          </table:table-cell>
          <table:table-cell office:value-type="float" office:value="15.2" table:style-name="ce6">
            <text:p>15.2</text:p>
          </table:table-cell>
          <table:table-cell office:value-type="date" office:date-value="2012-11-26T00:00:00" table:style-name="ce7">
            <text:p>11/26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Pontiac</text:p>
          </table:table-cell>
          <table:table-cell office:value-type="string" table:style-name="ce5">
            <text:p>Firebird</text:p>
          </table:table-cell>
          <table:table-cell office:value-type="float" office:value="19911" table:style-name="ce11">
            <text:p>19911</text:p>
          </table:table-cell>
          <table:table-cell office:value-type="currency" office:value="25310" table:style-name="ce12">
            <text:p>$25,310</text:p>
          </table:table-cell>
          <table:table-cell office:value-type="currency" office:value="17805" table:style-name="ce12">
            <text:p>$17,805</text:p>
          </table:table-cell>
          <table:table-cell office:value-type="percentage" office:value="0.70347688660608454" table:formula="of:=SUM([.E120]/[.D120])" table:style-name="ce13">
            <text:p>70%</text:p>
          </table:table-cell>
          <table:table-cell office:value-type="string" office:string-value="GOOD" table:formula="of:=IF([.F120]&gt;69%; &quot;GOOD&quot;; &quot;POOR&quot;)" table:style-name="ce20">
            <text:p>GOOD</text:p>
          </table:table-cell>
          <table:table-cell office:value-type="float" office:value="3.8" table:style-name="ce6">
            <text:p>3.8</text:p>
          </table:table-cell>
          <table:table-cell office:value-type="float" office:value="200" table:style-name="ce6">
            <text:p>200</text:p>
          </table:table-cell>
          <table:table-cell office:value-type="string" office:string-value="Medium HP" table:formula="of:=COM.MICROSOFT.IFS([.I120]&gt;299;&quot;High HP&quot;;[.I120]&gt;99;&quot;Medium HP&quot;;[.I12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81.492726160000004" table:style-name="ce6">
            <text:p>81.49272616</text:p>
          </table:table-cell>
          <table:table-cell office:value-type="float" office:value="101.1" table:style-name="ce6">
            <text:p>101.1</text:p>
          </table:table-cell>
          <table:table-cell office:value-type="float" office:value="74.5" table:style-name="ce6">
            <text:p>74.5</text:p>
          </table:table-cell>
          <table:table-cell office:value-type="float" office:value="193.4" table:style-name="ce6">
            <text:p>193.4</text:p>
          </table:table-cell>
          <table:table-cell office:value-type="float" office:value="3.492" table:style-name="ce6">
            <text:p>3.492</text:p>
          </table:table-cell>
          <table:table-cell office:value-type="float" office:value="16.8" table:style-name="ce6">
            <text:p>16.8</text:p>
          </table:table-cell>
          <table:table-cell office:value-type="date" office:date-value="2012-06-16T00:00:00" table:style-name="ce7">
            <text:p>6/16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Pontiac</text:p>
          </table:table-cell>
          <table:table-cell office:value-type="string" table:style-name="ce5">
            <text:p>Grand Prix</text:p>
          </table:table-cell>
          <table:table-cell office:value-type="float" office:value="92364" table:style-name="ce11">
            <text:p>92364</text:p>
          </table:table-cell>
          <table:table-cell office:value-type="currency" office:value="21665" table:style-name="ce12">
            <text:p>$21,665</text:p>
          </table:table-cell>
          <table:table-cell office:value-type="currency" office:value="14010" table:style-name="ce12">
            <text:p>$14,010</text:p>
          </table:table-cell>
          <table:table-cell office:value-type="percentage" office:value="0.6466651280867759" table:formula="of:=SUM([.E121]/[.D121])" table:style-name="ce13">
            <text:p>65%</text:p>
          </table:table-cell>
          <table:table-cell office:value-type="string" office:string-value="POOR" table:formula="of:=IF([.F121]&gt;69%; &quot;GOOD&quot;; &quot;POOR&quot;)" table:style-name="ce20">
            <text:p>POOR</text:p>
          </table:table-cell>
          <table:table-cell office:value-type="float" office:value="3.8" table:style-name="ce6">
            <text:p>3.8</text:p>
          </table:table-cell>
          <table:table-cell office:value-type="float" office:value="195" table:style-name="ce6">
            <text:p>195</text:p>
          </table:table-cell>
          <table:table-cell office:value-type="string" office:string-value="Medium HP" table:formula="of:=COM.MICROSOFT.IFS([.I121]&gt;299;&quot;High HP&quot;;[.I121]&gt;99;&quot;Medium HP&quot;;[.I12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78.318168130000004" table:style-name="ce6">
            <text:p>78.31816813</text:p>
          </table:table-cell>
          <table:table-cell office:value-type="float" office:value="110.5" table:style-name="ce6">
            <text:p>110.5</text:p>
          </table:table-cell>
          <table:table-cell office:value-type="float" office:value="72.7" table:style-name="ce6">
            <text:p>72.7</text:p>
          </table:table-cell>
          <table:table-cell office:value-type="float" office:value="196.5" table:style-name="ce6">
            <text:p>196.5</text:p>
          </table:table-cell>
          <table:table-cell office:value-type="float" office:value="3.3959999999999999" table:style-name="ce6">
            <text:p>3.396</text:p>
          </table:table-cell>
          <table:table-cell office:value-type="float" office:value="18" table:style-name="ce6">
            <text:p>18</text:p>
          </table:table-cell>
          <table:table-cell office:value-type="date" office:date-value="2012-10-15T00:00:00" table:style-name="ce7">
            <text:p>10/15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Pontiac</text:p>
          </table:table-cell>
          <table:table-cell office:value-type="string" table:style-name="ce5">
            <text:p>Bonneville</text:p>
          </table:table-cell>
          <table:table-cell office:value-type="float" office:value="35945" table:style-name="ce11">
            <text:p>35945</text:p>
          </table:table-cell>
          <table:table-cell office:value-type="currency" office:value="23755" table:style-name="ce12">
            <text:p>$23,755</text:p>
          </table:table-cell>
          <table:table-cell office:value-type="currency" office:value="13225" table:style-name="ce12">
            <text:p>$13,225</text:p>
          </table:table-cell>
          <table:table-cell office:value-type="percentage" office:value="0.55672490002104824" table:formula="of:=SUM([.E122]/[.D122])" table:style-name="ce13">
            <text:p>56%</text:p>
          </table:table-cell>
          <table:table-cell office:value-type="string" office:string-value="POOR" table:formula="of:=IF([.F122]&gt;69%; &quot;GOOD&quot;; &quot;POOR&quot;)" table:style-name="ce20">
            <text:p>POOR</text:p>
          </table:table-cell>
          <table:table-cell office:value-type="float" office:value="3.8" table:style-name="ce6">
            <text:p>3.8</text:p>
          </table:table-cell>
          <table:table-cell office:value-type="float" office:value="205" table:style-name="ce6">
            <text:p>205</text:p>
          </table:table-cell>
          <table:table-cell office:value-type="string" office:string-value="Medium HP" table:formula="of:=COM.MICROSOFT.IFS([.I122]&gt;299;&quot;High HP&quot;;[.I122]&gt;99;&quot;Medium HP&quot;;[.I12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82.661355599999993" table:style-name="ce6">
            <text:p>82.6613556</text:p>
          </table:table-cell>
          <table:table-cell office:value-type="float" office:value="112.2" table:style-name="ce6">
            <text:p>112.2</text:p>
          </table:table-cell>
          <table:table-cell office:value-type="float" office:value="72.599999999999994" table:style-name="ce6">
            <text:p>72.6</text:p>
          </table:table-cell>
          <table:table-cell office:value-type="float" office:value="202.5" table:style-name="ce6">
            <text:p>202.5</text:p>
          </table:table-cell>
          <table:table-cell office:value-type="float" office:value="3.59" table:style-name="ce6">
            <text:p>3.59</text:p>
          </table:table-cell>
          <table:table-cell office:value-type="float" office:value="17.5" table:style-name="ce6">
            <text:p>17.5</text:p>
          </table:table-cell>
          <table:table-cell office:value-type="date" office:date-value="2011-05-18T00:00:00" table:style-name="ce7">
            <text:p>5/18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Pontiac</text:p>
          </table:table-cell>
          <table:table-cell office:value-type="string" table:style-name="ce5">
            <text:p>Montana</text:p>
          </table:table-cell>
          <table:table-cell office:value-type="float" office:value="39572" table:style-name="ce11">
            <text:p>39572</text:p>
          </table:table-cell>
          <table:table-cell office:value-type="currency" office:value="25635" table:style-name="ce12">
            <text:p>$25,635</text:p>
          </table:table-cell>
          <table:table-cell office:value-type="currency" office:value="14215" table:style-name="ce12">
            <text:p>$14,215</text:p>
          </table:table-cell>
          <table:table-cell office:value-type="percentage" office:value="0.55451531109810803" table:formula="of:=SUM([.E123]/[.D123])" table:style-name="ce13">
            <text:p>55%</text:p>
          </table:table-cell>
          <table:table-cell office:value-type="string" office:string-value="POOR" table:formula="of:=IF([.F123]&gt;69%; &quot;GOOD&quot;; &quot;POOR&quot;)" table:style-name="ce20">
            <text:p>POOR</text:p>
          </table:table-cell>
          <table:table-cell office:value-type="float" office:value="3.4" table:style-name="ce6">
            <text:p>3.4</text:p>
          </table:table-cell>
          <table:table-cell office:value-type="float" office:value="185" table:style-name="ce6">
            <text:p>185</text:p>
          </table:table-cell>
          <table:table-cell office:value-type="string" office:string-value="Medium HP" table:formula="of:=COM.MICROSOFT.IFS([.I123]&gt;299;&quot;High HP&quot;;[.I123]&gt;99;&quot;Medium HP&quot;;[.I12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3" table:style-name="ce6">
            <text:p>23</text:p>
          </table:table-cell>
          <table:table-cell office:value-type="float" office:value="76.208439519999999" table:style-name="ce6">
            <text:p>76.20843952</text:p>
          </table:table-cell>
          <table:table-cell office:value-type="float" office:value="120" table:style-name="ce6">
            <text:p>120</text:p>
          </table:table-cell>
          <table:table-cell office:value-type="float" office:value="72.7" table:style-name="ce6">
            <text:p>72.7</text:p>
          </table:table-cell>
          <table:table-cell office:value-type="float" office:value="201.3" table:style-name="ce6">
            <text:p>201.3</text:p>
          </table:table-cell>
          <table:table-cell office:value-type="float" office:value="3.9420000000000002" table:style-name="ce6">
            <text:p>3.942</text:p>
          </table:table-cell>
          <table:table-cell office:value-type="float" office:value="25" table:style-name="ce6">
            <text:p>25</text:p>
          </table:table-cell>
          <table:table-cell office:value-type="date" office:date-value="2012-07-22T00:00:00" table:style-name="ce7">
            <text:p>7/22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Porsche</text:p>
          </table:table-cell>
          <table:table-cell office:value-type="string" table:style-name="ce5">
            <text:p>Boxter</text:p>
          </table:table-cell>
          <table:table-cell office:value-type="float" office:value="8982" table:style-name="ce11">
            <text:p>8982</text:p>
          </table:table-cell>
          <table:table-cell office:value-type="currency" office:value="41430" table:style-name="ce12">
            <text:p>$41,430</text:p>
          </table:table-cell>
          <table:table-cell office:value-type="currency" office:value="41250" table:style-name="ce12">
            <text:p>$41,250</text:p>
          </table:table-cell>
          <table:table-cell office:value-type="percentage" office:value="0.99565532223026787" table:formula="of:=SUM([.E124]/[.D124])" table:style-name="ce13">
            <text:p>100%</text:p>
          </table:table-cell>
          <table:table-cell office:value-type="string" office:string-value="GOOD" table:formula="of:=IF([.F124]&gt;69%; &quot;GOOD&quot;; &quot;POOR&quot;)" table:style-name="ce20">
            <text:p>GOOD</text:p>
          </table:table-cell>
          <table:table-cell office:value-type="float" office:value="2.7" table:style-name="ce6">
            <text:p>2.7</text:p>
          </table:table-cell>
          <table:table-cell office:value-type="float" office:value="217" table:style-name="ce6">
            <text:p>217</text:p>
          </table:table-cell>
          <table:table-cell office:value-type="string" office:string-value="Medium HP" table:formula="of:=COM.MICROSOFT.IFS([.I124]&gt;299;&quot;High HP&quot;;[.I124]&gt;99;&quot;Medium HP&quot;;[.I12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93.437330700000004" table:style-name="ce6">
            <text:p>93.4373307</text:p>
          </table:table-cell>
          <table:table-cell office:value-type="float" office:value="95.2" table:style-name="ce6">
            <text:p>95.2</text:p>
          </table:table-cell>
          <table:table-cell office:value-type="float" office:value="70.099999999999994" table:style-name="ce6">
            <text:p>70.1</text:p>
          </table:table-cell>
          <table:table-cell office:value-type="float" office:value="171" table:style-name="ce6">
            <text:p>171</text:p>
          </table:table-cell>
          <table:table-cell office:value-type="float" office:value="2.778" table:style-name="ce6">
            <text:p>2.778</text:p>
          </table:table-cell>
          <table:table-cell office:value-type="float" office:value="17" table:style-name="ce6">
            <text:p>17</text:p>
          </table:table-cell>
          <table:table-cell office:value-type="date" office:date-value="2012-02-19T00:00:00" table:style-name="ce7">
            <text:p>2/19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Porsche</text:p>
          </table:table-cell>
          <table:table-cell office:value-type="string" table:style-name="ce5">
            <text:p>Carrera Coupe</text:p>
          </table:table-cell>
          <table:table-cell office:value-type="float" office:value="1280" table:style-name="ce11">
            <text:p>1280</text:p>
          </table:table-cell>
          <table:table-cell office:value-type="currency" office:value="71020" table:style-name="ce12">
            <text:p>$71,020</text:p>
          </table:table-cell>
          <table:table-cell office:value-type="currency" office:value="60625" table:style-name="ce12">
            <text:p>$60,625</text:p>
          </table:table-cell>
          <table:table-cell office:value-type="percentage" office:value="0.85363277949873273" table:formula="of:=SUM([.E125]/[.D125])" table:style-name="ce13">
            <text:p>85%</text:p>
          </table:table-cell>
          <table:table-cell office:value-type="string" office:string-value="GOOD" table:formula="of:=IF([.F125]&gt;69%; &quot;GOOD&quot;; &quot;POOR&quot;)" table:style-name="ce20">
            <text:p>GOOD</text:p>
          </table:table-cell>
          <table:table-cell office:value-type="float" office:value="3.4" table:style-name="ce6">
            <text:p>3.4</text:p>
          </table:table-cell>
          <table:table-cell office:value-type="float" office:value="300" table:style-name="ce6">
            <text:p>300</text:p>
          </table:table-cell>
          <table:table-cell office:value-type="string" office:string-value="High HP" table:formula="of:=COM.MICROSOFT.IFS([.I125]&gt;299;&quot;High HP&quot;;[.I125]&gt;99;&quot;Medium HP&quot;;[.I125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134.3909754" table:style-name="ce6">
            <text:p>134.3909754</text:p>
          </table:table-cell>
          <table:table-cell office:value-type="float" office:value="92.6" table:style-name="ce6">
            <text:p>92.6</text:p>
          </table:table-cell>
          <table:table-cell office:value-type="float" office:value="69.5" table:style-name="ce6">
            <text:p>69.5</text:p>
          </table:table-cell>
          <table:table-cell office:value-type="float" office:value="174.5" table:style-name="ce6">
            <text:p>174.5</text:p>
          </table:table-cell>
          <table:table-cell office:value-type="float" office:value="3.032" table:style-name="ce6">
            <text:p>3.032</text:p>
          </table:table-cell>
          <table:table-cell office:value-type="float" office:value="17" table:style-name="ce6">
            <text:p>17</text:p>
          </table:table-cell>
          <table:table-cell office:value-type="date" office:date-value="2012-12-21T00:00:00" table:style-name="ce7">
            <text:p>12/21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Porsche</text:p>
          </table:table-cell>
          <table:table-cell office:value-type="string" table:style-name="ce5">
            <text:p>Carrera Cabrio</text:p>
          </table:table-cell>
          <table:table-cell office:value-type="float" office:value="1866" table:style-name="ce11">
            <text:p>1866</text:p>
          </table:table-cell>
          <table:table-cell office:value-type="currency" office:value="74970" table:style-name="ce12">
            <text:p>$74,970</text:p>
          </table:table-cell>
          <table:table-cell office:value-type="currency" office:value="67550" table:style-name="ce12">
            <text:p>$67,550</text:p>
          </table:table-cell>
          <table:table-cell office:value-type="percentage" office:value="0.90102707749766575" table:formula="of:=SUM([.E126]/[.D126])" table:style-name="ce13">
            <text:p>90%</text:p>
          </table:table-cell>
          <table:table-cell office:value-type="string" office:string-value="GOOD" table:formula="of:=IF([.F126]&gt;69%; &quot;GOOD&quot;; &quot;POOR&quot;)" table:style-name="ce20">
            <text:p>GOOD</text:p>
          </table:table-cell>
          <table:table-cell office:value-type="float" office:value="3.4" table:style-name="ce6">
            <text:p>3.4</text:p>
          </table:table-cell>
          <table:table-cell office:value-type="float" office:value="300" table:style-name="ce6">
            <text:p>300</text:p>
          </table:table-cell>
          <table:table-cell office:value-type="string" office:string-value="High HP" table:formula="of:=COM.MICROSOFT.IFS([.I126]&gt;299;&quot;High HP&quot;;[.I126]&gt;99;&quot;Medium HP&quot;;[.I126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135.91470960000001" table:style-name="ce6">
            <text:p>135.9147096</text:p>
          </table:table-cell>
          <table:table-cell office:value-type="float" office:value="92.6" table:style-name="ce6">
            <text:p>92.6</text:p>
          </table:table-cell>
          <table:table-cell office:value-type="float" office:value="69.5" table:style-name="ce6">
            <text:p>69.5</text:p>
          </table:table-cell>
          <table:table-cell office:value-type="float" office:value="174.5" table:style-name="ce6">
            <text:p>174.5</text:p>
          </table:table-cell>
          <table:table-cell office:value-type="float" office:value="3.0750000000000002" table:style-name="ce6">
            <text:p>3.075</text:p>
          </table:table-cell>
          <table:table-cell office:value-type="float" office:value="17" table:style-name="ce6">
            <text:p>17</text:p>
          </table:table-cell>
          <table:table-cell office:value-type="date" office:date-value="2011-07-11T00:00:00" table:style-name="ce7">
            <text:p>7/1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aab</text:p>
          </table:table-cell>
          <table:table-cell office:value-type="string" table:style-name="ce8">
            <text:p>9-5</text:p>
          </table:table-cell>
          <table:table-cell office:value-type="float" office:value="9191" table:style-name="ce11">
            <text:p>9191</text:p>
          </table:table-cell>
          <table:table-cell office:value-type="currency" office:value="33120" table:style-name="ce12">
            <text:p>$33,120</text:p>
          </table:table-cell>
          <table:table-cell office:value-type="currency" office:value="22789" table:style-name="ce12">
            <text:p>$22,789</text:p>
          </table:table-cell>
          <table:table-cell office:value-type="percentage" office:value="0.68807367149758458" table:formula="of:=SUM([.E127]/[.D127])" table:style-name="ce13">
            <text:p>69%</text:p>
          </table:table-cell>
          <table:table-cell office:value-type="string" office:string-value="POOR" table:formula="of:=IF([.F127]&gt;69%; &quot;GOOD&quot;; &quot;POOR&quot;)" table:style-name="ce20">
            <text:p>POOR</text:p>
          </table:table-cell>
          <table:table-cell office:value-type="float" office:value="2.2999999999999998" table:style-name="ce6">
            <text:p>2.3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127]&gt;299;&quot;High HP&quot;;[.I127]&gt;99;&quot;Medium HP&quot;;[.I12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73.503778190000006" table:style-name="ce6">
            <text:p>73.50377819</text:p>
          </table:table-cell>
          <table:table-cell office:value-type="float" office:value="106.4" table:style-name="ce6">
            <text:p>106.4</text:p>
          </table:table-cell>
          <table:table-cell office:value-type="float" office:value="70.599999999999994" table:style-name="ce6">
            <text:p>70.6</text:p>
          </table:table-cell>
          <table:table-cell office:value-type="float" office:value="189.2" table:style-name="ce6">
            <text:p>189.2</text:p>
          </table:table-cell>
          <table:table-cell office:value-type="float" office:value="3.28" table:style-name="ce6">
            <text:p>3.28</text:p>
          </table:table-cell>
          <table:table-cell office:value-type="float" office:value="18.5" table:style-name="ce6">
            <text:p>18.5</text:p>
          </table:table-cell>
          <table:table-cell office:value-type="date" office:date-value="2012-11-09T00:00:00" table:style-name="ce7">
            <text:p>11/9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aab</text:p>
          </table:table-cell>
          <table:table-cell office:value-type="string" table:style-name="ce8">
            <text:p>9-3</text:p>
          </table:table-cell>
          <table:table-cell office:value-type="float" office:value="12115" table:style-name="ce11">
            <text:p>12115</text:p>
          </table:table-cell>
          <table:table-cell office:value-type="currency" office:value="26100" table:style-name="ce12">
            <text:p>$26,100</text:p>
          </table:table-cell>
          <table:table-cell office:value-type="currency" office:value="18255" table:style-name="ce12">
            <text:p>$18,255</text:p>
          </table:table-cell>
          <table:table-cell office:value-type="percentage" office:value="0.69942528735632181" table:formula="of:=SUM([.E128]/[.D128])" table:style-name="ce13">
            <text:p>70%</text:p>
          </table:table-cell>
          <table:table-cell office:value-type="string" office:string-value="GOOD" table:formula="of:=IF([.F128]&gt;69%; &quot;GOOD&quot;; &quot;POOR&quot;)" table:style-name="ce20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85" table:style-name="ce6">
            <text:p>185</text:p>
          </table:table-cell>
          <table:table-cell office:value-type="string" office:string-value="Medium HP" table:formula="of:=COM.MICROSOFT.IFS([.I128]&gt;299;&quot;High HP&quot;;[.I128]&gt;99;&quot;Medium HP&quot;;[.I12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76.02304771" table:style-name="ce6">
            <text:p>76.02304771</text:p>
          </table:table-cell>
          <table:table-cell office:value-type="float" office:value="102.6" table:style-name="ce6">
            <text:p>102.6</text:p>
          </table:table-cell>
          <table:table-cell office:value-type="float" office:value="67.400000000000006" table:style-name="ce6">
            <text:p>67.4</text:p>
          </table:table-cell>
          <table:table-cell office:value-type="float" office:value="182.2" table:style-name="ce6">
            <text:p>182.2</text:p>
          </table:table-cell>
          <table:table-cell office:value-type="float" office:value="2.99" table:style-name="ce6">
            <text:p>2.99</text:p>
          </table:table-cell>
          <table:table-cell office:value-type="float" office:value="16.899999999999999" table:style-name="ce6">
            <text:p>16.9</text:p>
          </table:table-cell>
          <table:table-cell office:value-type="date" office:date-value="2011-06-12T00:00:00" table:style-name="ce7">
            <text:p>6/12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aturn</text:p>
          </table:table-cell>
          <table:table-cell office:value-type="string" table:style-name="ce5">
            <text:p>SL</text:p>
          </table:table-cell>
          <table:table-cell office:value-type="float" office:value="80620" table:style-name="ce11">
            <text:p>80620</text:p>
          </table:table-cell>
          <table:table-cell office:value-type="currency" office:value="10685" table:style-name="ce12">
            <text:p>$10,685</text:p>
          </table:table-cell>
          <table:table-cell office:value-type="currency" office:value="9200" table:style-name="ce12">
            <text:p>$9,200</text:p>
          </table:table-cell>
          <table:table-cell office:value-type="percentage" office:value="0.86102012166588671" table:formula="of:=SUM([.E129]/[.D129])" table:style-name="ce13">
            <text:p>86%</text:p>
          </table:table-cell>
          <table:table-cell office:value-type="string" office:string-value="GOOD" table:formula="of:=IF([.F129]&gt;69%; &quot;GOOD&quot;; &quot;POOR&quot;)" table:style-name="ce20">
            <text:p>GOOD</text:p>
          </table:table-cell>
          <table:table-cell office:value-type="float" office:value="1.9" table:style-name="ce6">
            <text:p>1.9</text:p>
          </table:table-cell>
          <table:table-cell office:value-type="float" office:value="100" table:style-name="ce6">
            <text:p>100</text:p>
          </table:table-cell>
          <table:table-cell office:value-type="string" office:string-value="Medium HP" table:formula="of:=COM.MICROSOFT.IFS([.I129]&gt;299;&quot;High HP&quot;;[.I129]&gt;99;&quot;Medium HP&quot;;[.I12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3" table:style-name="ce6">
            <text:p>33</text:p>
          </table:table-cell>
          <table:table-cell office:value-type="float" office:value="39.986424749999998" table:style-name="ce6">
            <text:p>39.98642475</text:p>
          </table:table-cell>
          <table:table-cell office:value-type="float" office:value="102.4" table:style-name="ce6">
            <text:p>102.4</text:p>
          </table:table-cell>
          <table:table-cell office:value-type="float" office:value="66.400000000000006" table:style-name="ce6">
            <text:p>66.4</text:p>
          </table:table-cell>
          <table:table-cell office:value-type="float" office:value="176.9" table:style-name="ce6">
            <text:p>176.9</text:p>
          </table:table-cell>
          <table:table-cell office:value-type="float" office:value="2.3319999999999999" table:style-name="ce6">
            <text:p>2.332</text:p>
          </table:table-cell>
          <table:table-cell office:value-type="float" office:value="12.1" table:style-name="ce6">
            <text:p>12.1</text:p>
          </table:table-cell>
          <table:table-cell office:value-type="date" office:date-value="2012-08-16T00:00:00" table:style-name="ce7">
            <text:p>8/16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aturn</text:p>
          </table:table-cell>
          <table:table-cell office:value-type="string" table:style-name="ce5">
            <text:p>SC</text:p>
          </table:table-cell>
          <table:table-cell office:value-type="float" office:value="24546" table:style-name="ce11">
            <text:p>24546</text:p>
          </table:table-cell>
          <table:table-cell office:value-type="currency" office:value="12535" table:style-name="ce12">
            <text:p>$12,535</text:p>
          </table:table-cell>
          <table:table-cell office:value-type="currency" office:value="10590" table:style-name="ce12">
            <text:p>$10,590</text:p>
          </table:table-cell>
          <table:table-cell office:value-type="percentage" office:value="0.84483446350219382" table:formula="of:=SUM([.E130]/[.D130])" table:style-name="ce13">
            <text:p>84%</text:p>
          </table:table-cell>
          <table:table-cell office:value-type="string" office:string-value="GOOD" table:formula="of:=IF([.F130]&gt;69%; &quot;GOOD&quot;; &quot;POOR&quot;)" table:style-name="ce20">
            <text:p>GOOD</text:p>
          </table:table-cell>
          <table:table-cell office:value-type="float" office:value="1.9" table:style-name="ce6">
            <text:p>1.9</text:p>
          </table:table-cell>
          <table:table-cell office:value-type="float" office:value="100" table:style-name="ce6">
            <text:p>100</text:p>
          </table:table-cell>
          <table:table-cell office:value-type="string" office:string-value="Medium HP" table:formula="of:=COM.MICROSOFT.IFS([.I130]&gt;299;&quot;High HP&quot;;[.I130]&gt;99;&quot;Medium HP&quot;;[.I13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3" table:style-name="ce6">
            <text:p>33</text:p>
          </table:table-cell>
          <table:table-cell office:value-type="float" office:value="40.700072419999998" table:style-name="ce6">
            <text:p>40.70007242</text:p>
          </table:table-cell>
          <table:table-cell office:value-type="float" office:value="102.4" table:style-name="ce6">
            <text:p>102.4</text:p>
          </table:table-cell>
          <table:table-cell office:value-type="float" office:value="66.400000000000006" table:style-name="ce6">
            <text:p>66.4</text:p>
          </table:table-cell>
          <table:table-cell office:value-type="float" office:value="180" table:style-name="ce6">
            <text:p>180</text:p>
          </table:table-cell>
          <table:table-cell office:value-type="float" office:value="2.367" table:style-name="ce6">
            <text:p>2.367</text:p>
          </table:table-cell>
          <table:table-cell office:value-type="float" office:value="12.1" table:style-name="ce6">
            <text:p>12.1</text:p>
          </table:table-cell>
          <table:table-cell office:value-type="date" office:date-value="2011-03-16T00:00:00" table:style-name="ce7">
            <text:p>3/16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aturn</text:p>
          </table:table-cell>
          <table:table-cell office:value-type="string" table:style-name="ce5">
            <text:p>SW</text:p>
          </table:table-cell>
          <table:table-cell office:value-type="float" office:value="5223" table:style-name="ce11">
            <text:p>5223</text:p>
          </table:table-cell>
          <table:table-cell office:value-type="currency" office:value="14290" table:style-name="ce12">
            <text:p>$14,290</text:p>
          </table:table-cell>
          <table:table-cell office:value-type="currency" office:value="10790" table:style-name="ce12">
            <text:p>$10,790</text:p>
          </table:table-cell>
          <table:table-cell office:value-type="percentage" office:value="0.75507347795661306" table:formula="of:=SUM([.E131]/[.D131])" table:style-name="ce13">
            <text:p>76%</text:p>
          </table:table-cell>
          <table:table-cell office:value-type="string" office:string-value="GOOD" table:formula="of:=IF([.F131]&gt;69%; &quot;GOOD&quot;; &quot;POOR&quot;)" table:style-name="ce20">
            <text:p>GOOD</text:p>
          </table:table-cell>
          <table:table-cell office:value-type="float" office:value="1.9" table:style-name="ce6">
            <text:p>1.9</text:p>
          </table:table-cell>
          <table:table-cell office:value-type="float" office:value="124" table:style-name="ce6">
            <text:p>124</text:p>
          </table:table-cell>
          <table:table-cell office:value-type="string" office:string-value="Medium HP" table:formula="of:=COM.MICROSOFT.IFS([.I131]&gt;299;&quot;High HP&quot;;[.I131]&gt;99;&quot;Medium HP&quot;;[.I13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1" table:style-name="ce6">
            <text:p>31</text:p>
          </table:table-cell>
          <table:table-cell office:value-type="float" office:value="49.865773670000003" table:style-name="ce6">
            <text:p>49.86577367</text:p>
          </table:table-cell>
          <table:table-cell office:value-type="float" office:value="102.4" table:style-name="ce6">
            <text:p>102.4</text:p>
          </table:table-cell>
          <table:table-cell office:value-type="float" office:value="66.400000000000006" table:style-name="ce6">
            <text:p>66.4</text:p>
          </table:table-cell>
          <table:table-cell office:value-type="float" office:value="176.9" table:style-name="ce6">
            <text:p>176.9</text:p>
          </table:table-cell>
          <table:table-cell office:value-type="float" office:value="2.452" table:style-name="ce6">
            <text:p>2.452</text:p>
          </table:table-cell>
          <table:table-cell office:value-type="float" office:value="12.1" table:style-name="ce6">
            <text:p>12.1</text:p>
          </table:table-cell>
          <table:table-cell office:value-type="date" office:date-value="2011-01-15T00:00:00" table:style-name="ce7">
            <text:p>1/15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aturn</text:p>
          </table:table-cell>
          <table:table-cell office:value-type="string" table:style-name="ce5">
            <text:p>LW</text:p>
          </table:table-cell>
          <table:table-cell office:value-type="float" office:value="8472" table:style-name="ce11">
            <text:p>8472</text:p>
          </table:table-cell>
          <table:table-cell office:value-type="currency" office:value="18835" table:style-name="ce12">
            <text:p>$18,835</text:p>
          </table:table-cell>
          <table:table-cell office:value-type="currency" office:value="13700" table:style-name="ce12">
            <text:p>$13,700</text:p>
          </table:table-cell>
          <table:table-cell office:value-type="percentage" office:value="0.72736925935757901" table:formula="of:=SUM([.E132]/[.D132])" table:style-name="ce13">
            <text:p>73%</text:p>
          </table:table-cell>
          <table:table-cell office:value-type="string" office:string-value="GOOD" table:formula="of:=IF([.F132]&gt;69%; &quot;GOOD&quot;; &quot;POOR&quot;)" table:style-name="ce20">
            <text:p>GOOD</text:p>
          </table:table-cell>
          <table:table-cell office:value-type="float" office:value="2.2000000000000002" table:style-name="ce6">
            <text:p>2.2</text:p>
          </table:table-cell>
          <table:table-cell office:value-type="float" office:value="137" table:style-name="ce6">
            <text:p>137</text:p>
          </table:table-cell>
          <table:table-cell office:value-type="string" office:string-value="Medium HP" table:formula="of:=COM.MICROSOFT.IFS([.I132]&gt;299;&quot;High HP&quot;;[.I132]&gt;99;&quot;Medium HP&quot;;[.I13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56.295243040000003" table:style-name="ce6">
            <text:p>56.29524304</text:p>
          </table:table-cell>
          <table:table-cell office:value-type="float" office:value="106.5" table:style-name="ce6">
            <text:p>106.5</text:p>
          </table:table-cell>
          <table:table-cell office:value-type="float" office:value="69" table:style-name="ce6">
            <text:p>69</text:p>
          </table:table-cell>
          <table:table-cell office:value-type="float" office:value="190.4" table:style-name="ce6">
            <text:p>190.4</text:p>
          </table:table-cell>
          <table:table-cell office:value-type="float" office:value="3.0750000000000002" table:style-name="ce6">
            <text:p>3.075</text:p>
          </table:table-cell>
          <table:table-cell office:value-type="float" office:value="13.1" table:style-name="ce6">
            <text:p>13.1</text:p>
          </table:table-cell>
          <table:table-cell office:value-type="date" office:date-value="2011-08-05T00:00:00" table:style-name="ce7">
            <text:p>8/5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aturn</text:p>
          </table:table-cell>
          <table:table-cell office:value-type="string" table:style-name="ce5">
            <text:p>LS</text:p>
          </table:table-cell>
          <table:table-cell office:value-type="float" office:value="49989" table:style-name="ce11">
            <text:p>49989</text:p>
          </table:table-cell>
          <table:table-cell office:value-type="currency" office:value="15010" table:style-name="ce12">
            <text:p>$15,010</text:p>
          </table:table-cell>
          <table:table-cell office:value-type="currency" office:value="9900" table:style-name="ce12">
            <text:p>$9,900</text:p>
          </table:table-cell>
          <table:table-cell office:value-type="percentage" office:value="0.65956029313790809" table:formula="of:=SUM([.E133]/[.D133])" table:style-name="ce13">
            <text:p>66%</text:p>
          </table:table-cell>
          <table:table-cell office:value-type="string" office:string-value="POOR" table:formula="of:=IF([.F133]&gt;69%; &quot;GOOD&quot;; &quot;POOR&quot;)" table:style-name="ce20">
            <text:p>POOR</text:p>
          </table:table-cell>
          <table:table-cell office:value-type="float" office:value="2.2000000000000002" table:style-name="ce6">
            <text:p>2.2</text:p>
          </table:table-cell>
          <table:table-cell office:value-type="float" office:value="137" table:style-name="ce6">
            <text:p>137</text:p>
          </table:table-cell>
          <table:table-cell office:value-type="string" office:string-value="Medium HP" table:formula="of:=COM.MICROSOFT.IFS([.I133]&gt;299;&quot;High HP&quot;;[.I133]&gt;99;&quot;Medium HP&quot;;[.I13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8" table:style-name="ce6">
            <text:p>28</text:p>
          </table:table-cell>
          <table:table-cell office:value-type="float" office:value="54.819728249999997" table:style-name="ce6">
            <text:p>54.81972825</text:p>
          </table:table-cell>
          <table:table-cell office:value-type="float" office:value="106.5" table:style-name="ce6">
            <text:p>106.5</text:p>
          </table:table-cell>
          <table:table-cell office:value-type="float" office:value="69" table:style-name="ce6">
            <text:p>69</text:p>
          </table:table-cell>
          <table:table-cell office:value-type="float" office:value="190.4" table:style-name="ce6">
            <text:p>190.4</text:p>
          </table:table-cell>
          <table:table-cell office:value-type="float" office:value="2.91" table:style-name="ce6">
            <text:p>2.91</text:p>
          </table:table-cell>
          <table:table-cell office:value-type="float" office:value="13.1" table:style-name="ce6">
            <text:p>13.1</text:p>
          </table:table-cell>
          <table:table-cell office:value-type="date" office:date-value="2012-12-04T00:00:00" table:style-name="ce7">
            <text:p>12/4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ubaru</text:p>
          </table:table-cell>
          <table:table-cell office:value-type="string" table:style-name="ce5">
            <text:p>Outback</text:p>
          </table:table-cell>
          <table:table-cell office:value-type="float" office:value="47107" table:style-name="ce11">
            <text:p>47107</text:p>
          </table:table-cell>
          <table:table-cell office:value-type="currency" office:value="22695" table:style-name="ce12">
            <text:p>$22,695</text:p>
          </table:table-cell>
          <table:table-cell office:value-type="currency" office:value="16770" table:style-name="ce12">
            <text:p>$16,770</text:p>
          </table:table-cell>
          <table:table-cell office:value-type="percentage" office:value="0.73892927957699939" table:formula="of:=SUM([.E134]/[.D134])" table:style-name="ce13">
            <text:p>74%</text:p>
          </table:table-cell>
          <table:table-cell office:value-type="string" office:string-value="GOOD" table:formula="of:=IF([.F134]&gt;69%; &quot;GOOD&quot;; &quot;POOR&quot;)" table:style-name="ce20">
            <text:p>GOOD</text:p>
          </table:table-cell>
          <table:table-cell office:value-type="float" office:value="2.5" table:style-name="ce6">
            <text:p>2.5</text:p>
          </table:table-cell>
          <table:table-cell office:value-type="float" office:value="165" table:style-name="ce6">
            <text:p>165</text:p>
          </table:table-cell>
          <table:table-cell office:value-type="string" office:string-value="Medium HP" table:formula="of:=COM.MICROSOFT.IFS([.I134]&gt;299;&quot;High HP&quot;;[.I134]&gt;99;&quot;Medium HP&quot;;[.I13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67.765907600000006" table:style-name="ce6">
            <text:p>67.7659076</text:p>
          </table:table-cell>
          <table:table-cell office:value-type="float" office:value="103.5" table:style-name="ce6">
            <text:p>103.5</text:p>
          </table:table-cell>
          <table:table-cell office:value-type="float" office:value="67.5" table:style-name="ce6">
            <text:p>67.5</text:p>
          </table:table-cell>
          <table:table-cell office:value-type="float" office:value="185.8" table:style-name="ce6">
            <text:p>185.8</text:p>
          </table:table-cell>
          <table:table-cell office:value-type="float" office:value="3.415" table:style-name="ce6">
            <text:p>3.415</text:p>
          </table:table-cell>
          <table:table-cell office:value-type="float" office:value="16.899999999999999" table:style-name="ce6">
            <text:p>16.9</text:p>
          </table:table-cell>
          <table:table-cell office:value-type="date" office:date-value="2011-07-07T00:00:00" table:style-name="ce7">
            <text:p>7/7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ubaru</text:p>
          </table:table-cell>
          <table:table-cell office:value-type="string" table:style-name="ce5">
            <text:p>Forester</text:p>
          </table:table-cell>
          <table:table-cell office:value-type="float" office:value="33028" table:style-name="ce11">
            <text:p>33028</text:p>
          </table:table-cell>
          <table:table-cell office:value-type="currency" office:value="20095" table:style-name="ce12">
            <text:p>$20,095</text:p>
          </table:table-cell>
          <table:table-cell office:value-type="currency" office:value="14832" table:style-name="ce12">
            <text:p>$14,832</text:p>
          </table:table-cell>
          <table:table-cell office:value-type="percentage" office:value="0.73809405324707644" table:formula="of:=SUM([.E135]/[.D135])" table:style-name="ce13">
            <text:p>74%</text:p>
          </table:table-cell>
          <table:table-cell office:value-type="string" office:string-value="GOOD" table:formula="of:=IF([.F135]&gt;69%; &quot;GOOD&quot;; &quot;POOR&quot;)" table:style-name="ce20">
            <text:p>GOOD</text:p>
          </table:table-cell>
          <table:table-cell office:value-type="float" office:value="2.5" table:style-name="ce6">
            <text:p>2.5</text:p>
          </table:table-cell>
          <table:table-cell office:value-type="float" office:value="165" table:style-name="ce6">
            <text:p>165</text:p>
          </table:table-cell>
          <table:table-cell office:value-type="string" office:string-value="Medium HP" table:formula="of:=COM.MICROSOFT.IFS([.I135]&gt;299;&quot;High HP&quot;;[.I135]&gt;99;&quot;Medium HP&quot;;[.I13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4" table:style-name="ce6">
            <text:p>24</text:p>
          </table:table-cell>
          <table:table-cell office:value-type="float" office:value="66.762943309999997" table:style-name="ce6">
            <text:p>66.76294331</text:p>
          </table:table-cell>
          <table:table-cell office:value-type="float" office:value="99.4" table:style-name="ce6">
            <text:p>99.4</text:p>
          </table:table-cell>
          <table:table-cell office:value-type="float" office:value="68.3" table:style-name="ce6">
            <text:p>68.3</text:p>
          </table:table-cell>
          <table:table-cell office:value-type="float" office:value="175.2" table:style-name="ce6">
            <text:p>175.2</text:p>
          </table:table-cell>
          <table:table-cell office:value-type="float" office:value="3.125" table:style-name="ce6">
            <text:p>3.125</text:p>
          </table:table-cell>
          <table:table-cell office:value-type="float" office:value="15.9" table:style-name="ce6">
            <text:p>15.9</text:p>
          </table:table-cell>
          <table:table-cell office:value-type="date" office:date-value="2012-09-10T00:00:00" table:style-name="ce7">
            <text:p>9/10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Corolla</text:p>
          </table:table-cell>
          <table:table-cell office:value-type="float" office:value="142535" table:style-name="ce11">
            <text:p>142535</text:p>
          </table:table-cell>
          <table:table-cell office:value-type="currency" office:value="13108" table:style-name="ce12">
            <text:p>$13,108</text:p>
          </table:table-cell>
          <table:table-cell office:value-type="currency" office:value="10025" table:style-name="ce12">
            <text:p>$10,025</text:p>
          </table:table-cell>
          <table:table-cell office:value-type="percentage" office:value="0.76480012206286241" table:formula="of:=SUM([.E136]/[.D136])" table:style-name="ce13">
            <text:p>76%</text:p>
          </table:table-cell>
          <table:table-cell office:value-type="string" office:string-value="GOOD" table:formula="of:=IF([.F136]&gt;69%; &quot;GOOD&quot;; &quot;POOR&quot;)" table:style-name="ce20">
            <text:p>GOOD</text:p>
          </table:table-cell>
          <table:table-cell office:value-type="float" office:value="1.8" table:style-name="ce6">
            <text:p>1.8</text:p>
          </table:table-cell>
          <table:table-cell office:value-type="float" office:value="120" table:style-name="ce6">
            <text:p>120</text:p>
          </table:table-cell>
          <table:table-cell office:value-type="string" office:string-value="Medium HP" table:formula="of:=COM.MICROSOFT.IFS([.I136]&gt;299;&quot;High HP&quot;;[.I136]&gt;99;&quot;Medium HP&quot;;[.I13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3" table:style-name="ce6">
            <text:p>33</text:p>
          </table:table-cell>
          <table:table-cell office:value-type="float" office:value="47.96897242" table:style-name="ce6">
            <text:p>47.96897242</text:p>
          </table:table-cell>
          <table:table-cell office:value-type="float" office:value="97" table:style-name="ce6">
            <text:p>97</text:p>
          </table:table-cell>
          <table:table-cell office:value-type="float" office:value="66.7" table:style-name="ce6">
            <text:p>66.7</text:p>
          </table:table-cell>
          <table:table-cell office:value-type="float" office:value="174" table:style-name="ce6">
            <text:p>174</text:p>
          </table:table-cell>
          <table:table-cell office:value-type="float" office:value="2.42" table:style-name="ce6">
            <text:p>2.42</text:p>
          </table:table-cell>
          <table:table-cell office:value-type="float" office:value="13.2" table:style-name="ce6">
            <text:p>13.2</text:p>
          </table:table-cell>
          <table:table-cell office:value-type="date" office:date-value="2011-04-11T00:00:00" table:style-name="ce7">
            <text:p>4/1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Camry</text:p>
          </table:table-cell>
          <table:table-cell office:value-type="float" office:value="247994" table:style-name="ce11">
            <text:p>247994</text:p>
          </table:table-cell>
          <table:table-cell office:value-type="currency" office:value="17518" table:style-name="ce12">
            <text:p>$17,518</text:p>
          </table:table-cell>
          <table:table-cell office:value-type="currency" office:value="13245" table:style-name="ce12">
            <text:p>$13,245</text:p>
          </table:table-cell>
          <table:table-cell office:value-type="percentage" office:value="0.75607946112569924" table:formula="of:=SUM([.E137]/[.D137])" table:style-name="ce13">
            <text:p>76%</text:p>
          </table:table-cell>
          <table:table-cell office:value-type="string" office:string-value="GOOD" table:formula="of:=IF([.F137]&gt;69%; &quot;GOOD&quot;; &quot;POOR&quot;)" table:style-name="ce20">
            <text:p>GOOD</text:p>
          </table:table-cell>
          <table:table-cell office:value-type="float" office:value="2.2000000000000002" table:style-name="ce6">
            <text:p>2.2</text:p>
          </table:table-cell>
          <table:table-cell office:value-type="float" office:value="133" table:style-name="ce6">
            <text:p>133</text:p>
          </table:table-cell>
          <table:table-cell office:value-type="string" office:string-value="Medium HP" table:formula="of:=COM.MICROSOFT.IFS([.I137]&gt;299;&quot;High HP&quot;;[.I137]&gt;99;&quot;Medium HP&quot;;[.I13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54.372419649999998" table:style-name="ce6">
            <text:p>54.37241965</text:p>
          </table:table-cell>
          <table:table-cell office:value-type="float" office:value="105.2" table:style-name="ce6">
            <text:p>105.2</text:p>
          </table:table-cell>
          <table:table-cell office:value-type="float" office:value="70.099999999999994" table:style-name="ce6">
            <text:p>70.1</text:p>
          </table:table-cell>
          <table:table-cell office:value-type="float" office:value="188.5" table:style-name="ce6">
            <text:p>188.5</text:p>
          </table:table-cell>
          <table:table-cell office:value-type="float" office:value="2.9980000000000002" table:style-name="ce6">
            <text:p>2.998</text:p>
          </table:table-cell>
          <table:table-cell office:value-type="float" office:value="18.5" table:style-name="ce6">
            <text:p>18.5</text:p>
          </table:table-cell>
          <table:table-cell office:value-type="date" office:date-value="2011-02-10T00:00:00" table:style-name="ce7">
            <text:p>2/10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Avalon</text:p>
          </table:table-cell>
          <table:table-cell office:value-type="float" office:value="63849" table:style-name="ce11">
            <text:p>63849</text:p>
          </table:table-cell>
          <table:table-cell office:value-type="currency" office:value="25545" table:style-name="ce12">
            <text:p>$25,545</text:p>
          </table:table-cell>
          <table:table-cell office:value-type="currency" office:value="18140" table:style-name="ce12">
            <text:p>$18,140</text:p>
          </table:table-cell>
          <table:table-cell office:value-type="percentage" office:value="0.71011939714229788" table:formula="of:=SUM([.E138]/[.D138])" table:style-name="ce13">
            <text:p>71%</text:p>
          </table:table-cell>
          <table:table-cell office:value-type="string" office:string-value="GOOD" table:formula="of:=IF([.F138]&gt;69%; &quot;GOOD&quot;; &quot;POOR&quot;)" table:style-name="ce20">
            <text:p>GOOD</text:p>
          </table:table-cell>
          <table:table-cell office:value-type="float" office:value="3" table:style-name="ce6">
            <text:p>3</text:p>
          </table:table-cell>
          <table:table-cell office:value-type="float" office:value="210" table:style-name="ce6">
            <text:p>210</text:p>
          </table:table-cell>
          <table:table-cell office:value-type="string" office:string-value="Medium HP" table:formula="of:=COM.MICROSOFT.IFS([.I138]&gt;299;&quot;High HP&quot;;[.I138]&gt;99;&quot;Medium HP&quot;;[.I13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84.911898260000001" table:style-name="ce6">
            <text:p>84.91189826</text:p>
          </table:table-cell>
          <table:table-cell office:value-type="float" office:value="107.1" table:style-name="ce6">
            <text:p>107.1</text:p>
          </table:table-cell>
          <table:table-cell office:value-type="float" office:value="71.7" table:style-name="ce6">
            <text:p>71.7</text:p>
          </table:table-cell>
          <table:table-cell office:value-type="float" office:value="191.9" table:style-name="ce6">
            <text:p>191.9</text:p>
          </table:table-cell>
          <table:table-cell office:value-type="float" office:value="3.4169999999999998" table:style-name="ce6">
            <text:p>3.417</text:p>
          </table:table-cell>
          <table:table-cell office:value-type="float" office:value="18.5" table:style-name="ce6">
            <text:p>18.5</text:p>
          </table:table-cell>
          <table:table-cell office:value-type="date" office:date-value="2011-08-31T00:00:00" table:style-name="ce7">
            <text:p>8/3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Celica</text:p>
          </table:table-cell>
          <table:table-cell office:value-type="float" office:value="33269" table:style-name="ce11">
            <text:p>33269</text:p>
          </table:table-cell>
          <table:table-cell office:value-type="currency" office:value="16875" table:style-name="ce12">
            <text:p>$16,875</text:p>
          </table:table-cell>
          <table:table-cell office:value-type="currency" office:value="15445" table:style-name="ce12">
            <text:p>$15,445</text:p>
          </table:table-cell>
          <table:table-cell office:value-type="percentage" office:value="0.91525925925925922" table:formula="of:=SUM([.E139]/[.D139])" table:style-name="ce13">
            <text:p>92%</text:p>
          </table:table-cell>
          <table:table-cell office:value-type="string" office:string-value="GOOD" table:formula="of:=IF([.F139]&gt;69%; &quot;GOOD&quot;; &quot;POOR&quot;)" table:style-name="ce20">
            <text:p>GOOD</text:p>
          </table:table-cell>
          <table:table-cell office:value-type="float" office:value="1.8" table:style-name="ce6">
            <text:p>1.8</text:p>
          </table:table-cell>
          <table:table-cell office:value-type="float" office:value="140" table:style-name="ce6">
            <text:p>140</text:p>
          </table:table-cell>
          <table:table-cell office:value-type="string" office:string-value="Medium HP" table:formula="of:=COM.MICROSOFT.IFS([.I139]&gt;299;&quot;High HP&quot;;[.I139]&gt;99;&quot;Medium HP&quot;;[.I13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1" table:style-name="ce6">
            <text:p>31</text:p>
          </table:table-cell>
          <table:table-cell office:value-type="float" office:value="56.496030339999997" table:style-name="ce6">
            <text:p>56.49603034</text:p>
          </table:table-cell>
          <table:table-cell office:value-type="float" office:value="102.4" table:style-name="ce6">
            <text:p>102.4</text:p>
          </table:table-cell>
          <table:table-cell office:value-type="float" office:value="68.3" table:style-name="ce6">
            <text:p>68.3</text:p>
          </table:table-cell>
          <table:table-cell office:value-type="float" office:value="170.5" table:style-name="ce6">
            <text:p>170.5</text:p>
          </table:table-cell>
          <table:table-cell office:value-type="float" office:value="2.4249999999999998" table:style-name="ce6">
            <text:p>2.425</text:p>
          </table:table-cell>
          <table:table-cell office:value-type="float" office:value="14.5" table:style-name="ce6">
            <text:p>14.5</text:p>
          </table:table-cell>
          <table:table-cell office:value-type="date" office:date-value="2012-12-29T00:00:00" table:style-name="ce7">
            <text:p>12/29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Tacoma</text:p>
          </table:table-cell>
          <table:table-cell office:value-type="float" office:value="84087" table:style-name="ce11">
            <text:p>84087</text:p>
          </table:table-cell>
          <table:table-cell office:value-type="currency" office:value="11528" table:style-name="ce12">
            <text:p>$11,528</text:p>
          </table:table-cell>
          <table:table-cell office:value-type="currency" office:value="9575" table:style-name="ce12">
            <text:p>$9,575</text:p>
          </table:table-cell>
          <table:table-cell office:value-type="percentage" office:value="0.83058639833448988" table:formula="of:=SUM([.E140]/[.D140])" table:style-name="ce13">
            <text:p>83%</text:p>
          </table:table-cell>
          <table:table-cell office:value-type="string" office:string-value="GOOD" table:formula="of:=IF([.F140]&gt;69%; &quot;GOOD&quot;; &quot;POOR&quot;)" table:style-name="ce20">
            <text:p>GOOD</text:p>
          </table:table-cell>
          <table:table-cell office:value-type="float" office:value="2.4" table:style-name="ce6">
            <text:p>2.4</text:p>
          </table:table-cell>
          <table:table-cell office:value-type="float" office:value="142" table:style-name="ce6">
            <text:p>142</text:p>
          </table:table-cell>
          <table:table-cell office:value-type="string" office:string-value="Medium HP" table:formula="of:=COM.MICROSOFT.IFS([.I140]&gt;299;&quot;High HP&quot;;[.I140]&gt;99;&quot;Medium HP&quot;;[.I14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3" table:style-name="ce6">
            <text:p>23</text:p>
          </table:table-cell>
          <table:table-cell office:value-type="float" office:value="55.297116580000001" table:style-name="ce6">
            <text:p>55.29711658</text:p>
          </table:table-cell>
          <table:table-cell office:value-type="float" office:value="103.3" table:style-name="ce6">
            <text:p>103.3</text:p>
          </table:table-cell>
          <table:table-cell office:value-type="float" office:value="66.5" table:style-name="ce6">
            <text:p>66.5</text:p>
          </table:table-cell>
          <table:table-cell office:value-type="float" office:value="178.7" table:style-name="ce6">
            <text:p>178.7</text:p>
          </table:table-cell>
          <table:table-cell office:value-type="float" office:value="2.58" table:style-name="ce6">
            <text:p>2.58</text:p>
          </table:table-cell>
          <table:table-cell office:value-type="float" office:value="15.1" table:style-name="ce6">
            <text:p>15.1</text:p>
          </table:table-cell>
          <table:table-cell office:value-type="date" office:date-value="2011-08-01T00:00:00" table:style-name="ce7">
            <text:p>8/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Sienna</text:p>
          </table:table-cell>
          <table:table-cell office:value-type="float" office:value="65119" table:style-name="ce11">
            <text:p>65119</text:p>
          </table:table-cell>
          <table:table-cell office:value-type="currency" office:value="22368" table:style-name="ce12">
            <text:p>$22,368</text:p>
          </table:table-cell>
          <table:table-cell office:value-type="currency" office:value="18689" table:style-name="ce12">
            <text:p>$18,689</text:p>
          </table:table-cell>
          <table:table-cell office:value-type="percentage" office:value="0.83552396280400576" table:formula="of:=SUM([.E141]/[.D141])" table:style-name="ce13">
            <text:p>84%</text:p>
          </table:table-cell>
          <table:table-cell office:value-type="string" office:string-value="GOOD" table:formula="of:=IF([.F141]&gt;69%; &quot;GOOD&quot;; &quot;POOR&quot;)" table:style-name="ce20">
            <text:p>GOOD</text:p>
          </table:table-cell>
          <table:table-cell office:value-type="float" office:value="3" table:style-name="ce6">
            <text:p>3</text:p>
          </table:table-cell>
          <table:table-cell office:value-type="float" office:value="194" table:style-name="ce6">
            <text:p>194</text:p>
          </table:table-cell>
          <table:table-cell office:value-type="string" office:string-value="Medium HP" table:formula="of:=COM.MICROSOFT.IFS([.I141]&gt;299;&quot;High HP&quot;;[.I141]&gt;99;&quot;Medium HP&quot;;[.I14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2" table:style-name="ce6">
            <text:p>22</text:p>
          </table:table-cell>
          <table:table-cell office:value-type="float" office:value="78.027219470000006" table:style-name="ce6">
            <text:p>78.02721947</text:p>
          </table:table-cell>
          <table:table-cell office:value-type="float" office:value="114.2" table:style-name="ce6">
            <text:p>114.2</text:p>
          </table:table-cell>
          <table:table-cell office:value-type="float" office:value="73.400000000000006" table:style-name="ce6">
            <text:p>73.4</text:p>
          </table:table-cell>
          <table:table-cell office:value-type="float" office:value="193.5" table:style-name="ce6">
            <text:p>193.5</text:p>
          </table:table-cell>
          <table:table-cell office:value-type="float" office:value="3.7589999999999999" table:style-name="ce6">
            <text:p>3.759</text:p>
          </table:table-cell>
          <table:table-cell office:value-type="float" office:value="20.9" table:style-name="ce6">
            <text:p>20.9</text:p>
          </table:table-cell>
          <table:table-cell office:value-type="date" office:date-value="2012-10-05T00:00:00" table:style-name="ce7">
            <text:p>10/5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RAV4</text:p>
          </table:table-cell>
          <table:table-cell office:value-type="float" office:value="25106" table:style-name="ce11">
            <text:p>25106</text:p>
          </table:table-cell>
          <table:table-cell office:value-type="currency" office:value="16888" table:style-name="ce12">
            <text:p>$16,888</text:p>
          </table:table-cell>
          <table:table-cell office:value-type="currency" office:value="13325" table:style-name="ce12">
            <text:p>$13,325</text:p>
          </table:table-cell>
          <table:table-cell office:value-type="percentage" office:value="0.78902179062055899" table:formula="of:=SUM([.E142]/[.D142])" table:style-name="ce13">
            <text:p>79%</text:p>
          </table:table-cell>
          <table:table-cell office:value-type="string" office:string-value="GOOD" table:formula="of:=IF([.F142]&gt;69%; &quot;GOOD&quot;; &quot;POOR&quot;)" table:style-name="ce20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27" table:style-name="ce6">
            <text:p>127</text:p>
          </table:table-cell>
          <table:table-cell office:value-type="string" office:string-value="Medium HP" table:formula="of:=COM.MICROSOFT.IFS([.I142]&gt;299;&quot;High HP&quot;;[.I142]&gt;99;&quot;Medium HP&quot;;[.I14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7" table:style-name="ce6">
            <text:p>27</text:p>
          </table:table-cell>
          <table:table-cell office:value-type="float" office:value="51.955108869999997" table:style-name="ce6">
            <text:p>51.95510887</text:p>
          </table:table-cell>
          <table:table-cell office:value-type="float" office:value="94.9" table:style-name="ce6">
            <text:p>94.9</text:p>
          </table:table-cell>
          <table:table-cell office:value-type="float" office:value="66.7" table:style-name="ce6">
            <text:p>66.7</text:p>
          </table:table-cell>
          <table:table-cell office:value-type="float" office:value="163.80000000000001" table:style-name="ce6">
            <text:p>163.8</text:p>
          </table:table-cell>
          <table:table-cell office:value-type="float" office:value="2.6680000000000001" table:style-name="ce6">
            <text:p>2.668</text:p>
          </table:table-cell>
          <table:table-cell office:value-type="float" office:value="15.3" table:style-name="ce6">
            <text:p>15.3</text:p>
          </table:table-cell>
          <table:table-cell office:value-type="date" office:date-value="2011-05-06T00:00:00" table:style-name="ce7">
            <text:p>5/6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4Runner</text:p>
          </table:table-cell>
          <table:table-cell office:value-type="float" office:value="68411" table:style-name="ce11">
            <text:p>68411</text:p>
          </table:table-cell>
          <table:table-cell office:value-type="currency" office:value="22288" table:style-name="ce12">
            <text:p>$22,288</text:p>
          </table:table-cell>
          <table:table-cell office:value-type="currency" office:value="19425" table:style-name="ce12">
            <text:p>$19,425</text:p>
          </table:table-cell>
          <table:table-cell office:value-type="percentage" office:value="0.87154522613065322" table:formula="of:=SUM([.E143]/[.D143])" table:style-name="ce13">
            <text:p>87%</text:p>
          </table:table-cell>
          <table:table-cell office:value-type="string" office:string-value="GOOD" table:formula="of:=IF([.F143]&gt;69%; &quot;GOOD&quot;; &quot;POOR&quot;)" table:style-name="ce20">
            <text:p>GOOD</text:p>
          </table:table-cell>
          <table:table-cell office:value-type="float" office:value="2.7" table:style-name="ce6">
            <text:p>2.7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143]&gt;299;&quot;High HP&quot;;[.I143]&gt;99;&quot;Medium HP&quot;;[.I14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3" table:style-name="ce6">
            <text:p>23</text:p>
          </table:table-cell>
          <table:table-cell office:value-type="float" office:value="62.35557713" table:style-name="ce6">
            <text:p>62.35557713</text:p>
          </table:table-cell>
          <table:table-cell office:value-type="float" office:value="105.3" table:style-name="ce6">
            <text:p>105.3</text:p>
          </table:table-cell>
          <table:table-cell office:value-type="float" office:value="66.5" table:style-name="ce6">
            <text:p>66.5</text:p>
          </table:table-cell>
          <table:table-cell office:value-type="float" office:value="183.3" table:style-name="ce6">
            <text:p>183.3</text:p>
          </table:table-cell>
          <table:table-cell office:value-type="float" office:value="3.44" table:style-name="ce6">
            <text:p>3.44</text:p>
          </table:table-cell>
          <table:table-cell office:value-type="float" office:value="18.5" table:style-name="ce6">
            <text:p>18.5</text:p>
          </table:table-cell>
          <table:table-cell office:value-type="date" office:date-value="2011-03-07T00:00:00" table:style-name="ce7">
            <text:p>3/7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Land Cruiser</text:p>
          </table:table-cell>
          <table:table-cell office:value-type="float" office:value="9835" table:style-name="ce11">
            <text:p>9835</text:p>
          </table:table-cell>
          <table:table-cell office:value-type="currency" office:value="51728" table:style-name="ce12">
            <text:p>$51,728</text:p>
          </table:table-cell>
          <table:table-cell office:value-type="currency" office:value="34080" table:style-name="ce12">
            <text:p>$34,080</text:p>
          </table:table-cell>
          <table:table-cell office:value-type="percentage" office:value="0.65883080729972165" table:formula="of:=SUM([.E144]/[.D144])" table:style-name="ce13">
            <text:p>66%</text:p>
          </table:table-cell>
          <table:table-cell office:value-type="string" office:string-value="POOR" table:formula="of:=IF([.F144]&gt;69%; &quot;GOOD&quot;; &quot;POOR&quot;)" table:style-name="ce20">
            <text:p>POOR</text:p>
          </table:table-cell>
          <table:table-cell office:value-type="float" office:value="4.7" table:style-name="ce6">
            <text:p>4.7</text:p>
          </table:table-cell>
          <table:table-cell office:value-type="float" office:value="230" table:style-name="ce6">
            <text:p>230</text:p>
          </table:table-cell>
          <table:table-cell office:value-type="string" office:string-value="Medium HP" table:formula="of:=COM.MICROSOFT.IFS([.I144]&gt;299;&quot;High HP&quot;;[.I144]&gt;99;&quot;Medium HP&quot;;[.I14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5" table:style-name="ce6">
            <text:p>15</text:p>
          </table:table-cell>
          <table:table-cell office:value-type="float" office:value="102.5289842" table:style-name="ce6">
            <text:p>102.5289842</text:p>
          </table:table-cell>
          <table:table-cell office:value-type="float" office:value="112.2" table:style-name="ce6">
            <text:p>112.2</text:p>
          </table:table-cell>
          <table:table-cell office:value-type="float" office:value="76.400000000000006" table:style-name="ce6">
            <text:p>76.4</text:p>
          </table:table-cell>
          <table:table-cell office:value-type="float" office:value="192.5" table:style-name="ce6">
            <text:p>192.5</text:p>
          </table:table-cell>
          <table:table-cell office:value-type="float" office:value="5.1150000000000002" table:style-name="ce6">
            <text:p>5.115</text:p>
          </table:table-cell>
          <table:table-cell office:value-type="float" office:value="25.4" table:style-name="ce6">
            <text:p>25.4</text:p>
          </table:table-cell>
          <table:table-cell office:value-type="date" office:date-value="2011-09-25T00:00:00" table:style-name="ce7">
            <text:p>9/25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Volkswagen</text:p>
          </table:table-cell>
          <table:table-cell office:value-type="string" table:style-name="ce5">
            <text:p>Golf</text:p>
          </table:table-cell>
          <table:table-cell office:value-type="float" office:value="9761" table:style-name="ce11">
            <text:p>9761</text:p>
          </table:table-cell>
          <table:table-cell office:value-type="currency" office:value="14900" table:style-name="ce12">
            <text:p>$14,900</text:p>
          </table:table-cell>
          <table:table-cell office:value-type="currency" office:value="11425" table:style-name="ce12">
            <text:p>$11,425</text:p>
          </table:table-cell>
          <table:table-cell office:value-type="percentage" office:value="0.76677852348993292" table:formula="of:=SUM([.E145]/[.D145])" table:style-name="ce13">
            <text:p>77%</text:p>
          </table:table-cell>
          <table:table-cell office:value-type="string" office:string-value="GOOD" table:formula="of:=IF([.F145]&gt;69%; &quot;GOOD&quot;; &quot;POOR&quot;)" table:style-name="ce20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6">
            <text:p>115</text:p>
          </table:table-cell>
          <table:table-cell office:value-type="string" office:string-value="Medium HP" table:formula="of:=COM.MICROSOFT.IFS([.I145]&gt;299;&quot;High HP&quot;;[.I145]&gt;99;&quot;Medium HP&quot;;[.I14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46.943876760000002" table:style-name="ce6">
            <text:p>46.94387676</text:p>
          </table:table-cell>
          <table:table-cell office:value-type="float" office:value="98.9" table:style-name="ce6">
            <text:p>98.9</text:p>
          </table:table-cell>
          <table:table-cell office:value-type="float" office:value="68.3" table:style-name="ce6">
            <text:p>68.3</text:p>
          </table:table-cell>
          <table:table-cell office:value-type="float" office:value="163.30000000000001" table:style-name="ce6">
            <text:p>163.3</text:p>
          </table:table-cell>
          <table:table-cell office:value-type="float" office:value="2.7669999999999999" table:style-name="ce6">
            <text:p>2.767</text:p>
          </table:table-cell>
          <table:table-cell office:value-type="float" office:value="14.5" table:style-name="ce6">
            <text:p>14.5</text:p>
          </table:table-cell>
          <table:table-cell office:value-type="date" office:date-value="2011-01-24T00:00:00" table:style-name="ce7">
            <text:p>1/24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Volkswagen</text:p>
          </table:table-cell>
          <table:table-cell office:value-type="string" table:style-name="ce5">
            <text:p>Jetta</text:p>
          </table:table-cell>
          <table:table-cell office:value-type="float" office:value="83721" table:style-name="ce11">
            <text:p>83721</text:p>
          </table:table-cell>
          <table:table-cell office:value-type="currency" office:value="16700" table:style-name="ce12">
            <text:p>$16,700</text:p>
          </table:table-cell>
          <table:table-cell office:value-type="currency" office:value="13240" table:style-name="ce12">
            <text:p>$13,240</text:p>
          </table:table-cell>
          <table:table-cell office:value-type="percentage" office:value="0.792814371257485" table:formula="of:=SUM([.E146]/[.D146])" table:style-name="ce13">
            <text:p>79%</text:p>
          </table:table-cell>
          <table:table-cell office:value-type="string" office:string-value="GOOD" table:formula="of:=IF([.F146]&gt;69%; &quot;GOOD&quot;; &quot;POOR&quot;)" table:style-name="ce20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6">
            <text:p>115</text:p>
          </table:table-cell>
          <table:table-cell office:value-type="string" office:string-value="Medium HP" table:formula="of:=COM.MICROSOFT.IFS([.I146]&gt;299;&quot;High HP&quot;;[.I146]&gt;99;&quot;Medium HP&quot;;[.I14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47.638236659999997" table:style-name="ce6">
            <text:p>47.63823666</text:p>
          </table:table-cell>
          <table:table-cell office:value-type="float" office:value="98.9" table:style-name="ce6">
            <text:p>98.9</text:p>
          </table:table-cell>
          <table:table-cell office:value-type="float" office:value="68.3" table:style-name="ce6">
            <text:p>68.3</text:p>
          </table:table-cell>
          <table:table-cell office:value-type="float" office:value="172.3" table:style-name="ce6">
            <text:p>172.3</text:p>
          </table:table-cell>
          <table:table-cell office:value-type="float" office:value="2.8530000000000002" table:style-name="ce6">
            <text:p>2.853</text:p>
          </table:table-cell>
          <table:table-cell office:value-type="float" office:value="14.5" table:style-name="ce6">
            <text:p>14.5</text:p>
          </table:table-cell>
          <table:table-cell office:value-type="date" office:date-value="2011-08-27T00:00:00" table:style-name="ce7">
            <text:p>8/27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Volkswagen</text:p>
          </table:table-cell>
          <table:table-cell office:value-type="string" table:style-name="ce5">
            <text:p>Passat</text:p>
          </table:table-cell>
          <table:table-cell office:value-type="float" office:value="51102" table:style-name="ce11">
            <text:p>51102</text:p>
          </table:table-cell>
          <table:table-cell office:value-type="currency" office:value="21200" table:style-name="ce12">
            <text:p>$21,200</text:p>
          </table:table-cell>
          <table:table-cell office:value-type="currency" office:value="16725" table:style-name="ce12">
            <text:p>$16,725</text:p>
          </table:table-cell>
          <table:table-cell office:value-type="percentage" office:value="0.78891509433962259" table:formula="of:=SUM([.E147]/[.D147])" table:style-name="ce13">
            <text:p>79%</text:p>
          </table:table-cell>
          <table:table-cell office:value-type="string" office:string-value="GOOD" table:formula="of:=IF([.F147]&gt;69%; &quot;GOOD&quot;; &quot;POOR&quot;)" table:style-name="ce20">
            <text:p>GOOD</text:p>
          </table:table-cell>
          <table:table-cell office:value-type="float" office:value="1.8" table:style-name="ce6">
            <text:p>1.8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147]&gt;299;&quot;High HP&quot;;[.I147]&gt;99;&quot;Medium HP&quot;;[.I14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61.701381359999999" table:style-name="ce6">
            <text:p>61.70138136</text:p>
          </table:table-cell>
          <table:table-cell office:value-type="float" office:value="106.4" table:style-name="ce6">
            <text:p>106.4</text:p>
          </table:table-cell>
          <table:table-cell office:value-type="float" office:value="68.5" table:style-name="ce6">
            <text:p>68.5</text:p>
          </table:table-cell>
          <table:table-cell office:value-type="float" office:value="184.1" table:style-name="ce6">
            <text:p>184.1</text:p>
          </table:table-cell>
          <table:table-cell office:value-type="float" office:value="3.0430000000000001" table:style-name="ce6">
            <text:p>3.043</text:p>
          </table:table-cell>
          <table:table-cell office:value-type="float" office:value="16.399999999999999" table:style-name="ce6">
            <text:p>16.4</text:p>
          </table:table-cell>
          <table:table-cell office:value-type="date" office:date-value="2012-10-30T00:00:00" table:style-name="ce7">
            <text:p>10/30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Volkswagen</text:p>
          </table:table-cell>
          <table:table-cell office:value-type="string" table:style-name="ce5">
            <text:p>Cabrio</text:p>
          </table:table-cell>
          <table:table-cell office:value-type="float" office:value="9569" table:style-name="ce11">
            <text:p>9569</text:p>
          </table:table-cell>
          <table:table-cell office:value-type="currency" office:value="19990" table:style-name="ce12">
            <text:p>$19,990</text:p>
          </table:table-cell>
          <table:table-cell office:value-type="currency" office:value="16575" table:style-name="ce12">
            <text:p>$16,575</text:p>
          </table:table-cell>
          <table:table-cell office:value-type="percentage" office:value="0.82916458229114554" table:formula="of:=SUM([.E148]/[.D148])" table:style-name="ce13">
            <text:p>83%</text:p>
          </table:table-cell>
          <table:table-cell office:value-type="string" office:string-value="GOOD" table:formula="of:=IF([.F148]&gt;69%; &quot;GOOD&quot;; &quot;POOR&quot;)" table:style-name="ce20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6">
            <text:p>115</text:p>
          </table:table-cell>
          <table:table-cell office:value-type="string" office:string-value="Medium HP" table:formula="of:=COM.MICROSOFT.IFS([.I148]&gt;299;&quot;High HP&quot;;[.I148]&gt;99;&quot;Medium HP&quot;;[.I14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48.907372250000002" table:style-name="ce6">
            <text:p>48.90737225</text:p>
          </table:table-cell>
          <table:table-cell office:value-type="float" office:value="97.4" table:style-name="ce6">
            <text:p>97.4</text:p>
          </table:table-cell>
          <table:table-cell office:value-type="float" office:value="66.7" table:style-name="ce6">
            <text:p>66.7</text:p>
          </table:table-cell>
          <table:table-cell office:value-type="float" office:value="160.4" table:style-name="ce6">
            <text:p>160.4</text:p>
          </table:table-cell>
          <table:table-cell office:value-type="float" office:value="3.0790000000000002" table:style-name="ce6">
            <text:p>3.079</text:p>
          </table:table-cell>
          <table:table-cell office:value-type="float" office:value="13.7" table:style-name="ce6">
            <text:p>13.7</text:p>
          </table:table-cell>
          <table:table-cell office:value-type="date" office:date-value="2011-05-31T00:00:00" table:style-name="ce7">
            <text:p>5/3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Volkswagen</text:p>
          </table:table-cell>
          <table:table-cell office:value-type="string" table:style-name="ce5">
            <text:p>GTI</text:p>
          </table:table-cell>
          <table:table-cell office:value-type="float" office:value="5596" table:style-name="ce11">
            <text:p>5596</text:p>
          </table:table-cell>
          <table:table-cell office:value-type="currency" office:value="17500" table:style-name="ce12">
            <text:p>$17,500</text:p>
          </table:table-cell>
          <table:table-cell office:value-type="currency" office:value="13760" table:style-name="ce12">
            <text:p>$13,760</text:p>
          </table:table-cell>
          <table:table-cell office:value-type="percentage" office:value="0.78628571428571425" table:formula="of:=SUM([.E149]/[.D149])" table:style-name="ce13">
            <text:p>79%</text:p>
          </table:table-cell>
          <table:table-cell office:value-type="string" office:string-value="GOOD" table:formula="of:=IF([.F149]&gt;69%; &quot;GOOD&quot;; &quot;POOR&quot;)" table:style-name="ce20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6">
            <text:p>115</text:p>
          </table:table-cell>
          <table:table-cell office:value-type="string" office:string-value="Medium HP" table:formula="of:=COM.MICROSOFT.IFS([.I149]&gt;299;&quot;High HP&quot;;[.I149]&gt;99;&quot;Medium HP&quot;;[.I14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47.946841059999997" table:style-name="ce6">
            <text:p>47.94684106</text:p>
          </table:table-cell>
          <table:table-cell office:value-type="float" office:value="98.9" table:style-name="ce6">
            <text:p>98.9</text:p>
          </table:table-cell>
          <table:table-cell office:value-type="float" office:value="68.3" table:style-name="ce6">
            <text:p>68.3</text:p>
          </table:table-cell>
          <table:table-cell office:value-type="float" office:value="163.30000000000001" table:style-name="ce6">
            <text:p>163.3</text:p>
          </table:table-cell>
          <table:table-cell office:value-type="float" office:value="2.762" table:style-name="ce6">
            <text:p>2.762</text:p>
          </table:table-cell>
          <table:table-cell office:value-type="float" office:value="14.6" table:style-name="ce6">
            <text:p>14.6</text:p>
          </table:table-cell>
          <table:table-cell office:value-type="date" office:date-value="2011-04-01T00:00:00" table:style-name="ce7">
            <text:p>4/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Volkswagen</text:p>
          </table:table-cell>
          <table:table-cell office:value-type="string" table:style-name="ce5">
            <text:p>Beetle</text:p>
          </table:table-cell>
          <table:table-cell office:value-type="float" office:value="49463" table:style-name="ce11">
            <text:p>49463</text:p>
          </table:table-cell>
          <table:table-cell office:value-type="currency" office:value="15900" table:style-name="ce12">
            <text:p>$15,900</text:p>
          </table:table-cell>
          <table:table-cell office:value-type="currency" office:value="11986" table:style-name="ce12">
            <text:p>$11,986</text:p>
          </table:table-cell>
          <table:table-cell office:value-type="percentage" office:value="0.75383647798742137" table:formula="of:=SUM([.E150]/[.D150])" table:style-name="ce13">
            <text:p>75%</text:p>
          </table:table-cell>
          <table:table-cell office:value-type="string" office:string-value="GOOD" table:formula="of:=IF([.F150]&gt;69%; &quot;GOOD&quot;; &quot;POOR&quot;)" table:style-name="ce20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6">
            <text:p>115</text:p>
          </table:table-cell>
          <table:table-cell office:value-type="string" office:string-value="Medium HP" table:formula="of:=COM.MICROSOFT.IFS([.I150]&gt;299;&quot;High HP&quot;;[.I150]&gt;99;&quot;Medium HP&quot;;[.I15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47.329632259999997" table:style-name="ce6">
            <text:p>47.32963226</text:p>
          </table:table-cell>
          <table:table-cell office:value-type="float" office:value="98.9" table:style-name="ce6">
            <text:p>98.9</text:p>
          </table:table-cell>
          <table:table-cell office:value-type="float" office:value="67.900000000000006" table:style-name="ce6">
            <text:p>67.9</text:p>
          </table:table-cell>
          <table:table-cell office:value-type="float" office:value="161.1" table:style-name="ce6">
            <text:p>161.1</text:p>
          </table:table-cell>
          <table:table-cell office:value-type="float" office:value="2.7690000000000001" table:style-name="ce6">
            <text:p>2.769</text:p>
          </table:table-cell>
          <table:table-cell office:value-type="float" office:value="14.5" table:style-name="ce6">
            <text:p>14.5</text:p>
          </table:table-cell>
          <table:table-cell office:value-type="date" office:date-value="2011-10-20T00:00:00" table:style-name="ce7">
            <text:p>10/20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Volvo</text:p>
          </table:table-cell>
          <table:table-cell office:value-type="string" table:style-name="ce5">
            <text:p>S40</text:p>
          </table:table-cell>
          <table:table-cell office:value-type="float" office:value="16957" table:style-name="ce11">
            <text:p>16957</text:p>
          </table:table-cell>
          <table:table-cell office:value-type="currency" office:value="23400" table:style-name="ce12">
            <text:p>$23,400</text:p>
          </table:table-cell>
          <table:table-cell office:value-type="currency" office:value="14334" table:style-name="ce12">
            <text:p>$14,334</text:p>
          </table:table-cell>
          <table:table-cell office:value-type="percentage" office:value="0.61256410256410254" table:formula="of:=SUM([.E151]/[.D151])" table:style-name="ce13">
            <text:p>61%</text:p>
          </table:table-cell>
          <table:table-cell office:value-type="string" office:string-value="POOR" table:formula="of:=IF([.F151]&gt;69%; &quot;GOOD&quot;; &quot;POOR&quot;)" table:style-name="ce20">
            <text:p>POOR</text:p>
          </table:table-cell>
          <table:table-cell office:value-type="float" office:value="1.9" table:style-name="ce6">
            <text:p>1.9</text:p>
          </table:table-cell>
          <table:table-cell office:value-type="float" office:value="160" table:style-name="ce6">
            <text:p>160</text:p>
          </table:table-cell>
          <table:table-cell office:value-type="string" office:string-value="Medium HP" table:formula="of:=COM.MICROSOFT.IFS([.I151]&gt;299;&quot;High HP&quot;;[.I151]&gt;99;&quot;Medium HP&quot;;[.I15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66.113056799999995" table:style-name="ce6">
            <text:p>66.1130568</text:p>
          </table:table-cell>
          <table:table-cell office:value-type="float" office:value="100.5" table:style-name="ce6">
            <text:p>100.5</text:p>
          </table:table-cell>
          <table:table-cell office:value-type="float" office:value="67.599999999999994" table:style-name="ce6">
            <text:p>67.6</text:p>
          </table:table-cell>
          <table:table-cell office:value-type="float" office:value="176.6" table:style-name="ce6">
            <text:p>176.6</text:p>
          </table:table-cell>
          <table:table-cell office:value-type="float" office:value="2.9980000000000002" table:style-name="ce6">
            <text:p>2.998</text:p>
          </table:table-cell>
          <table:table-cell office:value-type="float" office:value="15.8" table:style-name="ce6">
            <text:p>15.8</text:p>
          </table:table-cell>
          <table:table-cell office:value-type="date" office:date-value="2011-02-18T00:00:00" table:style-name="ce7">
            <text:p>2/18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Volvo</text:p>
          </table:table-cell>
          <table:table-cell office:value-type="string" table:style-name="ce5">
            <text:p>V40</text:p>
          </table:table-cell>
          <table:table-cell office:value-type="float" office:value="3545" table:style-name="ce11">
            <text:p>3545</text:p>
          </table:table-cell>
          <table:table-cell office:value-type="currency" office:value="24400" table:style-name="ce12">
            <text:p>$24,400</text:p>
          </table:table-cell>
          <table:table-cell office:value-type="currency" office:value="15252" table:style-name="ce12">
            <text:p>$15,252</text:p>
          </table:table-cell>
          <table:table-cell office:value-type="percentage" office:value="0.62508196721311471" table:formula="of:=SUM([.E152]/[.D152])" table:style-name="ce13">
            <text:p>63%</text:p>
          </table:table-cell>
          <table:table-cell office:value-type="string" office:string-value="POOR" table:formula="of:=IF([.F152]&gt;69%; &quot;GOOD&quot;; &quot;POOR&quot;)" table:style-name="ce20">
            <text:p>POOR</text:p>
          </table:table-cell>
          <table:table-cell office:value-type="float" office:value="1.9" table:style-name="ce6">
            <text:p>1.9</text:p>
          </table:table-cell>
          <table:table-cell office:value-type="float" office:value="160" table:style-name="ce6">
            <text:p>160</text:p>
          </table:table-cell>
          <table:table-cell office:value-type="string" office:string-value="Medium HP" table:formula="of:=COM.MICROSOFT.IFS([.I152]&gt;299;&quot;High HP&quot;;[.I152]&gt;99;&quot;Medium HP&quot;;[.I15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66.498812299999997" table:style-name="ce6">
            <text:p>66.4988123</text:p>
          </table:table-cell>
          <table:table-cell office:value-type="float" office:value="100.5" table:style-name="ce6">
            <text:p>100.5</text:p>
          </table:table-cell>
          <table:table-cell office:value-type="float" office:value="67.599999999999994" table:style-name="ce6">
            <text:p>67.6</text:p>
          </table:table-cell>
          <table:table-cell office:value-type="float" office:value="176.6" table:style-name="ce6">
            <text:p>176.6</text:p>
          </table:table-cell>
          <table:table-cell office:value-type="float" office:value="3.0419999999999998" table:style-name="ce6">
            <text:p>3.042</text:p>
          </table:table-cell>
          <table:table-cell office:value-type="float" office:value="15.8" table:style-name="ce6">
            <text:p>15.8</text:p>
          </table:table-cell>
          <table:table-cell office:value-type="date" office:date-value="2011-09-21T00:00:00" table:style-name="ce7">
            <text:p>9/2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Volvo</text:p>
          </table:table-cell>
          <table:table-cell office:value-type="string" table:style-name="ce5">
            <text:p>S70</text:p>
          </table:table-cell>
          <table:table-cell office:value-type="float" office:value="15245" table:style-name="ce11">
            <text:p>15245</text:p>
          </table:table-cell>
          <table:table-cell office:value-type="currency" office:value="27500" table:style-name="ce12">
            <text:p>$27,500</text:p>
          </table:table-cell>
          <table:table-cell office:value-type="currency" office:value="18900" table:style-name="ce12">
            <text:p>$18,900</text:p>
          </table:table-cell>
          <table:table-cell office:value-type="percentage" office:value="0.68727272727272726" table:formula="of:=SUM([.E153]/[.D153])" table:style-name="ce13">
            <text:p>69%</text:p>
          </table:table-cell>
          <table:table-cell office:value-type="string" office:string-value="POOR" table:formula="of:=IF([.F153]&gt;69%; &quot;GOOD&quot;; &quot;POOR&quot;)" table:style-name="ce20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68" table:style-name="ce6">
            <text:p>168</text:p>
          </table:table-cell>
          <table:table-cell office:value-type="string" office:string-value="Medium HP" table:formula="of:=COM.MICROSOFT.IFS([.I153]&gt;299;&quot;High HP&quot;;[.I153]&gt;99;&quot;Medium HP&quot;;[.I15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70.654495449999999" table:style-name="ce6">
            <text:p>70.65449545</text:p>
          </table:table-cell>
          <table:table-cell office:value-type="float" office:value="104.9" table:style-name="ce6">
            <text:p>104.9</text:p>
          </table:table-cell>
          <table:table-cell office:value-type="float" office:value="69.3" table:style-name="ce6">
            <text:p>69.3</text:p>
          </table:table-cell>
          <table:table-cell office:value-type="float" office:value="185.9" table:style-name="ce6">
            <text:p>185.9</text:p>
          </table:table-cell>
          <table:table-cell office:value-type="float" office:value="3.2080000000000002" table:style-name="ce6">
            <text:p>3.208</text:p>
          </table:table-cell>
          <table:table-cell office:value-type="float" office:value="17.899999999999999" table:style-name="ce6">
            <text:p>17.9</text:p>
          </table:table-cell>
          <table:table-cell office:value-type="date" office:date-value="2012-11-24T00:00:00" table:style-name="ce7">
            <text:p>11/24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Volvo</text:p>
          </table:table-cell>
          <table:table-cell office:value-type="string" table:style-name="ce5">
            <text:p>V70</text:p>
          </table:table-cell>
          <table:table-cell office:value-type="float" office:value="17531" table:style-name="ce11">
            <text:p>17531</text:p>
          </table:table-cell>
          <table:table-cell office:value-type="currency" office:value="28800" table:style-name="ce12">
            <text:p>$28,800</text:p>
          </table:table-cell>
          <table:table-cell office:value-type="currency" office:value="20223" table:style-name="ce12">
            <text:p>$20,223</text:p>
          </table:table-cell>
          <table:table-cell office:value-type="percentage" office:value="0.70218749999999996" table:formula="of:=SUM([.E154]/[.D154])" table:style-name="ce13">
            <text:p>70%</text:p>
          </table:table-cell>
          <table:table-cell office:value-type="string" office:string-value="GOOD" table:formula="of:=IF([.F154]&gt;69%; &quot;GOOD&quot;; &quot;POOR&quot;)" table:style-name="ce20">
            <text:p>GOOD</text:p>
          </table:table-cell>
          <table:table-cell office:value-type="float" office:value="2.4" table:style-name="ce6">
            <text:p>2.4</text:p>
          </table:table-cell>
          <table:table-cell office:value-type="float" office:value="168" table:style-name="ce6">
            <text:p>168</text:p>
          </table:table-cell>
          <table:table-cell office:value-type="string" office:string-value="Medium HP" table:formula="of:=COM.MICROSOFT.IFS([.I154]&gt;299;&quot;High HP&quot;;[.I154]&gt;99;&quot;Medium HP&quot;;[.I15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71.1559776" table:style-name="ce6">
            <text:p>71.1559776</text:p>
          </table:table-cell>
          <table:table-cell office:value-type="float" office:value="104.9" table:style-name="ce6">
            <text:p>104.9</text:p>
          </table:table-cell>
          <table:table-cell office:value-type="float" office:value="69.3" table:style-name="ce6">
            <text:p>69.3</text:p>
          </table:table-cell>
          <table:table-cell office:value-type="float" office:value="186.2" table:style-name="ce6">
            <text:p>186.2</text:p>
          </table:table-cell>
          <table:table-cell office:value-type="float" office:value="3.2589999999999999" table:style-name="ce6">
            <text:p>3.259</text:p>
          </table:table-cell>
          <table:table-cell office:value-type="float" office:value="17.899999999999999" table:style-name="ce6">
            <text:p>17.9</text:p>
          </table:table-cell>
          <table:table-cell office:value-type="date" office:date-value="2011-06-25T00:00:00" table:style-name="ce7">
            <text:p>6/25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Volvo</text:p>
          </table:table-cell>
          <table:table-cell office:value-type="string" table:style-name="ce5">
            <text:p>C70</text:p>
          </table:table-cell>
          <table:table-cell office:value-type="float" office:value="3493" table:style-name="ce11">
            <text:p>3493</text:p>
          </table:table-cell>
          <table:table-cell office:value-type="currency" office:value="45500" table:style-name="ce12">
            <text:p>$45,500</text:p>
          </table:table-cell>
          <table:table-cell office:value-type="currency" office:value="34175" table:style-name="ce12">
            <text:p>$34,175</text:p>
          </table:table-cell>
          <table:table-cell office:value-type="percentage" office:value="0.75109890109890109" table:formula="of:=SUM([.E155]/[.D155])" table:style-name="ce13">
            <text:p>75%</text:p>
          </table:table-cell>
          <table:table-cell office:value-type="string" office:string-value="GOOD" table:formula="of:=IF([.F155]&gt;69%; &quot;GOOD&quot;; &quot;POOR&quot;)" table:style-name="ce20">
            <text:p>GOOD</text:p>
          </table:table-cell>
          <table:table-cell office:value-type="float" office:value="2.2999999999999998" table:style-name="ce6">
            <text:p>2.3</text:p>
          </table:table-cell>
          <table:table-cell office:value-type="float" office:value="236" table:style-name="ce6">
            <text:p>236</text:p>
          </table:table-cell>
          <table:table-cell office:value-type="string" office:string-value="Medium HP" table:formula="of:=COM.MICROSOFT.IFS([.I155]&gt;299;&quot;High HP&quot;;[.I155]&gt;99;&quot;Medium HP&quot;;[.I15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101.6233572" table:style-name="ce6">
            <text:p>101.6233572</text:p>
          </table:table-cell>
          <table:table-cell office:value-type="float" office:value="104.9" table:style-name="ce6">
            <text:p>104.9</text:p>
          </table:table-cell>
          <table:table-cell office:value-type="float" office:value="71.5" table:style-name="ce6">
            <text:p>71.5</text:p>
          </table:table-cell>
          <table:table-cell office:value-type="float" office:value="185.7" table:style-name="ce6">
            <text:p>185.7</text:p>
          </table:table-cell>
          <table:table-cell office:value-type="float" office:value="3.601" table:style-name="ce6">
            <text:p>3.601</text:p>
          </table:table-cell>
          <table:table-cell office:value-type="float" office:value="18.5" table:style-name="ce6">
            <text:p>18.5</text:p>
          </table:table-cell>
          <table:table-cell office:value-type="date" office:date-value="2011-04-26T00:00:00" table:style-name="ce7">
            <text:p>4/26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Volvo</text:p>
          </table:table-cell>
          <table:table-cell office:value-type="string" table:style-name="ce5">
            <text:p>S80</text:p>
          </table:table-cell>
          <table:table-cell office:value-type="float" office:value="18969" table:style-name="ce11">
            <text:p>18969</text:p>
          </table:table-cell>
          <table:table-cell office:value-type="currency" office:value="36000" table:style-name="ce12">
            <text:p>$36,000</text:p>
          </table:table-cell>
          <table:table-cell office:value-type="currency" office:value="26403" table:style-name="ce12">
            <text:p>$26,403</text:p>
          </table:table-cell>
          <table:table-cell office:value-type="percentage" office:value="0.73341666666666672" table:formula="of:=SUM([.E156]/[.D156])" table:style-name="ce13">
            <text:p>73%</text:p>
          </table:table-cell>
          <table:table-cell office:value-type="string" office:string-value="GOOD" table:formula="of:=IF([.F156]&gt;69%; &quot;GOOD&quot;; &quot;POOR&quot;)" table:style-name="ce20">
            <text:p>GOOD</text:p>
          </table:table-cell>
          <table:table-cell office:value-type="float" office:value="2.9" table:style-name="ce6">
            <text:p>2.9</text:p>
          </table:table-cell>
          <table:table-cell office:value-type="float" office:value="201" table:style-name="ce6">
            <text:p>201</text:p>
          </table:table-cell>
          <table:table-cell office:value-type="string" office:string-value="Medium HP" table:formula="of:=COM.MICROSOFT.IFS([.I156]&gt;299;&quot;High HP&quot;;[.I156]&gt;99;&quot;Medium HP&quot;;[.I15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85.735654510000003" table:style-name="ce6">
            <text:p>85.73565451</text:p>
          </table:table-cell>
          <table:table-cell office:value-type="float" office:value="109.9" table:style-name="ce6">
            <text:p>109.9</text:p>
          </table:table-cell>
          <table:table-cell office:value-type="float" office:value="72.099999999999994" table:style-name="ce6">
            <text:p>72.1</text:p>
          </table:table-cell>
          <table:table-cell office:value-type="float" office:value="189.8" table:style-name="ce6">
            <text:p>189.8</text:p>
          </table:table-cell>
          <table:table-cell office:value-type="float" office:value="3.6" table:style-name="ce6">
            <text:p>3.6</text:p>
          </table:table-cell>
          <table:table-cell office:value-type="float" office:value="21.1" table:style-name="ce6">
            <text:p>21.1</text:p>
          </table:table-cell>
          <table:table-cell office:value-type="date" office:date-value="2011-11-14T00:00:00" table:style-name="ce7">
            <text:p>11/14/2011</text:p>
          </table:table-cell>
          <table:table-cell table:number-columns-repeated="16365"/>
        </table:table-row>
        <table:table-row table:number-rows-repeated="1048420" table:style-name="ro1">
          <table:table-cell table:number-columns-repeated="16384"/>
        </table:table-row>
      </table:table>
      <table:table table:name="Bar_Chart" table:style-name="ta1">
        <table:table-column table:style-name="co25" table:default-cell-style-name="ce1"/>
        <table:table-column table:style-name="co26" table:default-cell-style-name="ce19"/>
        <table:table-column table:style-name="co2" table:default-cell-style-name="ce19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number-columns-repeated="128" table:default-cell-style-name="ce1"/>
        <table:table-column table:style-name="co32" table:number-columns-repeated="21" table:default-cell-style-name="ce1"/>
        <table:table-column table:style-name="co19" table:default-cell-style-name="ce1"/>
        <table:table-column table:style-name="co18" table:number-columns-repeated="1622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7">
            <text:p>Row Labels</text:p>
          </table:table-cell>
          <table:table-cell office:value-type="string" table:style-name="ce19">
            <text:p>Average of Year Resale Value</text:p>
          </table:table-cell>
          <table:table-cell office:value-type="string" table:style-name="ce19">
            <text:p>Average of Price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Audi</text:p>
          </table:table-cell>
          <table:table-cell office:value-type="currency" office:value="28270" table:style-name="ce19">
            <text:p>$28,270.00</text:p>
          </table:table-cell>
          <table:table-cell office:value-type="currency" office:value="39980" table:style-name="ce19">
            <text:p>$39,980.00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BMW</text:p>
          </table:table-cell>
          <table:table-cell office:value-type="currency" office:value="29766.666666666668" table:style-name="ce19">
            <text:p>$29,766.67</text:p>
          </table:table-cell>
          <table:table-cell office:value-type="currency" office:value="33096.666666666664" table:style-name="ce19">
            <text:p>$33,096.67</text:p>
          </table:table-cell>
          <table:table-cell table:style-name="ce1">
            <draw:frame draw:z-index="1" draw:id="id0" draw:style-name="a0" draw:name="Chart 3" svg:x="0.94792in" svg:y="0.01042in" svg:width="8.09375in" svg:height="6.28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8">
            <text:p>Mercedes-B</text:p>
          </table:table-cell>
          <table:table-cell office:value-type="currency" office:value="39876.555555555555" table:style-name="ce19">
            <text:p>$39,876.56</text:p>
          </table:table-cell>
          <table:table-cell office:value-type="currency" office:value="52916.666666666664" table:style-name="ce19">
            <text:p>$52,916.67</text:p>
          </table:table-cell>
          <table:table-cell table:number-columns-repeated="14"/>
          <table:table-cell table:style-name="ce1"/>
          <table:table-cell table:number-columns-repeated="16366"/>
        </table:table-row>
        <table:table-row table:style-name="ro1">
          <table:table-cell office:value-type="string" table:style-name="ce18">
            <text:p>Porsche</text:p>
          </table:table-cell>
          <table:table-cell office:value-type="currency" office:value="56475" table:style-name="ce19">
            <text:p>$56,475.00</text:p>
          </table:table-cell>
          <table:table-cell office:value-type="currency" office:value="62473.333333333336" table:style-name="ce19">
            <text:p>$62,473.33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Volkswagen</text:p>
          </table:table-cell>
          <table:table-cell office:value-type="currency" office:value="13951.833333333334" table:style-name="ce19">
            <text:p>$13,951.83</text:p>
          </table:table-cell>
          <table:table-cell office:value-type="currency" office:value="17698.333333333332" table:style-name="ce19">
            <text:p>$17,698.33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Grand Total</text:p>
          </table:table-cell>
          <table:table-cell office:value-type="currency" office:value="32755.625" table:style-name="ce19">
            <text:p>$32,755.63</text:p>
          </table:table-cell>
          <table:table-cell office:value-type="currency" office:value="41212.083333333336" table:style-name="ce19">
            <text:p>$41,212.08</text:p>
          </table:table-cell>
          <table:table-cell table:number-columns-repeated="16381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27" table:style-name="ro1">
          <table:table-cell/>
          <table:table-cell table:number-columns-repeated="16383" table:style-name="ce1"/>
        </table:table-row>
        <table:table-row table:number-rows-repeated="1048533" table:style-name="ro1">
          <table:table-cell table:number-columns-repeated="16384"/>
        </table:table-row>
      </table:table>
      <table:table table:name="Column,_Pie,_Sunburst_Cha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 table:visibility="collapse"/>
        <table:table-column table:style-name="co13" table:default-cell-style-name="ce1" table:visibility="collapse"/>
        <table:table-column table:style-name="co14" table:default-cell-style-name="ce1" table:visibility="collapse"/>
        <table:table-column table:style-name="co15" table:default-cell-style-name="ce1" table:visibility="collapse"/>
        <table:table-column table:style-name="co16" table:default-cell-style-name="ce1" table:visibility="collapse"/>
        <table:table-column table:style-name="co17" table:default-cell-style-name="ce1" table:visibility="collapse"/>
        <table:table-column table:style-name="co24" table:number-columns-repeated="3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16357" table:default-cell-style-name="ce1"/>
        <table:table-row table:style-name="ro1">
          <table:table-cell office:value-type="string" table:style-name="ce3">
            <text:p>Manufacturer</text:p>
          </table:table-cell>
          <table:table-cell office:value-type="string" table:style-name="ce3">
            <text:p>Model</text:p>
          </table:table-cell>
          <table:table-cell office:value-type="string" table:style-name="ce3">
            <text:p>Unit Sales</text:p>
          </table:table-cell>
          <table:table-cell office:value-type="string" table:style-name="ce9">
            <text:p>Price</text:p>
          </table:table-cell>
          <table:table-cell office:value-type="string" table:style-name="ce3">
            <text:p>Year Resale Value</text:p>
          </table:table-cell>
          <table:table-cell office:value-type="string" table:style-name="ce3">
            <text:p>Retention %</text:p>
          </table:table-cell>
          <table:table-cell office:value-type="string" table:style-name="ce3">
            <text:p>Retention Value</text:p>
          </table:table-cell>
          <table:table-cell office:value-type="string" table:style-name="ce3">
            <text:p>Engine Size</text:p>
          </table:table-cell>
          <table:table-cell office:value-type="string" table:style-name="ce3">
            <text:p>Horsepower</text:p>
          </table:table-cell>
          <table:table-cell office:value-type="string" table:style-name="ce3">
            <text:p>HP Level</text:p>
          </table:table-cell>
          <table:table-cell office:value-type="string" table:style-name="ce3">
            <text:p>Vehicle_type</text:p>
          </table:table-cell>
          <table:table-cell office:value-type="string" table:style-name="ce3">
            <text:p>Fuel Efficiency</text:p>
          </table:table-cell>
          <table:table-cell office:value-type="string" table:style-name="ce3">
            <text:p>Power Perf Factor</text:p>
          </table:table-cell>
          <table:table-cell office:value-type="string" table:style-name="ce3">
            <text:p>Fuel Capacity</text:p>
          </table:table-cell>
          <table:table-cell office:value-type="string" table:style-name="ce3">
            <text:p>Wheelbase</text:p>
          </table:table-cell>
          <table:table-cell office:value-type="string" table:style-name="ce3">
            <text:p>Width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Curb Weight</text:p>
          </table:table-cell>
          <table:table-cell office:value-type="string" table:style-name="ce3">
            <text:p>Latest Launch</text:p>
          </table:table-cell>
          <table:table-cell table:number-columns-repeated="16365" table:style-name="ce2"/>
        </table:table-row>
        <table:table-row table:style-name="ro1" table:visibility="filter">
          <table:table-cell office:value-type="string" table:style-name="ce4">
            <text:p>Acura</text:p>
          </table:table-cell>
          <table:table-cell office:value-type="string" table:style-name="ce5">
            <text:p>Integra</text:p>
          </table:table-cell>
          <table:table-cell office:value-type="float" office:value="16919" table:style-name="ce11">
            <text:p>16919</text:p>
          </table:table-cell>
          <table:table-cell office:value-type="currency" office:value="21500" table:style-name="ce12">
            <text:p>$21,500</text:p>
          </table:table-cell>
          <table:table-cell office:value-type="currency" office:value="16360" table:style-name="ce12">
            <text:p>$16,360</text:p>
          </table:table-cell>
          <table:table-cell office:value-type="percentage" office:value="0.76093023255813952" table:formula="of:=SUM([.E2]/[.D2])" table:style-name="ce13">
            <text:p>76%</text:p>
          </table:table-cell>
          <table:table-cell office:value-type="string" office:string-value="GOOD" table:formula="of:=IF([.F2]&gt;69%; &quot;GOOD&quot;; &quot;POOR&quot;)" table:style-name="ce21">
            <text:p>GOOD</text:p>
          </table:table-cell>
          <table:table-cell office:value-type="float" office:value="1.8" table:style-name="ce6">
            <text:p>1.8</text:p>
          </table:table-cell>
          <table:table-cell office:value-type="float" office:value="140" table:style-name="ce6">
            <text:p>140</text:p>
          </table:table-cell>
          <table:table-cell office:value-type="string" office:string-value="Medium HP" table:formula="of:=COM.MICROSOFT.IFS([.I2]&gt;299;&quot;High HP&quot;;[.I2]&gt;99;&quot;Medium HP&quot;;[.I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8" table:style-name="ce6">
            <text:p>28</text:p>
          </table:table-cell>
          <table:table-cell office:value-type="float" office:value="58.280149520000002" table:style-name="ce6">
            <text:p>58.28014952</text:p>
          </table:table-cell>
          <table:table-cell office:value-type="float" office:value="13.2" table:style-name="ce6">
            <text:p>13.2</text:p>
          </table:table-cell>
          <table:table-cell office:value-type="float" office:value="101.2" table:style-name="ce6">
            <text:p>101.2</text:p>
          </table:table-cell>
          <table:table-cell office:value-type="float" office:value="67.3" table:style-name="ce6">
            <text:p>67.3</text:p>
          </table:table-cell>
          <table:table-cell office:value-type="float" office:value="172.4" table:style-name="ce6">
            <text:p>172.4</text:p>
          </table:table-cell>
          <table:table-cell office:value-type="float" office:value="2.6389999999999998" table:style-name="ce6">
            <text:p>2.639</text:p>
          </table:table-cell>
          <table:table-cell office:value-type="date" office:date-value="2012-02-02T00:00:00" table:style-name="ce7">
            <text:p>2/2/2012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Acura</text:p>
          </table:table-cell>
          <table:table-cell office:value-type="string" table:style-name="ce5">
            <text:p>TL</text:p>
          </table:table-cell>
          <table:table-cell office:value-type="float" office:value="39384" table:style-name="ce11">
            <text:p>39384</text:p>
          </table:table-cell>
          <table:table-cell office:value-type="currency" office:value="28400" table:style-name="ce12">
            <text:p>$28,400</text:p>
          </table:table-cell>
          <table:table-cell office:value-type="currency" office:value="19875" table:style-name="ce12">
            <text:p>$19,875</text:p>
          </table:table-cell>
          <table:table-cell office:value-type="percentage" office:value="0.69982394366197187" table:formula="of:=SUM([.E3]/[.D3])" table:style-name="ce13">
            <text:p>70%</text:p>
          </table:table-cell>
          <table:table-cell office:value-type="string" office:string-value="GOOD" table:formula="of:=IF([.F3]&gt;69%; &quot;GOOD&quot;; &quot;POOR&quot;)" table:style-name="ce21">
            <text:p>GOOD</text:p>
          </table:table-cell>
          <table:table-cell office:value-type="float" office:value="3.2" table:style-name="ce6">
            <text:p>3.2</text:p>
          </table:table-cell>
          <table:table-cell office:value-type="float" office:value="225" table:style-name="ce6">
            <text:p>225</text:p>
          </table:table-cell>
          <table:table-cell office:value-type="string" office:string-value="Medium HP" table:formula="of:=COM.MICROSOFT.IFS([.I3]&gt;299;&quot;High HP&quot;;[.I3]&gt;99;&quot;Medium HP&quot;;[.I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91.370777660000002" table:style-name="ce6">
            <text:p>91.37077766</text:p>
          </table:table-cell>
          <table:table-cell office:value-type="float" office:value="17.2" table:style-name="ce6">
            <text:p>17.2</text:p>
          </table:table-cell>
          <table:table-cell office:value-type="float" office:value="108.1" table:style-name="ce6">
            <text:p>108.1</text:p>
          </table:table-cell>
          <table:table-cell office:value-type="float" office:value="70.3" table:style-name="ce6">
            <text:p>70.3</text:p>
          </table:table-cell>
          <table:table-cell office:value-type="float" office:value="192.9" table:style-name="ce6">
            <text:p>192.9</text:p>
          </table:table-cell>
          <table:table-cell office:value-type="float" office:value="3.5169999999999999" table:style-name="ce6">
            <text:p>3.517</text:p>
          </table:table-cell>
          <table:table-cell office:value-type="date" office:date-value="2011-06-03T00:00:00" table:style-name="ce7">
            <text:p>6/3/2011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Acura</text:p>
          </table:table-cell>
          <table:table-cell office:value-type="string" table:style-name="ce5">
            <text:p>RL</text:p>
          </table:table-cell>
          <table:table-cell office:value-type="float" office:value="8588" table:style-name="ce11">
            <text:p>8588</text:p>
          </table:table-cell>
          <table:table-cell office:value-type="currency" office:value="42000" table:style-name="ce12">
            <text:p>$42,000</text:p>
          </table:table-cell>
          <table:table-cell office:value-type="currency" office:value="29725" table:style-name="ce12">
            <text:p>$29,725</text:p>
          </table:table-cell>
          <table:table-cell office:value-type="percentage" office:value="0.70773809523809528" table:formula="of:=SUM([.E4]/[.D4])" table:style-name="ce13">
            <text:p>71%</text:p>
          </table:table-cell>
          <table:table-cell office:value-type="string" office:string-value="GOOD" table:formula="of:=IF([.F4]&gt;69%; &quot;GOOD&quot;; &quot;POOR&quot;)" table:style-name="ce21">
            <text:p>GOOD</text:p>
          </table:table-cell>
          <table:table-cell office:value-type="float" office:value="3.5" table:style-name="ce6">
            <text:p>3.5</text:p>
          </table:table-cell>
          <table:table-cell office:value-type="float" office:value="210" table:style-name="ce6">
            <text:p>210</text:p>
          </table:table-cell>
          <table:table-cell office:value-type="string" office:string-value="Medium HP" table:formula="of:=COM.MICROSOFT.IFS([.I4]&gt;299;&quot;High HP&quot;;[.I4]&gt;99;&quot;Medium HP&quot;;[.I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91.389779329999996" table:style-name="ce6">
            <text:p>91.38977933</text:p>
          </table:table-cell>
          <table:table-cell office:value-type="float" office:value="18" table:style-name="ce6">
            <text:p>18</text:p>
          </table:table-cell>
          <table:table-cell office:value-type="float" office:value="114.6" table:style-name="ce6">
            <text:p>114.6</text:p>
          </table:table-cell>
          <table:table-cell office:value-type="float" office:value="71.400000000000006" table:style-name="ce6">
            <text:p>71.4</text:p>
          </table:table-cell>
          <table:table-cell office:value-type="float" office:value="196.6" table:style-name="ce6">
            <text:p>196.6</text:p>
          </table:table-cell>
          <table:table-cell office:value-type="float" office:value="3.85" table:style-name="ce6">
            <text:p>3.85</text:p>
          </table:table-cell>
          <table:table-cell office:value-type="date" office:date-value="2011-03-10T00:00:00" table:style-name="ce7">
            <text:p>3/10/2011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Audi</text:p>
          </table:table-cell>
          <table:table-cell office:value-type="string" table:style-name="ce5">
            <text:p>A4</text:p>
          </table:table-cell>
          <table:table-cell office:value-type="float" office:value="20397" table:style-name="ce11">
            <text:p>20397</text:p>
          </table:table-cell>
          <table:table-cell office:value-type="currency" office:value="23990" table:style-name="ce12">
            <text:p>$23,990</text:p>
          </table:table-cell>
          <table:table-cell office:value-type="currency" office:value="22255" table:style-name="ce12">
            <text:p>$22,255</text:p>
          </table:table-cell>
          <table:table-cell office:value-type="percentage" office:value="0.92767819924968742" table:formula="of:=SUM([.E5]/[.D5])" table:style-name="ce13">
            <text:p>93%</text:p>
          </table:table-cell>
          <table:table-cell office:value-type="string" office:string-value="GOOD" table:formula="of:=IF([.F5]&gt;69%; &quot;GOOD&quot;; &quot;POOR&quot;)" table:style-name="ce21">
            <text:p>GOOD</text:p>
          </table:table-cell>
          <table:table-cell office:value-type="float" office:value="1.8" table:style-name="ce6">
            <text:p>1.8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5]&gt;299;&quot;High HP&quot;;[.I5]&gt;99;&quot;Medium HP&quot;;[.I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62.777639200000003" table:style-name="ce6">
            <text:p>62.7776392</text:p>
          </table:table-cell>
          <table:table-cell office:value-type="float" office:value="16.399999999999999" table:style-name="ce6">
            <text:p>16.4</text:p>
          </table:table-cell>
          <table:table-cell office:value-type="float" office:value="102.6" table:style-name="ce6">
            <text:p>102.6</text:p>
          </table:table-cell>
          <table:table-cell office:value-type="float" office:value="68.2" table:style-name="ce6">
            <text:p>68.2</text:p>
          </table:table-cell>
          <table:table-cell office:value-type="float" office:value="178" table:style-name="ce6">
            <text:p>178</text:p>
          </table:table-cell>
          <table:table-cell office:value-type="float" office:value="2.9980000000000002" table:style-name="ce6">
            <text:p>2.998</text:p>
          </table:table-cell>
          <table:table-cell office:value-type="date" office:date-value="2011-10-08T00:00:00" table:style-name="ce7">
            <text:p>10/8/2011</text:p>
          </table:table-cell>
          <table:table-cell table:style-name="ce1"/>
          <table:table-cell table:style-name="ce2"/>
          <table:table-cell table:style-name="ce1"/>
          <table:table-cell table:style-name="ce14"/>
          <table:table-cell table:number-columns-repeated="16361"/>
        </table:table-row>
        <table:table-row table:style-name="ro1" table:visibility="filter">
          <table:table-cell office:value-type="string" table:style-name="ce4">
            <text:p>Audi</text:p>
          </table:table-cell>
          <table:table-cell office:value-type="string" table:style-name="ce5">
            <text:p>A6</text:p>
          </table:table-cell>
          <table:table-cell office:value-type="float" office:value="18780" table:style-name="ce11">
            <text:p>18780</text:p>
          </table:table-cell>
          <table:table-cell office:value-type="currency" office:value="33950" table:style-name="ce12">
            <text:p>$33,950</text:p>
          </table:table-cell>
          <table:table-cell office:value-type="currency" office:value="23555" table:style-name="ce12">
            <text:p>$23,555</text:p>
          </table:table-cell>
          <table:table-cell office:value-type="percentage" office:value="0.6938144329896907" table:formula="of:=SUM([.E6]/[.D6])" table:style-name="ce13">
            <text:p>69%</text:p>
          </table:table-cell>
          <table:table-cell office:value-type="string" office:string-value="GOOD" table:formula="of:=IF([.F6]&gt;69%; &quot;GOOD&quot;; &quot;POOR&quot;)" table:style-name="ce21">
            <text:p>GOOD</text:p>
          </table:table-cell>
          <table:table-cell office:value-type="float" office:value="2.8" table:style-name="ce6">
            <text:p>2.8</text:p>
          </table:table-cell>
          <table:table-cell office:value-type="float" office:value="200" table:style-name="ce6">
            <text:p>200</text:p>
          </table:table-cell>
          <table:table-cell office:value-type="string" office:string-value="Medium HP" table:formula="of:=COM.MICROSOFT.IFS([.I6]&gt;299;&quot;High HP&quot;;[.I6]&gt;99;&quot;Medium HP&quot;;[.I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84.565105020000004" table:style-name="ce6">
            <text:p>84.56510502</text:p>
          </table:table-cell>
          <table:table-cell office:value-type="float" office:value="18.5" table:style-name="ce6">
            <text:p>18.5</text:p>
          </table:table-cell>
          <table:table-cell office:value-type="float" office:value="108.7" table:style-name="ce6">
            <text:p>108.7</text:p>
          </table:table-cell>
          <table:table-cell office:value-type="float" office:value="76.099999999999994" table:style-name="ce6">
            <text:p>76.1</text:p>
          </table:table-cell>
          <table:table-cell office:value-type="float" office:value="192" table:style-name="ce6">
            <text:p>192</text:p>
          </table:table-cell>
          <table:table-cell office:value-type="float" office:value="3.5609999999999999" table:style-name="ce6">
            <text:p>3.561</text:p>
          </table:table-cell>
          <table:table-cell office:value-type="date" office:date-value="2011-08-09T00:00:00" table:style-name="ce7">
            <text:p>8/9/2011</text:p>
          </table:table-cell>
          <table:table-cell table:number-columns-repeated="3" table:style-name="ce1"/>
          <table:table-cell table:style-name="ce14"/>
          <table:table-cell table:number-columns-repeated="16361"/>
        </table:table-row>
        <table:table-row table:style-name="ro1" table:visibility="filter">
          <table:table-cell office:value-type="string" table:style-name="ce4">
            <text:p>Audi</text:p>
          </table:table-cell>
          <table:table-cell office:value-type="string" table:style-name="ce5">
            <text:p>A8</text:p>
          </table:table-cell>
          <table:table-cell office:value-type="float" office:value="1380" table:style-name="ce11">
            <text:p>1380</text:p>
          </table:table-cell>
          <table:table-cell office:value-type="currency" office:value="62000" table:style-name="ce12">
            <text:p>$62,000</text:p>
          </table:table-cell>
          <table:table-cell office:value-type="currency" office:value="39000" table:style-name="ce12">
            <text:p>$39,000</text:p>
          </table:table-cell>
          <table:table-cell office:value-type="percentage" office:value="0.62903225806451613" table:formula="of:=SUM([.E7]/[.D7])" table:style-name="ce13">
            <text:p>63%</text:p>
          </table:table-cell>
          <table:table-cell office:value-type="string" office:string-value="POOR" table:formula="of:=IF([.F7]&gt;69%; &quot;GOOD&quot;; &quot;POOR&quot;)" table:style-name="ce21">
            <text:p>POOR</text:p>
          </table:table-cell>
          <table:table-cell office:value-type="float" office:value="4.2" table:style-name="ce6">
            <text:p>4.2</text:p>
          </table:table-cell>
          <table:table-cell office:value-type="float" office:value="310" table:style-name="ce6">
            <text:p>310</text:p>
          </table:table-cell>
          <table:table-cell office:value-type="string" office:string-value="High HP" table:formula="of:=COM.MICROSOFT.IFS([.I7]&gt;299;&quot;High HP&quot;;[.I7]&gt;99;&quot;Medium HP&quot;;[.I7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134.65685819999999" table:style-name="ce6">
            <text:p>134.6568582</text:p>
          </table:table-cell>
          <table:table-cell office:value-type="float" office:value="23.7" table:style-name="ce6">
            <text:p>23.7</text:p>
          </table:table-cell>
          <table:table-cell office:value-type="float" office:value="113" table:style-name="ce6">
            <text:p>113</text:p>
          </table:table-cell>
          <table:table-cell office:value-type="float" office:value="74" table:style-name="ce6">
            <text:p>74</text:p>
          </table:table-cell>
          <table:table-cell office:value-type="float" office:value="198.2" table:style-name="ce6">
            <text:p>198.2</text:p>
          </table:table-cell>
          <table:table-cell office:value-type="float" office:value="3.9020000000000001" table:style-name="ce6">
            <text:p>3.902</text:p>
          </table:table-cell>
          <table:table-cell office:value-type="date" office:date-value="2012-02-27T00:00:00" table:style-name="ce7">
            <text:p>2/27/2012</text:p>
          </table:table-cell>
          <table:table-cell table:number-columns-repeated="3" table:style-name="ce1"/>
          <table:table-cell table:style-name="ce14"/>
          <table:table-cell table:number-columns-repeated="16361"/>
        </table:table-row>
        <table:table-row table:style-name="ro1" table:visibility="filter">
          <table:table-cell office:value-type="string" table:style-name="ce4">
            <text:p>BMW</text:p>
          </table:table-cell>
          <table:table-cell office:value-type="string" table:style-name="ce5">
            <text:p>323i</text:p>
          </table:table-cell>
          <table:table-cell office:value-type="float" office:value="19747" table:style-name="ce11">
            <text:p>19747</text:p>
          </table:table-cell>
          <table:table-cell office:value-type="currency" office:value="26990" table:style-name="ce12">
            <text:p>$26,990</text:p>
          </table:table-cell>
          <table:table-cell office:value-type="currency" office:value="24500" table:style-name="ce12">
            <text:p>$24,500</text:p>
          </table:table-cell>
          <table:table-cell office:value-type="percentage" office:value="0.9077436087439793" table:formula="of:=SUM([.E8]/[.D8])" table:style-name="ce13">
            <text:p>91%</text:p>
          </table:table-cell>
          <table:table-cell office:value-type="string" office:string-value="GOOD" table:formula="of:=IF([.F8]&gt;69%; &quot;GOOD&quot;; &quot;POOR&quot;)" table:style-name="ce21">
            <text:p>GOOD</text:p>
          </table:table-cell>
          <table:table-cell office:value-type="float" office:value="2.5" table:style-name="ce6">
            <text:p>2.5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8]&gt;299;&quot;High HP&quot;;[.I8]&gt;99;&quot;Medium HP&quot;;[.I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71.191206710000003" table:style-name="ce6">
            <text:p>71.19120671</text:p>
          </table:table-cell>
          <table:table-cell office:value-type="float" office:value="16.600000000000001" table:style-name="ce6">
            <text:p>16.6</text:p>
          </table:table-cell>
          <table:table-cell office:value-type="float" office:value="107.3" table:style-name="ce6">
            <text:p>107.3</text:p>
          </table:table-cell>
          <table:table-cell office:value-type="float" office:value="68.400000000000006" table:style-name="ce6">
            <text:p>68.4</text:p>
          </table:table-cell>
          <table:table-cell office:value-type="float" office:value="176" table:style-name="ce6">
            <text:p>176</text:p>
          </table:table-cell>
          <table:table-cell office:value-type="float" office:value="3.1789999999999998" table:style-name="ce6">
            <text:p>3.179</text:p>
          </table:table-cell>
          <table:table-cell office:value-type="date" office:date-value="2011-06-28T00:00:00" table:style-name="ce7">
            <text:p>6/28/2011</text:p>
          </table:table-cell>
          <table:table-cell table:number-columns-repeated="3" table:style-name="ce1"/>
          <table:table-cell table:style-name="ce14"/>
          <table:table-cell table:number-columns-repeated="16361"/>
        </table:table-row>
        <table:table-row table:style-name="ro1" table:visibility="filter">
          <table:table-cell office:value-type="string" table:style-name="ce4">
            <text:p>BMW</text:p>
          </table:table-cell>
          <table:table-cell office:value-type="string" table:style-name="ce5">
            <text:p>328i</text:p>
          </table:table-cell>
          <table:table-cell office:value-type="float" office:value="9231" table:style-name="ce11">
            <text:p>9231</text:p>
          </table:table-cell>
          <table:table-cell office:value-type="currency" office:value="33400" table:style-name="ce12">
            <text:p>$33,400</text:p>
          </table:table-cell>
          <table:table-cell office:value-type="currency" office:value="28675" table:style-name="ce12">
            <text:p>$28,675</text:p>
          </table:table-cell>
          <table:table-cell office:value-type="percentage" office:value="0.85853293413173648" table:formula="of:=SUM([.E9]/[.D9])" table:style-name="ce13">
            <text:p>86%</text:p>
          </table:table-cell>
          <table:table-cell office:value-type="string" office:string-value="GOOD" table:formula="of:=IF([.F9]&gt;69%; &quot;GOOD&quot;; &quot;POOR&quot;)" table:style-name="ce21">
            <text:p>GOOD</text:p>
          </table:table-cell>
          <table:table-cell office:value-type="float" office:value="2.8" table:style-name="ce6">
            <text:p>2.8</text:p>
          </table:table-cell>
          <table:table-cell office:value-type="float" office:value="193" table:style-name="ce6">
            <text:p>193</text:p>
          </table:table-cell>
          <table:table-cell office:value-type="string" office:string-value="Medium HP" table:formula="of:=COM.MICROSOFT.IFS([.I9]&gt;299;&quot;High HP&quot;;[.I9]&gt;99;&quot;Medium HP&quot;;[.I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81.877068559999998" table:style-name="ce6">
            <text:p>81.87706856</text:p>
          </table:table-cell>
          <table:table-cell office:value-type="float" office:value="16.600000000000001" table:style-name="ce6">
            <text:p>16.6</text:p>
          </table:table-cell>
          <table:table-cell office:value-type="float" office:value="107.3" table:style-name="ce6">
            <text:p>107.3</text:p>
          </table:table-cell>
          <table:table-cell office:value-type="float" office:value="68.5" table:style-name="ce6">
            <text:p>68.5</text:p>
          </table:table-cell>
          <table:table-cell office:value-type="float" office:value="176" table:style-name="ce6">
            <text:p>176</text:p>
          </table:table-cell>
          <table:table-cell office:value-type="float" office:value="3.1970000000000001" table:style-name="ce6">
            <text:p>3.197</text:p>
          </table:table-cell>
          <table:table-cell office:value-type="date" office:date-value="2012-01-29T00:00:00" table:style-name="ce7">
            <text:p>1/29/2012</text:p>
          </table:table-cell>
          <table:table-cell table:number-columns-repeated="3" table:style-name="ce1"/>
          <table:table-cell table:style-name="ce14"/>
          <table:table-cell table:number-columns-repeated="16361"/>
        </table:table-row>
        <table:table-row table:style-name="ro1" table:visibility="filter">
          <table:table-cell office:value-type="string" table:style-name="ce4">
            <text:p>BMW</text:p>
          </table:table-cell>
          <table:table-cell office:value-type="string" table:style-name="ce5">
            <text:p>528i</text:p>
          </table:table-cell>
          <table:table-cell office:value-type="float" office:value="17527" table:style-name="ce11">
            <text:p>17527</text:p>
          </table:table-cell>
          <table:table-cell office:value-type="currency" office:value="38900" table:style-name="ce12">
            <text:p>$38,900</text:p>
          </table:table-cell>
          <table:table-cell office:value-type="currency" office:value="36125" table:style-name="ce12">
            <text:p>$36,125</text:p>
          </table:table-cell>
          <table:table-cell office:value-type="percentage" office:value="0.92866323907455017" table:formula="of:=SUM([.E10]/[.D10])" table:style-name="ce13">
            <text:p>93%</text:p>
          </table:table-cell>
          <table:table-cell office:value-type="string" office:string-value="GOOD" table:formula="of:=IF([.F10]&gt;69%; &quot;GOOD&quot;; &quot;POOR&quot;)" table:style-name="ce21">
            <text:p>GOOD</text:p>
          </table:table-cell>
          <table:table-cell office:value-type="float" office:value="2.8" table:style-name="ce6">
            <text:p>2.8</text:p>
          </table:table-cell>
          <table:table-cell office:value-type="float" office:value="193" table:style-name="ce6">
            <text:p>193</text:p>
          </table:table-cell>
          <table:table-cell office:value-type="string" office:string-value="Medium HP" table:formula="of:=COM.MICROSOFT.IFS([.I10]&gt;299;&quot;High HP&quot;;[.I10]&gt;99;&quot;Medium HP&quot;;[.I1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83.998723799999993" table:style-name="ce6">
            <text:p>83.9987238</text:p>
          </table:table-cell>
          <table:table-cell office:value-type="float" office:value="18.5" table:style-name="ce6">
            <text:p>18.5</text:p>
          </table:table-cell>
          <table:table-cell office:value-type="float" office:value="111.4" table:style-name="ce6">
            <text:p>111.4</text:p>
          </table:table-cell>
          <table:table-cell office:value-type="float" office:value="70.900000000000006" table:style-name="ce6">
            <text:p>70.9</text:p>
          </table:table-cell>
          <table:table-cell office:value-type="float" office:value="188" table:style-name="ce6">
            <text:p>188</text:p>
          </table:table-cell>
          <table:table-cell office:value-type="float" office:value="3.472" table:style-name="ce6">
            <text:p>3.472</text:p>
          </table:table-cell>
          <table:table-cell office:value-type="date" office:date-value="2011-04-04T00:00:00" table:style-name="ce7">
            <text:p>4/4/2011</text:p>
          </table:table-cell>
          <table:table-cell table:number-columns-repeated="3" table:style-name="ce1"/>
          <table:table-cell table:style-name="ce14"/>
          <table:table-cell table:number-columns-repeated="16361"/>
        </table:table-row>
        <table:table-row table:style-name="ro1" table:visibility="filter">
          <table:table-cell office:value-type="string" table:style-name="ce4">
            <text:p>Buick</text:p>
          </table:table-cell>
          <table:table-cell office:value-type="string" table:style-name="ce5">
            <text:p>Century</text:p>
          </table:table-cell>
          <table:table-cell office:value-type="float" office:value="91561" table:style-name="ce11">
            <text:p>91561</text:p>
          </table:table-cell>
          <table:table-cell office:value-type="currency" office:value="21975" table:style-name="ce12">
            <text:p>$21,975</text:p>
          </table:table-cell>
          <table:table-cell office:value-type="currency" office:value="12475" table:style-name="ce12">
            <text:p>$12,475</text:p>
          </table:table-cell>
          <table:table-cell office:value-type="percentage" office:value="0.56769055745164965" table:formula="of:=SUM([.E11]/[.D11])" table:style-name="ce13">
            <text:p>57%</text:p>
          </table:table-cell>
          <table:table-cell office:value-type="string" office:string-value="POOR" table:formula="of:=IF([.F11]&gt;69%; &quot;GOOD&quot;; &quot;POOR&quot;)" table:style-name="ce21">
            <text:p>POOR</text:p>
          </table:table-cell>
          <table:table-cell office:value-type="float" office:value="3.1" table:style-name="ce6">
            <text:p>3.1</text:p>
          </table:table-cell>
          <table:table-cell office:value-type="float" office:value="175" table:style-name="ce6">
            <text:p>175</text:p>
          </table:table-cell>
          <table:table-cell office:value-type="string" office:string-value="Medium HP" table:formula="of:=COM.MICROSOFT.IFS([.I11]&gt;299;&quot;High HP&quot;;[.I11]&gt;99;&quot;Medium HP&quot;;[.I1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71.181451319999994" table:style-name="ce6">
            <text:p>71.18145132</text:p>
          </table:table-cell>
          <table:table-cell office:value-type="float" office:value="17.5" table:style-name="ce6">
            <text:p>17.5</text:p>
          </table:table-cell>
          <table:table-cell office:value-type="float" office:value="109" table:style-name="ce6">
            <text:p>109</text:p>
          </table:table-cell>
          <table:table-cell office:value-type="float" office:value="72.7" table:style-name="ce6">
            <text:p>72.7</text:p>
          </table:table-cell>
          <table:table-cell office:value-type="float" office:value="194.6" table:style-name="ce6">
            <text:p>194.6</text:p>
          </table:table-cell>
          <table:table-cell office:value-type="float" office:value="3.3679999999999999" table:style-name="ce6">
            <text:p>3.368</text:p>
          </table:table-cell>
          <table:table-cell office:value-type="date" office:date-value="2011-11-02T00:00:00" table:style-name="ce7">
            <text:p>11/2/2011</text:p>
          </table:table-cell>
          <table:table-cell table:number-columns-repeated="3" table:style-name="ce1"/>
          <table:table-cell table:style-name="ce14"/>
          <table:table-cell table:number-columns-repeated="16361"/>
        </table:table-row>
        <table:table-row table:style-name="ro1" table:visibility="filter">
          <table:table-cell office:value-type="string" table:style-name="ce4">
            <text:p>Buick</text:p>
          </table:table-cell>
          <table:table-cell office:value-type="string" table:style-name="ce5">
            <text:p>Regal</text:p>
          </table:table-cell>
          <table:table-cell office:value-type="float" office:value="39350" table:style-name="ce11">
            <text:p>39350</text:p>
          </table:table-cell>
          <table:table-cell office:value-type="currency" office:value="25300" table:style-name="ce12">
            <text:p>$25,300</text:p>
          </table:table-cell>
          <table:table-cell office:value-type="currency" office:value="13740" table:style-name="ce12">
            <text:p>$13,740</text:p>
          </table:table-cell>
          <table:table-cell office:value-type="percentage" office:value="0.54308300395256914" table:formula="of:=SUM([.E12]/[.D12])" table:style-name="ce13">
            <text:p>54%</text:p>
          </table:table-cell>
          <table:table-cell office:value-type="string" office:string-value="POOR" table:formula="of:=IF([.F12]&gt;69%; &quot;GOOD&quot;; &quot;POOR&quot;)" table:style-name="ce21">
            <text:p>POOR</text:p>
          </table:table-cell>
          <table:table-cell office:value-type="float" office:value="3.8" table:style-name="ce6">
            <text:p>3.8</text:p>
          </table:table-cell>
          <table:table-cell office:value-type="float" office:value="240" table:style-name="ce6">
            <text:p>240</text:p>
          </table:table-cell>
          <table:table-cell office:value-type="string" office:string-value="Medium HP" table:formula="of:=COM.MICROSOFT.IFS([.I12]&gt;299;&quot;High HP&quot;;[.I12]&gt;99;&quot;Medium HP&quot;;[.I1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95.636702529999994" table:style-name="ce6">
            <text:p>95.63670253</text:p>
          </table:table-cell>
          <table:table-cell office:value-type="float" office:value="17.5" table:style-name="ce6">
            <text:p>17.5</text:p>
          </table:table-cell>
          <table:table-cell office:value-type="float" office:value="109" table:style-name="ce6">
            <text:p>109</text:p>
          </table:table-cell>
          <table:table-cell office:value-type="float" office:value="72.7" table:style-name="ce6">
            <text:p>72.7</text:p>
          </table:table-cell>
          <table:table-cell office:value-type="float" office:value="196.2" table:style-name="ce6">
            <text:p>196.2</text:p>
          </table:table-cell>
          <table:table-cell office:value-type="float" office:value="3.5430000000000001" table:style-name="ce6">
            <text:p>3.543</text:p>
          </table:table-cell>
          <table:table-cell office:value-type="date" office:date-value="2011-09-03T00:00:00" table:style-name="ce7">
            <text:p>9/3/2011</text:p>
          </table:table-cell>
          <table:table-cell table:number-columns-repeated="3" table:style-name="ce1"/>
          <table:table-cell table:style-name="ce14"/>
          <table:table-cell table:number-columns-repeated="16361"/>
        </table:table-row>
        <table:table-row table:style-name="ro1" table:visibility="filter">
          <table:table-cell office:value-type="string" table:style-name="ce4">
            <text:p>Buick</text:p>
          </table:table-cell>
          <table:table-cell office:value-type="string" table:style-name="ce5">
            <text:p>Park Avenue</text:p>
          </table:table-cell>
          <table:table-cell office:value-type="float" office:value="27851" table:style-name="ce11">
            <text:p>27851</text:p>
          </table:table-cell>
          <table:table-cell office:value-type="currency" office:value="31965" table:style-name="ce12">
            <text:p>$31,965</text:p>
          </table:table-cell>
          <table:table-cell office:value-type="currency" office:value="20190" table:style-name="ce12">
            <text:p>$20,190</text:p>
          </table:table-cell>
          <table:table-cell office:value-type="percentage" office:value="0.63162834350070385" table:formula="of:=SUM([.E13]/[.D13])" table:style-name="ce13">
            <text:p>63%</text:p>
          </table:table-cell>
          <table:table-cell office:value-type="string" office:string-value="POOR" table:formula="of:=IF([.F13]&gt;69%; &quot;GOOD&quot;; &quot;POOR&quot;)" table:style-name="ce21">
            <text:p>POOR</text:p>
          </table:table-cell>
          <table:table-cell office:value-type="float" office:value="3.8" table:style-name="ce6">
            <text:p>3.8</text:p>
          </table:table-cell>
          <table:table-cell office:value-type="float" office:value="205" table:style-name="ce6">
            <text:p>205</text:p>
          </table:table-cell>
          <table:table-cell office:value-type="string" office:string-value="Medium HP" table:formula="of:=COM.MICROSOFT.IFS([.I13]&gt;299;&quot;High HP&quot;;[.I13]&gt;99;&quot;Medium HP&quot;;[.I1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85.828408249999995" table:style-name="ce6">
            <text:p>85.82840825</text:p>
          </table:table-cell>
          <table:table-cell office:value-type="float" office:value="18.5" table:style-name="ce6">
            <text:p>18.5</text:p>
          </table:table-cell>
          <table:table-cell office:value-type="float" office:value="113.8" table:style-name="ce6">
            <text:p>113.8</text:p>
          </table:table-cell>
          <table:table-cell office:value-type="float" office:value="74.7" table:style-name="ce6">
            <text:p>74.7</text:p>
          </table:table-cell>
          <table:table-cell office:value-type="float" office:value="206.8" table:style-name="ce6">
            <text:p>206.8</text:p>
          </table:table-cell>
          <table:table-cell office:value-type="float" office:value="3.778" table:style-name="ce6">
            <text:p>3.778</text:p>
          </table:table-cell>
          <table:table-cell office:value-type="date" office:date-value="2012-03-23T00:00:00" table:style-name="ce7">
            <text:p>3/23/2012</text:p>
          </table:table-cell>
          <table:table-cell table:number-columns-repeated="3" table:style-name="ce1"/>
          <table:table-cell table:style-name="ce14"/>
          <table:table-cell table:number-columns-repeated="16361"/>
        </table:table-row>
        <table:table-row table:style-name="ro1" table:visibility="filter">
          <table:table-cell office:value-type="string" table:style-name="ce4">
            <text:p>Buick</text:p>
          </table:table-cell>
          <table:table-cell office:value-type="string" table:style-name="ce5">
            <text:p>LeSabre</text:p>
          </table:table-cell>
          <table:table-cell office:value-type="float" office:value="83257" table:style-name="ce11">
            <text:p>83257</text:p>
          </table:table-cell>
          <table:table-cell office:value-type="currency" office:value="27885" table:style-name="ce12">
            <text:p>$27,885</text:p>
          </table:table-cell>
          <table:table-cell office:value-type="currency" office:value="13360" table:style-name="ce12">
            <text:p>$13,360</text:p>
          </table:table-cell>
          <table:table-cell office:value-type="percentage" office:value="0.4791106329567868" table:formula="of:=SUM([.E14]/[.D14])" table:style-name="ce13">
            <text:p>48%</text:p>
          </table:table-cell>
          <table:table-cell office:value-type="string" office:string-value="POOR" table:formula="of:=IF([.F14]&gt;69%; &quot;GOOD&quot;; &quot;POOR&quot;)" table:style-name="ce21">
            <text:p>POOR</text:p>
          </table:table-cell>
          <table:table-cell office:value-type="float" office:value="3.8" table:style-name="ce6">
            <text:p>3.8</text:p>
          </table:table-cell>
          <table:table-cell office:value-type="float" office:value="205" table:style-name="ce6">
            <text:p>205</text:p>
          </table:table-cell>
          <table:table-cell office:value-type="string" office:string-value="Medium HP" table:formula="of:=COM.MICROSOFT.IFS([.I14]&gt;299;&quot;High HP&quot;;[.I14]&gt;99;&quot;Medium HP&quot;;[.I1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84.254525810000004" table:style-name="ce6">
            <text:p>84.25452581</text:p>
          </table:table-cell>
          <table:table-cell office:value-type="float" office:value="17.5" table:style-name="ce6">
            <text:p>17.5</text:p>
          </table:table-cell>
          <table:table-cell office:value-type="float" office:value="112.2" table:style-name="ce6">
            <text:p>112.2</text:p>
          </table:table-cell>
          <table:table-cell office:value-type="float" office:value="73.5" table:style-name="ce6">
            <text:p>73.5</text:p>
          </table:table-cell>
          <table:table-cell office:value-type="float" office:value="200" table:style-name="ce6">
            <text:p>200</text:p>
          </table:table-cell>
          <table:table-cell office:value-type="float" office:value="3.5910000000000002" table:style-name="ce6">
            <text:p>3.591</text:p>
          </table:table-cell>
          <table:table-cell office:value-type="date" office:date-value="2011-07-23T00:00:00" table:style-name="ce7">
            <text:p>7/23/2011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Cadillac</text:p>
          </table:table-cell>
          <table:table-cell office:value-type="string" table:style-name="ce5">
            <text:p>DeVille</text:p>
          </table:table-cell>
          <table:table-cell office:value-type="float" office:value="63729" table:style-name="ce11">
            <text:p>63729</text:p>
          </table:table-cell>
          <table:table-cell office:value-type="currency" office:value="39895" table:style-name="ce12">
            <text:p>$39,895</text:p>
          </table:table-cell>
          <table:table-cell office:value-type="currency" office:value="22525" table:style-name="ce12">
            <text:p>$22,525</text:p>
          </table:table-cell>
          <table:table-cell office:value-type="percentage" office:value="0.56460709362075445" table:formula="of:=SUM([.E15]/[.D15])" table:style-name="ce13">
            <text:p>56%</text:p>
          </table:table-cell>
          <table:table-cell office:value-type="string" office:string-value="POOR" table:formula="of:=IF([.F15]&gt;69%; &quot;GOOD&quot;; &quot;POOR&quot;)" table:style-name="ce21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75" table:style-name="ce6">
            <text:p>275</text:p>
          </table:table-cell>
          <table:table-cell office:value-type="string" office:string-value="Medium HP" table:formula="of:=COM.MICROSOFT.IFS([.I15]&gt;299;&quot;High HP&quot;;[.I15]&gt;99;&quot;Medium HP&quot;;[.I1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113.85459760000001" table:style-name="ce6">
            <text:p>113.8545976</text:p>
          </table:table-cell>
          <table:table-cell office:value-type="float" office:value="18.5" table:style-name="ce6">
            <text:p>18.5</text:p>
          </table:table-cell>
          <table:table-cell office:value-type="float" office:value="115.3" table:style-name="ce6">
            <text:p>115.3</text:p>
          </table:table-cell>
          <table:table-cell office:value-type="float" office:value="74.5" table:style-name="ce6">
            <text:p>74.5</text:p>
          </table:table-cell>
          <table:table-cell office:value-type="float" office:value="207.2" table:style-name="ce6">
            <text:p>207.2</text:p>
          </table:table-cell>
          <table:table-cell office:value-type="float" office:value="3.9780000000000002" table:style-name="ce6">
            <text:p>3.978</text:p>
          </table:table-cell>
          <table:table-cell office:value-type="date" office:date-value="2012-02-23T00:00:00" table:style-name="ce7">
            <text:p>2/23/2012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Cadillac</text:p>
          </table:table-cell>
          <table:table-cell office:value-type="string" table:style-name="ce5">
            <text:p>Seville</text:p>
          </table:table-cell>
          <table:table-cell office:value-type="float" office:value="15943" table:style-name="ce11">
            <text:p>15943</text:p>
          </table:table-cell>
          <table:table-cell office:value-type="currency" office:value="44475" table:style-name="ce12">
            <text:p>$44,475</text:p>
          </table:table-cell>
          <table:table-cell office:value-type="currency" office:value="27100" table:style-name="ce12">
            <text:p>$27,100</text:p>
          </table:table-cell>
          <table:table-cell office:value-type="percentage" office:value="0.60933108487914556" table:formula="of:=SUM([.E16]/[.D16])" table:style-name="ce13">
            <text:p>61%</text:p>
          </table:table-cell>
          <table:table-cell office:value-type="string" office:string-value="POOR" table:formula="of:=IF([.F16]&gt;69%; &quot;GOOD&quot;; &quot;POOR&quot;)" table:style-name="ce21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75" table:style-name="ce6">
            <text:p>275</text:p>
          </table:table-cell>
          <table:table-cell office:value-type="string" office:string-value="Medium HP" table:formula="of:=COM.MICROSOFT.IFS([.I16]&gt;299;&quot;High HP&quot;;[.I16]&gt;99;&quot;Medium HP&quot;;[.I1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115.6213578" table:style-name="ce6">
            <text:p>115.6213578</text:p>
          </table:table-cell>
          <table:table-cell office:value-type="float" office:value="18.5" table:style-name="ce6">
            <text:p>18.5</text:p>
          </table:table-cell>
          <table:table-cell office:value-type="float" office:value="112.2" table:style-name="ce6">
            <text:p>112.2</text:p>
          </table:table-cell>
          <table:table-cell office:value-type="float" office:value="75" table:style-name="ce6">
            <text:p>75</text:p>
          </table:table-cell>
          <table:table-cell office:value-type="float" office:value="201" table:style-name="ce6">
            <text:p>201</text:p>
          </table:table-cell>
          <table:table-cell office:value-type="float" office:value="3.875" table:style-name="ce6">
            <text:p>3.875</text:p>
          </table:table-cell>
          <table:table-cell office:value-type="date" office:date-value="2011-04-29T00:00:00" table:style-name="ce7">
            <text:p>4/29/2011</text:p>
          </table:table-cell>
          <table:table-cell table:number-columns-repeated="2" table:style-name="ce1"/>
          <table:table-cell table:style-name="ce14"/>
          <table:table-cell table:number-columns-repeated="16362" table:style-name="ce1"/>
        </table:table-row>
        <table:table-row table:style-name="ro1" table:visibility="filter">
          <table:table-cell office:value-type="string" table:style-name="ce4">
            <text:p>Cadillac</text:p>
          </table:table-cell>
          <table:table-cell office:value-type="string" table:style-name="ce5">
            <text:p>Eldorado</text:p>
          </table:table-cell>
          <table:table-cell office:value-type="float" office:value="6536" table:style-name="ce11">
            <text:p>6536</text:p>
          </table:table-cell>
          <table:table-cell office:value-type="currency" office:value="39665" table:style-name="ce12">
            <text:p>$39,665</text:p>
          </table:table-cell>
          <table:table-cell office:value-type="currency" office:value="25725" table:style-name="ce12">
            <text:p>$25,725</text:p>
          </table:table-cell>
          <table:table-cell office:value-type="percentage" office:value="0.6485566620446237" table:formula="of:=SUM([.E17]/[.D17])" table:style-name="ce13">
            <text:p>65%</text:p>
          </table:table-cell>
          <table:table-cell office:value-type="string" office:string-value="POOR" table:formula="of:=IF([.F17]&gt;69%; &quot;GOOD&quot;; &quot;POOR&quot;)" table:style-name="ce21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75" table:style-name="ce6">
            <text:p>275</text:p>
          </table:table-cell>
          <table:table-cell office:value-type="string" office:string-value="Medium HP" table:formula="of:=COM.MICROSOFT.IFS([.I17]&gt;299;&quot;High HP&quot;;[.I17]&gt;99;&quot;Medium HP&quot;;[.I1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113.7658739" table:style-name="ce6">
            <text:p>113.7658739</text:p>
          </table:table-cell>
          <table:table-cell office:value-type="float" office:value="19" table:style-name="ce6">
            <text:p>19</text:p>
          </table:table-cell>
          <table:table-cell office:value-type="float" office:value="108" table:style-name="ce6">
            <text:p>108</text:p>
          </table:table-cell>
          <table:table-cell office:value-type="float" office:value="75.5" table:style-name="ce6">
            <text:p>75.5</text:p>
          </table:table-cell>
          <table:table-cell office:value-type="float" office:value="200.6" table:style-name="ce6">
            <text:p>200.6</text:p>
          </table:table-cell>
          <table:table-cell office:value-type="float" office:value="3.843" table:style-name="ce6">
            <text:p>3.843</text:p>
          </table:table-cell>
          <table:table-cell office:value-type="date" office:date-value="2011-11-27T00:00:00" table:style-name="ce7">
            <text:p>11/27/2011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Cadillac</text:p>
          </table:table-cell>
          <table:table-cell office:value-type="string" table:style-name="ce5">
            <text:p>Catera</text:p>
          </table:table-cell>
          <table:table-cell office:value-type="float" office:value="11185" table:style-name="ce11">
            <text:p>11185</text:p>
          </table:table-cell>
          <table:table-cell office:value-type="currency" office:value="31010" table:style-name="ce12">
            <text:p>$31,010</text:p>
          </table:table-cell>
          <table:table-cell office:value-type="currency" office:value="18225" table:style-name="ce12">
            <text:p>$18,225</text:p>
          </table:table-cell>
          <table:table-cell office:value-type="percentage" office:value="0.58771364076104482" table:formula="of:=SUM([.E18]/[.D18])" table:style-name="ce13">
            <text:p>59%</text:p>
          </table:table-cell>
          <table:table-cell office:value-type="string" office:string-value="POOR" table:formula="of:=IF([.F18]&gt;69%; &quot;GOOD&quot;; &quot;POOR&quot;)" table:style-name="ce21">
            <text:p>POOR</text:p>
          </table:table-cell>
          <table:table-cell office:value-type="float" office:value="3" table:style-name="ce6">
            <text:p>3</text:p>
          </table:table-cell>
          <table:table-cell office:value-type="float" office:value="200" table:style-name="ce6">
            <text:p>200</text:p>
          </table:table-cell>
          <table:table-cell office:value-type="string" office:string-value="Medium HP" table:formula="of:=COM.MICROSOFT.IFS([.I18]&gt;299;&quot;High HP&quot;;[.I18]&gt;99;&quot;Medium HP&quot;;[.I1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83.483093580000002" table:style-name="ce6">
            <text:p>83.48309358</text:p>
          </table:table-cell>
          <table:table-cell office:value-type="float" office:value="18" table:style-name="ce6">
            <text:p>18</text:p>
          </table:table-cell>
          <table:table-cell office:value-type="float" office:value="107.4" table:style-name="ce6">
            <text:p>107.4</text:p>
          </table:table-cell>
          <table:table-cell office:value-type="float" office:value="70.3" table:style-name="ce6">
            <text:p>70.3</text:p>
          </table:table-cell>
          <table:table-cell office:value-type="float" office:value="194.8" table:style-name="ce6">
            <text:p>194.8</text:p>
          </table:table-cell>
          <table:table-cell office:value-type="float" office:value="3.77" table:style-name="ce6">
            <text:p>3.77</text:p>
          </table:table-cell>
          <table:table-cell office:value-type="date" office:date-value="2011-09-28T00:00:00" table:style-name="ce7">
            <text:p>9/28/2011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Cadillac</text:p>
          </table:table-cell>
          <table:table-cell office:value-type="string" table:style-name="ce5">
            <text:p>Escalade</text:p>
          </table:table-cell>
          <table:table-cell office:value-type="float" office:value="14785" table:style-name="ce11">
            <text:p>14785</text:p>
          </table:table-cell>
          <table:table-cell office:value-type="currency" office:value="46225" table:style-name="ce12">
            <text:p>$46,225</text:p>
          </table:table-cell>
          <table:table-cell office:value-type="currency" office:value="31245" table:style-name="ce12">
            <text:p>$31,245</text:p>
          </table:table-cell>
          <table:table-cell office:value-type="percentage" office:value="0.67593293672255272" table:formula="of:=SUM([.E19]/[.D19])" table:style-name="ce13">
            <text:p>68%</text:p>
          </table:table-cell>
          <table:table-cell office:value-type="string" office:string-value="POOR" table:formula="of:=IF([.F19]&gt;69%; &quot;GOOD&quot;; &quot;POOR&quot;)" table:style-name="ce21">
            <text:p>POOR</text:p>
          </table:table-cell>
          <table:table-cell office:value-type="float" office:value="5.7" table:style-name="ce6">
            <text:p>5.7</text:p>
          </table:table-cell>
          <table:table-cell office:value-type="float" office:value="255" table:style-name="ce6">
            <text:p>255</text:p>
          </table:table-cell>
          <table:table-cell office:value-type="string" office:string-value="Medium HP" table:formula="of:=COM.MICROSOFT.IFS([.I19]&gt;299;&quot;High HP&quot;;[.I19]&gt;99;&quot;Medium HP&quot;;[.I1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5" table:style-name="ce6">
            <text:p>15</text:p>
          </table:table-cell>
          <table:table-cell office:value-type="float" office:value="109.5091165" table:style-name="ce6">
            <text:p>109.5091165</text:p>
          </table:table-cell>
          <table:table-cell office:value-type="float" office:value="30" table:style-name="ce6">
            <text:p>30</text:p>
          </table:table-cell>
          <table:table-cell office:value-type="float" office:value="117.5" table:style-name="ce6">
            <text:p>117.5</text:p>
          </table:table-cell>
          <table:table-cell office:value-type="float" office:value="77" table:style-name="ce6">
            <text:p>77</text:p>
          </table:table-cell>
          <table:table-cell office:value-type="float" office:value="201.2" table:style-name="ce6">
            <text:p>201.2</text:p>
          </table:table-cell>
          <table:table-cell office:value-type="float" office:value="5.5720000000000001" table:style-name="ce6">
            <text:p>5.572</text:p>
          </table:table-cell>
          <table:table-cell office:value-type="date" office:date-value="2012-04-17T00:00:00" table:style-name="ce7">
            <text:p>4/17/2012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Chevrolet</text:p>
          </table:table-cell>
          <table:table-cell office:value-type="string" table:style-name="ce5">
            <text:p>Cavalier</text:p>
          </table:table-cell>
          <table:table-cell office:value-type="float" office:value="145519" table:style-name="ce11">
            <text:p>145519</text:p>
          </table:table-cell>
          <table:table-cell office:value-type="currency" office:value="13260" table:style-name="ce12">
            <text:p>$13,260</text:p>
          </table:table-cell>
          <table:table-cell office:value-type="currency" office:value="9250" table:style-name="ce12">
            <text:p>$9,250</text:p>
          </table:table-cell>
          <table:table-cell office:value-type="percentage" office:value="0.69758672699849167" table:formula="of:=SUM([.E20]/[.D20])" table:style-name="ce13">
            <text:p>70%</text:p>
          </table:table-cell>
          <table:table-cell office:value-type="string" office:string-value="GOOD" table:formula="of:=IF([.F20]&gt;69%; &quot;GOOD&quot;; &quot;POOR&quot;)" table:style-name="ce21">
            <text:p>GOOD</text:p>
          </table:table-cell>
          <table:table-cell office:value-type="float" office:value="2.2000000000000002" table:style-name="ce6">
            <text:p>2.2</text:p>
          </table:table-cell>
          <table:table-cell office:value-type="float" office:value="115" table:style-name="ce6">
            <text:p>115</text:p>
          </table:table-cell>
          <table:table-cell office:value-type="string" office:string-value="Medium HP" table:formula="of:=COM.MICROSOFT.IFS([.I20]&gt;299;&quot;High HP&quot;;[.I20]&gt;99;&quot;Medium HP&quot;;[.I2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46.363347470000001" table:style-name="ce6">
            <text:p>46.36334747</text:p>
          </table:table-cell>
          <table:table-cell office:value-type="float" office:value="14.3" table:style-name="ce6">
            <text:p>14.3</text:p>
          </table:table-cell>
          <table:table-cell office:value-type="float" office:value="104.1" table:style-name="ce6">
            <text:p>104.1</text:p>
          </table:table-cell>
          <table:table-cell office:value-type="float" office:value="67.900000000000006" table:style-name="ce6">
            <text:p>67.9</text:p>
          </table:table-cell>
          <table:table-cell office:value-type="float" office:value="180.9" table:style-name="ce6">
            <text:p>180.9</text:p>
          </table:table-cell>
          <table:table-cell office:value-type="float" office:value="2.6760000000000002" table:style-name="ce6">
            <text:p>2.676</text:p>
          </table:table-cell>
          <table:table-cell office:value-type="date" office:date-value="2011-08-17T00:00:00" table:style-name="ce7">
            <text:p>8/17/2011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Chevrolet</text:p>
          </table:table-cell>
          <table:table-cell office:value-type="string" table:style-name="ce5">
            <text:p>Malibu</text:p>
          </table:table-cell>
          <table:table-cell office:value-type="float" office:value="135126" table:style-name="ce11">
            <text:p>135126</text:p>
          </table:table-cell>
          <table:table-cell office:value-type="currency" office:value="16535" table:style-name="ce12">
            <text:p>$16,535</text:p>
          </table:table-cell>
          <table:table-cell office:value-type="currency" office:value="11225" table:style-name="ce12">
            <text:p>$11,225</text:p>
          </table:table-cell>
          <table:table-cell office:value-type="percentage" office:value="0.67886301784094349" table:formula="of:=SUM([.E21]/[.D21])" table:style-name="ce13">
            <text:p>68%</text:p>
          </table:table-cell>
          <table:table-cell office:value-type="string" office:string-value="POOR" table:formula="of:=IF([.F21]&gt;69%; &quot;GOOD&quot;; &quot;POOR&quot;)" table:style-name="ce21">
            <text:p>POOR</text:p>
          </table:table-cell>
          <table:table-cell office:value-type="float" office:value="3.1" table:style-name="ce6">
            <text:p>3.1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21]&gt;299;&quot;High HP&quot;;[.I21]&gt;99;&quot;Medium HP&quot;;[.I2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67.314462160000005" table:style-name="ce6">
            <text:p>67.31446216</text:p>
          </table:table-cell>
          <table:table-cell office:value-type="float" office:value="15" table:style-name="ce6">
            <text:p>15</text:p>
          </table:table-cell>
          <table:table-cell office:value-type="float" office:value="107" table:style-name="ce6">
            <text:p>107</text:p>
          </table:table-cell>
          <table:table-cell office:value-type="float" office:value="69.400000000000006" table:style-name="ce6">
            <text:p>69.4</text:p>
          </table:table-cell>
          <table:table-cell office:value-type="float" office:value="190.4" table:style-name="ce6">
            <text:p>190.4</text:p>
          </table:table-cell>
          <table:table-cell office:value-type="float" office:value="3.0510000000000002" table:style-name="ce6">
            <text:p>3.051</text:p>
          </table:table-cell>
          <table:table-cell office:value-type="date" office:date-value="2012-03-19T00:00:00" table:style-name="ce7">
            <text:p>3/19/2012</text:p>
          </table:table-cell>
          <table:table-cell table:number-columns-repeated="2" table:style-name="ce1"/>
          <table:table-cell table:number-columns-repeated="2" table:style-name="ce2"/>
          <table:table-cell table:number-columns-repeated="3" table:style-name="ce16"/>
          <table:table-cell table:number-columns-repeated="16358"/>
        </table:table-row>
        <table:table-row table:style-name="ro1" table:visibility="filter">
          <table:table-cell office:value-type="string" table:style-name="ce4">
            <text:p>Chevrolet</text:p>
          </table:table-cell>
          <table:table-cell office:value-type="string" table:style-name="ce5">
            <text:p>Lumina</text:p>
          </table:table-cell>
          <table:table-cell office:value-type="float" office:value="24629" table:style-name="ce11">
            <text:p>24629</text:p>
          </table:table-cell>
          <table:table-cell office:value-type="currency" office:value="18890" table:style-name="ce12">
            <text:p>$18,890</text:p>
          </table:table-cell>
          <table:table-cell office:value-type="currency" office:value="10310" table:style-name="ce12">
            <text:p>$10,310</text:p>
          </table:table-cell>
          <table:table-cell office:value-type="percentage" office:value="0.54579142403388037" table:formula="of:=SUM([.E22]/[.D22])" table:style-name="ce13">
            <text:p>55%</text:p>
          </table:table-cell>
          <table:table-cell office:value-type="string" office:string-value="POOR" table:formula="of:=IF([.F22]&gt;69%; &quot;GOOD&quot;; &quot;POOR&quot;)" table:style-name="ce21">
            <text:p>POOR</text:p>
          </table:table-cell>
          <table:table-cell office:value-type="float" office:value="3.1" table:style-name="ce6">
            <text:p>3.1</text:p>
          </table:table-cell>
          <table:table-cell office:value-type="float" office:value="175" table:style-name="ce6">
            <text:p>175</text:p>
          </table:table-cell>
          <table:table-cell office:value-type="string" office:string-value="Medium HP" table:formula="of:=COM.MICROSOFT.IFS([.I22]&gt;299;&quot;High HP&quot;;[.I22]&gt;99;&quot;Medium HP&quot;;[.I2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69.991395600000004" table:style-name="ce6">
            <text:p>69.9913956</text:p>
          </table:table-cell>
          <table:table-cell office:value-type="float" office:value="16.600000000000001" table:style-name="ce6">
            <text:p>16.6</text:p>
          </table:table-cell>
          <table:table-cell office:value-type="float" office:value="107.5" table:style-name="ce6">
            <text:p>107.5</text:p>
          </table:table-cell>
          <table:table-cell office:value-type="float" office:value="72.5" table:style-name="ce6">
            <text:p>72.5</text:p>
          </table:table-cell>
          <table:table-cell office:value-type="float" office:value="200.9" table:style-name="ce6">
            <text:p>200.9</text:p>
          </table:table-cell>
          <table:table-cell office:value-type="float" office:value="3.33" table:style-name="ce6">
            <text:p>3.33</text:p>
          </table:table-cell>
          <table:table-cell office:value-type="date" office:date-value="2011-05-24T00:00:00" table:style-name="ce7">
            <text:p>5/24/2011</text:p>
          </table:table-cell>
          <table:table-cell table:number-columns-repeated="4" table:style-name="ce1"/>
          <table:table-cell table:number-columns-repeated="3" table:style-name="ce15"/>
          <table:table-cell table:number-columns-repeated="16358"/>
        </table:table-row>
        <table:table-row table:style-name="ro1" table:visibility="filter">
          <table:table-cell office:value-type="string" table:style-name="ce4">
            <text:p>Chevrolet</text:p>
          </table:table-cell>
          <table:table-cell office:value-type="string" table:style-name="ce5">
            <text:p>Monte Carlo</text:p>
          </table:table-cell>
          <table:table-cell office:value-type="float" office:value="42593" table:style-name="ce11">
            <text:p>42593</text:p>
          </table:table-cell>
          <table:table-cell office:value-type="currency" office:value="19390" table:style-name="ce12">
            <text:p>$19,390</text:p>
          </table:table-cell>
          <table:table-cell office:value-type="currency" office:value="11525" table:style-name="ce12">
            <text:p>$11,525</text:p>
          </table:table-cell>
          <table:table-cell office:value-type="percentage" office:value="0.59437854564208359" table:formula="of:=SUM([.E23]/[.D23])" table:style-name="ce13">
            <text:p>59%</text:p>
          </table:table-cell>
          <table:table-cell office:value-type="string" office:string-value="POOR" table:formula="of:=IF([.F23]&gt;69%; &quot;GOOD&quot;; &quot;POOR&quot;)" table:style-name="ce21">
            <text:p>POOR</text:p>
          </table:table-cell>
          <table:table-cell office:value-type="float" office:value="3.4" table:style-name="ce6">
            <text:p>3.4</text:p>
          </table:table-cell>
          <table:table-cell office:value-type="float" office:value="180" table:style-name="ce6">
            <text:p>180</text:p>
          </table:table-cell>
          <table:table-cell office:value-type="string" office:string-value="Medium HP" table:formula="of:=COM.MICROSOFT.IFS([.I23]&gt;299;&quot;High HP&quot;;[.I23]&gt;99;&quot;Medium HP&quot;;[.I2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72.030917189999997" table:style-name="ce6">
            <text:p>72.03091719</text:p>
          </table:table-cell>
          <table:table-cell office:value-type="float" office:value="17" table:style-name="ce6">
            <text:p>17</text:p>
          </table:table-cell>
          <table:table-cell office:value-type="float" office:value="110.5" table:style-name="ce6">
            <text:p>110.5</text:p>
          </table:table-cell>
          <table:table-cell office:value-type="float" office:value="72.7" table:style-name="ce6">
            <text:p>72.7</text:p>
          </table:table-cell>
          <table:table-cell office:value-type="float" office:value="197.9" table:style-name="ce6">
            <text:p>197.9</text:p>
          </table:table-cell>
          <table:table-cell office:value-type="float" office:value="3.34" table:style-name="ce6">
            <text:p>3.34</text:p>
          </table:table-cell>
          <table:table-cell office:value-type="date" office:date-value="2011-12-22T00:00:00" table:style-name="ce7">
            <text:p>12/22/2011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Chevrolet</text:p>
          </table:table-cell>
          <table:table-cell office:value-type="string" table:style-name="ce5">
            <text:p>Camaro</text:p>
          </table:table-cell>
          <table:table-cell office:value-type="float" office:value="26402" table:style-name="ce11">
            <text:p>26402</text:p>
          </table:table-cell>
          <table:table-cell office:value-type="currency" office:value="24340" table:style-name="ce12">
            <text:p>$24,340</text:p>
          </table:table-cell>
          <table:table-cell office:value-type="currency" office:value="13025" table:style-name="ce12">
            <text:p>$13,025</text:p>
          </table:table-cell>
          <table:table-cell office:value-type="percentage" office:value="0.53512736236647496" table:formula="of:=SUM([.E24]/[.D24])" table:style-name="ce13">
            <text:p>54%</text:p>
          </table:table-cell>
          <table:table-cell office:value-type="string" office:string-value="POOR" table:formula="of:=IF([.F24]&gt;69%; &quot;GOOD&quot;; &quot;POOR&quot;)" table:style-name="ce21">
            <text:p>POOR</text:p>
          </table:table-cell>
          <table:table-cell office:value-type="float" office:value="3.8" table:style-name="ce6">
            <text:p>3.8</text:p>
          </table:table-cell>
          <table:table-cell office:value-type="float" office:value="200" table:style-name="ce6">
            <text:p>200</text:p>
          </table:table-cell>
          <table:table-cell office:value-type="string" office:string-value="Medium HP" table:formula="of:=COM.MICROSOFT.IFS([.I24]&gt;299;&quot;High HP&quot;;[.I24]&gt;99;&quot;Medium HP&quot;;[.I2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81.118543329999994" table:style-name="ce6">
            <text:p>81.11854333</text:p>
          </table:table-cell>
          <table:table-cell office:value-type="float" office:value="16.8" table:style-name="ce6">
            <text:p>16.8</text:p>
          </table:table-cell>
          <table:table-cell office:value-type="float" office:value="101.1" table:style-name="ce6">
            <text:p>101.1</text:p>
          </table:table-cell>
          <table:table-cell office:value-type="float" office:value="74.099999999999994" table:style-name="ce6">
            <text:p>74.1</text:p>
          </table:table-cell>
          <table:table-cell office:value-type="float" office:value="193.2" table:style-name="ce6">
            <text:p>193.2</text:p>
          </table:table-cell>
          <table:table-cell office:value-type="float" office:value="3.5" table:style-name="ce6">
            <text:p>3.5</text:p>
          </table:table-cell>
          <table:table-cell office:value-type="date" office:date-value="2011-10-23T00:00:00" table:style-name="ce7">
            <text:p>10/23/2011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Chevrolet</text:p>
          </table:table-cell>
          <table:table-cell office:value-type="string" table:style-name="ce5">
            <text:p>Corvette</text:p>
          </table:table-cell>
          <table:table-cell office:value-type="float" office:value="17947" table:style-name="ce11">
            <text:p>17947</text:p>
          </table:table-cell>
          <table:table-cell office:value-type="currency" office:value="55705" table:style-name="ce12">
            <text:p>$55,705</text:p>
          </table:table-cell>
          <table:table-cell office:value-type="currency" office:value="36225" table:style-name="ce12">
            <text:p>$36,225</text:p>
          </table:table-cell>
          <table:table-cell office:value-type="percentage" office:value="0.65030069114083111" table:formula="of:=SUM([.E25]/[.D25])" table:style-name="ce13">
            <text:p>65%</text:p>
          </table:table-cell>
          <table:table-cell office:value-type="string" office:string-value="POOR" table:formula="of:=IF([.F25]&gt;69%; &quot;GOOD&quot;; &quot;POOR&quot;)" table:style-name="ce21">
            <text:p>POOR</text:p>
          </table:table-cell>
          <table:table-cell office:value-type="float" office:value="5.7" table:style-name="ce6">
            <text:p>5.7</text:p>
          </table:table-cell>
          <table:table-cell office:value-type="float" office:value="345" table:style-name="ce6">
            <text:p>345</text:p>
          </table:table-cell>
          <table:table-cell office:value-type="string" office:string-value="High HP" table:formula="of:=COM.MICROSOFT.IFS([.I25]&gt;299;&quot;High HP&quot;;[.I25]&gt;99;&quot;Medium HP&quot;;[.I25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141.14115000000001" table:style-name="ce6">
            <text:p>141.14115</text:p>
          </table:table-cell>
          <table:table-cell office:value-type="float" office:value="19.100000000000001" table:style-name="ce6">
            <text:p>19.1</text:p>
          </table:table-cell>
          <table:table-cell office:value-type="float" office:value="104.5" table:style-name="ce6">
            <text:p>104.5</text:p>
          </table:table-cell>
          <table:table-cell office:value-type="float" office:value="73.599999999999994" table:style-name="ce6">
            <text:p>73.6</text:p>
          </table:table-cell>
          <table:table-cell office:value-type="float" office:value="179.7" table:style-name="ce6">
            <text:p>179.7</text:p>
          </table:table-cell>
          <table:table-cell office:value-type="float" office:value="3.21" table:style-name="ce6">
            <text:p>3.21</text:p>
          </table:table-cell>
          <table:table-cell office:value-type="date" office:date-value="2012-05-12T00:00:00" table:style-name="ce7">
            <text:p>5/12/2012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Chevrolet</text:p>
          </table:table-cell>
          <table:table-cell office:value-type="string" table:style-name="ce5">
            <text:p>Prizm</text:p>
          </table:table-cell>
          <table:table-cell office:value-type="float" office:value="32299" table:style-name="ce11">
            <text:p>32299</text:p>
          </table:table-cell>
          <table:table-cell office:value-type="currency" office:value="13960" table:style-name="ce12">
            <text:p>$13,960</text:p>
          </table:table-cell>
          <table:table-cell office:value-type="currency" office:value="9125" table:style-name="ce12">
            <text:p>$9,125</text:p>
          </table:table-cell>
          <table:table-cell office:value-type="percentage" office:value="0.65365329512893988" table:formula="of:=SUM([.E26]/[.D26])" table:style-name="ce13">
            <text:p>65%</text:p>
          </table:table-cell>
          <table:table-cell office:value-type="string" office:string-value="POOR" table:formula="of:=IF([.F26]&gt;69%; &quot;GOOD&quot;; &quot;POOR&quot;)" table:style-name="ce21">
            <text:p>POOR</text:p>
          </table:table-cell>
          <table:table-cell office:value-type="float" office:value="1.8" table:style-name="ce6">
            <text:p>1.8</text:p>
          </table:table-cell>
          <table:table-cell office:value-type="float" office:value="120" table:style-name="ce6">
            <text:p>120</text:p>
          </table:table-cell>
          <table:table-cell office:value-type="string" office:string-value="Medium HP" table:formula="of:=COM.MICROSOFT.IFS([.I26]&gt;299;&quot;High HP&quot;;[.I26]&gt;99;&quot;Medium HP&quot;;[.I2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3" table:style-name="ce6">
            <text:p>33</text:p>
          </table:table-cell>
          <table:table-cell office:value-type="float" office:value="48.297636099999998" table:style-name="ce6">
            <text:p>48.2976361</text:p>
          </table:table-cell>
          <table:table-cell office:value-type="float" office:value="13.2" table:style-name="ce6">
            <text:p>13.2</text:p>
          </table:table-cell>
          <table:table-cell office:value-type="float" office:value="97.1" table:style-name="ce6">
            <text:p>97.1</text:p>
          </table:table-cell>
          <table:table-cell office:value-type="float" office:value="66.7" table:style-name="ce6">
            <text:p>66.7</text:p>
          </table:table-cell>
          <table:table-cell office:value-type="float" office:value="174.3" table:style-name="ce6">
            <text:p>174.3</text:p>
          </table:table-cell>
          <table:table-cell office:value-type="float" office:value="2.3980000000000001" table:style-name="ce6">
            <text:p>2.398</text:p>
          </table:table-cell>
          <table:table-cell office:value-type="date" office:date-value="2011-09-11T00:00:00" table:style-name="ce7">
            <text:p>9/11/2011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Chevrolet</text:p>
          </table:table-cell>
          <table:table-cell office:value-type="string" table:style-name="ce5">
            <text:p>Metro</text:p>
          </table:table-cell>
          <table:table-cell office:value-type="float" office:value="21855" table:style-name="ce11">
            <text:p>21855</text:p>
          </table:table-cell>
          <table:table-cell office:value-type="currency" office:value="9235" table:style-name="ce12">
            <text:p>$9,235</text:p>
          </table:table-cell>
          <table:table-cell office:value-type="currency" office:value="5160" table:style-name="ce12">
            <text:p>$5,160</text:p>
          </table:table-cell>
          <table:table-cell office:value-type="percentage" office:value="0.55874390904168925" table:formula="of:=SUM([.E27]/[.D27])" table:style-name="ce13">
            <text:p>56%</text:p>
          </table:table-cell>
          <table:table-cell office:value-type="string" office:string-value="POOR" table:formula="of:=IF([.F27]&gt;69%; &quot;GOOD&quot;; &quot;POOR&quot;)" table:style-name="ce21">
            <text:p>POOR</text:p>
          </table:table-cell>
          <table:table-cell office:value-type="float" office:value="1" table:style-name="ce6">
            <text:p>1</text:p>
          </table:table-cell>
          <table:table-cell office:value-type="float" office:value="55" table:style-name="ce6">
            <text:p>55</text:p>
          </table:table-cell>
          <table:table-cell office:value-type="string" office:string-value="Low HP" table:formula="of:=COM.MICROSOFT.IFS([.I27]&gt;299;&quot;High HP&quot;;[.I27]&gt;99;&quot;Medium HP&quot;;[.I27]&lt;100;&quot;Low HP&quot;)" table:number-matrix-columns-spanned="1" table:number-matrix-rows-spanned="1" table:style-name="ce6">
            <text:p>Low HP</text:p>
          </table:table-cell>
          <table:table-cell office:value-type="string" table:style-name="ce6">
            <text:p>Passenger</text:p>
          </table:table-cell>
          <table:table-cell office:value-type="float" office:value="45" table:style-name="ce6">
            <text:p>45</text:p>
          </table:table-cell>
          <table:table-cell office:value-type="float" office:value="23.276272330000001" table:style-name="ce6">
            <text:p>23.27627233</text:p>
          </table:table-cell>
          <table:table-cell office:value-type="float" office:value="10.3" table:style-name="ce6">
            <text:p>10.3</text:p>
          </table:table-cell>
          <table:table-cell office:value-type="float" office:value="93.1" table:style-name="ce6">
            <text:p>93.1</text:p>
          </table:table-cell>
          <table:table-cell office:value-type="float" office:value="62.6" table:style-name="ce6">
            <text:p>62.6</text:p>
          </table:table-cell>
          <table:table-cell office:value-type="float" office:value="149.4" table:style-name="ce6">
            <text:p>149.4</text:p>
          </table:table-cell>
          <table:table-cell office:value-type="float" office:value="1.895" table:style-name="ce6">
            <text:p>1.895</text:p>
          </table:table-cell>
          <table:table-cell office:value-type="date" office:date-value="2012-04-13T00:00:00" table:style-name="ce7">
            <text:p>4/13/2012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Chevrolet</text:p>
          </table:table-cell>
          <table:table-cell office:value-type="string" table:style-name="ce5">
            <text:p>Impala</text:p>
          </table:table-cell>
          <table:table-cell office:value-type="float" office:value="107995" table:style-name="ce11">
            <text:p>107995</text:p>
          </table:table-cell>
          <table:table-cell office:value-type="currency" office:value="18890" table:style-name="ce12">
            <text:p>$18,890</text:p>
          </table:table-cell>
          <table:table-cell office:value-type="currency" office:value="11550" table:style-name="ce12">
            <text:p>$11,550</text:p>
          </table:table-cell>
          <table:table-cell office:value-type="percentage" office:value="0.61143462149285333" table:formula="of:=SUM([.E28]/[.D28])" table:style-name="ce13">
            <text:p>61%</text:p>
          </table:table-cell>
          <table:table-cell office:value-type="string" office:string-value="POOR" table:formula="of:=IF([.F28]&gt;69%; &quot;GOOD&quot;; &quot;POOR&quot;)" table:style-name="ce21">
            <text:p>POOR</text:p>
          </table:table-cell>
          <table:table-cell office:value-type="float" office:value="3.4" table:style-name="ce6">
            <text:p>3.4</text:p>
          </table:table-cell>
          <table:table-cell office:value-type="float" office:value="180" table:style-name="ce6">
            <text:p>180</text:p>
          </table:table-cell>
          <table:table-cell office:value-type="string" office:string-value="Medium HP" table:formula="of:=COM.MICROSOFT.IFS([.I28]&gt;299;&quot;High HP&quot;;[.I28]&gt;99;&quot;Medium HP&quot;;[.I2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71.838039440000003" table:style-name="ce6">
            <text:p>71.83803944</text:p>
          </table:table-cell>
          <table:table-cell office:value-type="float" office:value="17" table:style-name="ce6">
            <text:p>17</text:p>
          </table:table-cell>
          <table:table-cell office:value-type="float" office:value="110.5" table:style-name="ce6">
            <text:p>110.5</text:p>
          </table:table-cell>
          <table:table-cell office:value-type="float" office:value="73" table:style-name="ce6">
            <text:p>73</text:p>
          </table:table-cell>
          <table:table-cell office:value-type="float" office:value="200" table:style-name="ce6">
            <text:p>200</text:p>
          </table:table-cell>
          <table:table-cell office:value-type="float" office:value="3.3889999999999998" table:style-name="ce6">
            <text:p>3.389</text:p>
          </table:table-cell>
          <table:table-cell office:value-type="date" office:date-value="2011-06-18T00:00:00" table:style-name="ce7">
            <text:p>6/18/2011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Chrysler</text:p>
          </table:table-cell>
          <table:table-cell office:value-type="string" table:style-name="ce5">
            <text:p>Sebring Coupe</text:p>
          </table:table-cell>
          <table:table-cell office:value-type="float" office:value="7854" table:style-name="ce11">
            <text:p>7854</text:p>
          </table:table-cell>
          <table:table-cell office:value-type="currency" office:value="19840" table:style-name="ce12">
            <text:p>$19,840</text:p>
          </table:table-cell>
          <table:table-cell office:value-type="currency" office:value="12360" table:style-name="ce12">
            <text:p>$12,360</text:p>
          </table:table-cell>
          <table:table-cell office:value-type="percentage" office:value="0.62298387096774188" table:formula="of:=SUM([.E29]/[.D29])" table:style-name="ce13">
            <text:p>62%</text:p>
          </table:table-cell>
          <table:table-cell office:value-type="string" office:string-value="POOR" table:formula="of:=IF([.F29]&gt;69%; &quot;GOOD&quot;; &quot;POOR&quot;)" table:style-name="ce21">
            <text:p>POOR</text:p>
          </table:table-cell>
          <table:table-cell office:value-type="float" office:value="2.5" table:style-name="ce6">
            <text:p>2.5</text:p>
          </table:table-cell>
          <table:table-cell office:value-type="float" office:value="163" table:style-name="ce6">
            <text:p>163</text:p>
          </table:table-cell>
          <table:table-cell office:value-type="string" office:string-value="Medium HP" table:formula="of:=COM.MICROSOFT.IFS([.I29]&gt;299;&quot;High HP&quot;;[.I29]&gt;99;&quot;Medium HP&quot;;[.I2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65.957183959999995" table:style-name="ce6">
            <text:p>65.95718396</text:p>
          </table:table-cell>
          <table:table-cell office:value-type="float" office:value="15.9" table:style-name="ce6">
            <text:p>15.9</text:p>
          </table:table-cell>
          <table:table-cell office:value-type="float" office:value="103.7" table:style-name="ce6">
            <text:p>103.7</text:p>
          </table:table-cell>
          <table:table-cell office:value-type="float" office:value="69.7" table:style-name="ce6">
            <text:p>69.7</text:p>
          </table:table-cell>
          <table:table-cell office:value-type="float" office:value="190.9" table:style-name="ce6">
            <text:p>190.9</text:p>
          </table:table-cell>
          <table:table-cell office:value-type="float" office:value="2.9670000000000001" table:style-name="ce6">
            <text:p>2.967</text:p>
          </table:table-cell>
          <table:table-cell office:value-type="date" office:date-value="2012-01-16T00:00:00" table:style-name="ce7">
            <text:p>1/16/2012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Chrysler</text:p>
          </table:table-cell>
          <table:table-cell office:value-type="string" table:style-name="ce5">
            <text:p>Sebring Conv.</text:p>
          </table:table-cell>
          <table:table-cell office:value-type="float" office:value="32775" table:style-name="ce11">
            <text:p>32775</text:p>
          </table:table-cell>
          <table:table-cell office:value-type="currency" office:value="24495" table:style-name="ce12">
            <text:p>$24,495</text:p>
          </table:table-cell>
          <table:table-cell office:value-type="currency" office:value="14180" table:style-name="ce12">
            <text:p>$14,180</text:p>
          </table:table-cell>
          <table:table-cell office:value-type="percentage" office:value="0.57889365176566643" table:formula="of:=SUM([.E30]/[.D30])" table:style-name="ce13">
            <text:p>58%</text:p>
          </table:table-cell>
          <table:table-cell office:value-type="string" office:string-value="POOR" table:formula="of:=IF([.F30]&gt;69%; &quot;GOOD&quot;; &quot;POOR&quot;)" table:style-name="ce21">
            <text:p>POOR</text:p>
          </table:table-cell>
          <table:table-cell office:value-type="float" office:value="2.5" table:style-name="ce6">
            <text:p>2.5</text:p>
          </table:table-cell>
          <table:table-cell office:value-type="float" office:value="168" table:style-name="ce6">
            <text:p>168</text:p>
          </table:table-cell>
          <table:table-cell office:value-type="string" office:string-value="Medium HP" table:formula="of:=COM.MICROSOFT.IFS([.I30]&gt;299;&quot;High HP&quot;;[.I30]&gt;99;&quot;Medium HP&quot;;[.I3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69.521355049999997" table:style-name="ce6">
            <text:p>69.52135505</text:p>
          </table:table-cell>
          <table:table-cell office:value-type="float" office:value="16" table:style-name="ce6">
            <text:p>16</text:p>
          </table:table-cell>
          <table:table-cell office:value-type="float" office:value="106" table:style-name="ce6">
            <text:p>106</text:p>
          </table:table-cell>
          <table:table-cell office:value-type="float" office:value="69.2" table:style-name="ce6">
            <text:p>69.2</text:p>
          </table:table-cell>
          <table:table-cell office:value-type="float" office:value="193" table:style-name="ce6">
            <text:p>193</text:p>
          </table:table-cell>
          <table:table-cell office:value-type="float" office:value="3.3319999999999999" table:style-name="ce6">
            <text:p>3.332</text:p>
          </table:table-cell>
          <table:table-cell office:value-type="date" office:date-value="2011-11-17T00:00:00" table:style-name="ce7">
            <text:p>11/17/2011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Chrysler</text:p>
          </table:table-cell>
          <table:table-cell office:value-type="string" table:style-name="ce5">
            <text:p>Concorde</text:p>
          </table:table-cell>
          <table:table-cell office:value-type="float" office:value="31148" table:style-name="ce11">
            <text:p>31148</text:p>
          </table:table-cell>
          <table:table-cell office:value-type="currency" office:value="22245" table:style-name="ce12">
            <text:p>$22,245</text:p>
          </table:table-cell>
          <table:table-cell office:value-type="currency" office:value="13725" table:style-name="ce12">
            <text:p>$13,725</text:p>
          </table:table-cell>
          <table:table-cell office:value-type="percentage" office:value="0.61699258260283207" table:formula="of:=SUM([.E31]/[.D31])" table:style-name="ce13">
            <text:p>62%</text:p>
          </table:table-cell>
          <table:table-cell office:value-type="string" office:string-value="POOR" table:formula="of:=IF([.F31]&gt;69%; &quot;GOOD&quot;; &quot;POOR&quot;)" table:style-name="ce21">
            <text:p>POOR</text:p>
          </table:table-cell>
          <table:table-cell office:value-type="float" office:value="2.7" table:style-name="ce6">
            <text:p>2.7</text:p>
          </table:table-cell>
          <table:table-cell office:value-type="float" office:value="200" table:style-name="ce6">
            <text:p>200</text:p>
          </table:table-cell>
          <table:table-cell office:value-type="string" office:string-value="Medium HP" table:formula="of:=COM.MICROSOFT.IFS([.I31]&gt;299;&quot;High HP&quot;;[.I31]&gt;99;&quot;Medium HP&quot;;[.I3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80.02378204" table:style-name="ce6">
            <text:p>80.02378204</text:p>
          </table:table-cell>
          <table:table-cell office:value-type="float" office:value="17" table:style-name="ce6">
            <text:p>17</text:p>
          </table:table-cell>
          <table:table-cell office:value-type="float" office:value="113" table:style-name="ce6">
            <text:p>113</text:p>
          </table:table-cell>
          <table:table-cell office:value-type="float" office:value="74.400000000000006" table:style-name="ce6">
            <text:p>74.4</text:p>
          </table:table-cell>
          <table:table-cell office:value-type="float" office:value="209.1" table:style-name="ce6">
            <text:p>209.1</text:p>
          </table:table-cell>
          <table:table-cell office:value-type="float" office:value="3.452" table:style-name="ce6">
            <text:p>3.452</text:p>
          </table:table-cell>
          <table:table-cell office:value-type="date" office:date-value="2012-06-06T00:00:00" table:style-name="ce7">
            <text:p>6/6/2012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Chrysler</text:p>
          </table:table-cell>
          <table:table-cell office:value-type="string" table:style-name="ce5">
            <text:p>Cirrus</text:p>
          </table:table-cell>
          <table:table-cell office:value-type="float" office:value="32305.999999999996" table:style-name="ce11">
            <text:p>32306</text:p>
          </table:table-cell>
          <table:table-cell office:value-type="currency" office:value="16480" table:style-name="ce12">
            <text:p>$16,480</text:p>
          </table:table-cell>
          <table:table-cell office:value-type="currency" office:value="12640" table:style-name="ce12">
            <text:p>$12,640</text:p>
          </table:table-cell>
          <table:table-cell office:value-type="percentage" office:value="0.76699029126213591" table:formula="of:=SUM([.E32]/[.D32])" table:style-name="ce13">
            <text:p>77%</text:p>
          </table:table-cell>
          <table:table-cell office:value-type="string" office:string-value="GOOD" table:formula="of:=IF([.F32]&gt;69%; &quot;GOOD&quot;; &quot;POOR&quot;)" table:style-name="ce21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6">
            <text:p>132</text:p>
          </table:table-cell>
          <table:table-cell office:value-type="string" office:string-value="Medium HP" table:formula="of:=COM.MICROSOFT.IFS([.I32]&gt;299;&quot;High HP&quot;;[.I32]&gt;99;&quot;Medium HP&quot;;[.I3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53.566199869999998" table:style-name="ce6">
            <text:p>53.56619987</text:p>
          </table:table-cell>
          <table:table-cell office:value-type="float" office:value="16" table:style-name="ce6">
            <text:p>16</text:p>
          </table:table-cell>
          <table:table-cell office:value-type="float" office:value="108" table:style-name="ce6">
            <text:p>108</text:p>
          </table:table-cell>
          <table:table-cell office:value-type="float" office:value="71" table:style-name="ce6">
            <text:p>71</text:p>
          </table:table-cell>
          <table:table-cell office:value-type="float" office:value="186" table:style-name="ce6">
            <text:p>186</text:p>
          </table:table-cell>
          <table:table-cell office:value-type="float" office:value="2.911" table:style-name="ce6">
            <text:p>2.911</text:p>
          </table:table-cell>
          <table:table-cell office:value-type="date" office:date-value="2011-10-06T00:00:00" table:style-name="ce7">
            <text:p>10/6/2011</text:p>
          </table:table-cell>
          <table:table-cell table:number-columns-repeated="16365" table:style-name="ce1"/>
        </table:table-row>
        <table:table-row table:style-name="ro1" table:visibility="filter">
          <table:table-cell office:value-type="string" table:style-name="ce4">
            <text:p>Chrysler</text:p>
          </table:table-cell>
          <table:table-cell office:value-type="string" table:style-name="ce5">
            <text:p>LHS</text:p>
          </table:table-cell>
          <table:table-cell office:value-type="float" office:value="13462" table:style-name="ce11">
            <text:p>13462</text:p>
          </table:table-cell>
          <table:table-cell office:value-type="currency" office:value="28340" table:style-name="ce12">
            <text:p>$28,340</text:p>
          </table:table-cell>
          <table:table-cell office:value-type="currency" office:value="17325" table:style-name="ce12">
            <text:p>$17,325</text:p>
          </table:table-cell>
          <table:table-cell office:value-type="percentage" office:value="0.61132674664784759" table:formula="of:=SUM([.E33]/[.D33])" table:style-name="ce13">
            <text:p>61%</text:p>
          </table:table-cell>
          <table:table-cell office:value-type="string" office:string-value="POOR" table:formula="of:=IF([.F33]&gt;69%; &quot;GOOD&quot;; &quot;POOR&quot;)" table:style-name="ce21">
            <text:p>POOR</text:p>
          </table:table-cell>
          <table:table-cell office:value-type="float" office:value="3.5" table:style-name="ce6">
            <text:p>3.5</text:p>
          </table:table-cell>
          <table:table-cell office:value-type="float" office:value="253" table:style-name="ce6">
            <text:p>253</text:p>
          </table:table-cell>
          <table:table-cell office:value-type="string" office:string-value="Medium HP" table:formula="of:=COM.MICROSOFT.IFS([.I33]&gt;299;&quot;High HP&quot;;[.I33]&gt;99;&quot;Medium HP&quot;;[.I3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101.3292807" table:style-name="ce6">
            <text:p>101.3292807</text:p>
          </table:table-cell>
          <table:table-cell office:value-type="float" office:value="17" table:style-name="ce6">
            <text:p>17</text:p>
          </table:table-cell>
          <table:table-cell office:value-type="float" office:value="113" table:style-name="ce6">
            <text:p>113</text:p>
          </table:table-cell>
          <table:table-cell office:value-type="float" office:value="74.400000000000006" table:style-name="ce6">
            <text:p>74.4</text:p>
          </table:table-cell>
          <table:table-cell office:value-type="float" office:value="207.7" table:style-name="ce6">
            <text:p>207.7</text:p>
          </table:table-cell>
          <table:table-cell office:value-type="float" office:value="3.5640000000000001" table:style-name="ce6">
            <text:p>3.564</text:p>
          </table:table-cell>
          <table:table-cell office:value-type="date" office:date-value="2012-05-08T00:00:00" table:style-name="ce7">
            <text:p>5/8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Chrysler</text:p>
          </table:table-cell>
          <table:table-cell office:value-type="string" table:style-name="ce5">
            <text:p>300M</text:p>
          </table:table-cell>
          <table:table-cell office:value-type="float" office:value="30696" table:style-name="ce11">
            <text:p>30696</text:p>
          </table:table-cell>
          <table:table-cell office:value-type="currency" office:value="29185" table:style-name="ce12">
            <text:p>$29,185</text:p>
          </table:table-cell>
          <table:table-cell office:value-type="currency" office:value="18425" table:style-name="ce12">
            <text:p>$18,425</text:p>
          </table:table-cell>
          <table:table-cell office:value-type="percentage" office:value="0.63131745759808122" table:formula="of:=SUM([.E34]/[.D34])" table:style-name="ce13">
            <text:p>63%</text:p>
          </table:table-cell>
          <table:table-cell office:value-type="string" office:string-value="POOR" table:formula="of:=IF([.F34]&gt;69%; &quot;GOOD&quot;; &quot;POOR&quot;)" table:style-name="ce21">
            <text:p>POOR</text:p>
          </table:table-cell>
          <table:table-cell office:value-type="float" office:value="3.5" table:style-name="ce6">
            <text:p>3.5</text:p>
          </table:table-cell>
          <table:table-cell office:value-type="float" office:value="253" table:style-name="ce6">
            <text:p>253</text:p>
          </table:table-cell>
          <table:table-cell office:value-type="string" office:string-value="Medium HP" table:formula="of:=COM.MICROSOFT.IFS([.I34]&gt;299;&quot;High HP&quot;;[.I34]&gt;99;&quot;Medium HP&quot;;[.I3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101.6552441" table:style-name="ce6">
            <text:p>101.6552441</text:p>
          </table:table-cell>
          <table:table-cell office:value-type="float" office:value="17" table:style-name="ce6">
            <text:p>17</text:p>
          </table:table-cell>
          <table:table-cell office:value-type="float" office:value="113" table:style-name="ce6">
            <text:p>113</text:p>
          </table:table-cell>
          <table:table-cell office:value-type="float" office:value="74.400000000000006" table:style-name="ce6">
            <text:p>74.4</text:p>
          </table:table-cell>
          <table:table-cell office:value-type="float" office:value="197.8" table:style-name="ce6">
            <text:p>197.8</text:p>
          </table:table-cell>
          <table:table-cell office:value-type="float" office:value="3.5670000000000002" table:style-name="ce6">
            <text:p>3.567</text:p>
          </table:table-cell>
          <table:table-cell office:value-type="date" office:date-value="2012-02-10T00:00:00" table:style-name="ce7">
            <text:p>2/10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Dodge</text:p>
          </table:table-cell>
          <table:table-cell office:value-type="string" table:style-name="ce5">
            <text:p>Neon</text:p>
          </table:table-cell>
          <table:table-cell office:value-type="float" office:value="76034" table:style-name="ce11">
            <text:p>76034</text:p>
          </table:table-cell>
          <table:table-cell office:value-type="currency" office:value="12640" table:style-name="ce12">
            <text:p>$12,640</text:p>
          </table:table-cell>
          <table:table-cell office:value-type="currency" office:value="7750" table:style-name="ce12">
            <text:p>$7,750</text:p>
          </table:table-cell>
          <table:table-cell office:value-type="percentage" office:value="0.61313291139240511" table:formula="of:=SUM([.E35]/[.D35])" table:style-name="ce13">
            <text:p>61%</text:p>
          </table:table-cell>
          <table:table-cell office:value-type="string" office:string-value="POOR" table:formula="of:=IF([.F35]&gt;69%; &quot;GOOD&quot;; &quot;POOR&quot;)" table:style-name="ce21">
            <text:p>POOR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6">
            <text:p>132</text:p>
          </table:table-cell>
          <table:table-cell office:value-type="string" office:string-value="Medium HP" table:formula="of:=COM.MICROSOFT.IFS([.I35]&gt;299;&quot;High HP&quot;;[.I35]&gt;99;&quot;Medium HP&quot;;[.I3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9" table:style-name="ce6">
            <text:p>29</text:p>
          </table:table-cell>
          <table:table-cell office:value-type="float" office:value="52.084898750000001" table:style-name="ce6">
            <text:p>52.08489875</text:p>
          </table:table-cell>
          <table:table-cell office:value-type="float" office:value="12.5" table:style-name="ce6">
            <text:p>12.5</text:p>
          </table:table-cell>
          <table:table-cell office:value-type="float" office:value="105" table:style-name="ce6">
            <text:p>105</text:p>
          </table:table-cell>
          <table:table-cell office:value-type="float" office:value="74.400000000000006" table:style-name="ce6">
            <text:p>74.4</text:p>
          </table:table-cell>
          <table:table-cell office:value-type="float" office:value="174.4" table:style-name="ce6">
            <text:p>174.4</text:p>
          </table:table-cell>
          <table:table-cell office:value-type="float" office:value="2.5670000000000002" table:style-name="ce6">
            <text:p>2.567</text:p>
          </table:table-cell>
          <table:table-cell office:value-type="date" office:date-value="2011-12-12T00:00:00" table:style-name="ce7">
            <text:p>12/12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Dodge</text:p>
          </table:table-cell>
          <table:table-cell office:value-type="string" table:style-name="ce5">
            <text:p>Avenger</text:p>
          </table:table-cell>
          <table:table-cell office:value-type="float" office:value="4734" table:style-name="ce11">
            <text:p>4734</text:p>
          </table:table-cell>
          <table:table-cell office:value-type="currency" office:value="19045" table:style-name="ce12">
            <text:p>$19,045</text:p>
          </table:table-cell>
          <table:table-cell office:value-type="currency" office:value="12545" table:style-name="ce12">
            <text:p>$12,545</text:p>
          </table:table-cell>
          <table:table-cell office:value-type="percentage" office:value="0.65870307167235498" table:formula="of:=SUM([.E36]/[.D36])" table:style-name="ce13">
            <text:p>66%</text:p>
          </table:table-cell>
          <table:table-cell office:value-type="string" office:string-value="POOR" table:formula="of:=IF([.F36]&gt;69%; &quot;GOOD&quot;; &quot;POOR&quot;)" table:style-name="ce21">
            <text:p>POOR</text:p>
          </table:table-cell>
          <table:table-cell office:value-type="float" office:value="2.5" table:style-name="ce6">
            <text:p>2.5</text:p>
          </table:table-cell>
          <table:table-cell office:value-type="float" office:value="163" table:style-name="ce6">
            <text:p>163</text:p>
          </table:table-cell>
          <table:table-cell office:value-type="string" office:string-value="Medium HP" table:formula="of:=COM.MICROSOFT.IFS([.I36]&gt;299;&quot;High HP&quot;;[.I36]&gt;99;&quot;Medium HP&quot;;[.I3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65.650508340000002" table:style-name="ce6">
            <text:p>65.65050834</text:p>
          </table:table-cell>
          <table:table-cell office:value-type="float" office:value="15.9" table:style-name="ce6">
            <text:p>15.9</text:p>
          </table:table-cell>
          <table:table-cell office:value-type="float" office:value="103.7" table:style-name="ce6">
            <text:p>103.7</text:p>
          </table:table-cell>
          <table:table-cell office:value-type="float" office:value="69.099999999999994" table:style-name="ce6">
            <text:p>69.1</text:p>
          </table:table-cell>
          <table:table-cell office:value-type="float" office:value="190.2" table:style-name="ce6">
            <text:p>190.2</text:p>
          </table:table-cell>
          <table:table-cell office:value-type="float" office:value="2.879" table:style-name="ce6">
            <text:p>2.879</text:p>
          </table:table-cell>
          <table:table-cell office:value-type="date" office:date-value="2012-07-01T00:00:00" table:style-name="ce7">
            <text:p>7/1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Dodge</text:p>
          </table:table-cell>
          <table:table-cell office:value-type="string" table:style-name="ce5">
            <text:p>Stratus</text:p>
          </table:table-cell>
          <table:table-cell office:value-type="float" office:value="71186" table:style-name="ce11">
            <text:p>71186</text:p>
          </table:table-cell>
          <table:table-cell office:value-type="currency" office:value="20230" table:style-name="ce12">
            <text:p>$20,230</text:p>
          </table:table-cell>
          <table:table-cell office:value-type="currency" office:value="10185" table:style-name="ce12">
            <text:p>$10,185</text:p>
          </table:table-cell>
          <table:table-cell office:value-type="percentage" office:value="0.5034602076124568" table:formula="of:=SUM([.E37]/[.D37])" table:style-name="ce13">
            <text:p>50%</text:p>
          </table:table-cell>
          <table:table-cell office:value-type="string" office:string-value="POOR" table:formula="of:=IF([.F37]&gt;69%; &quot;GOOD&quot;; &quot;POOR&quot;)" table:style-name="ce21">
            <text:p>POOR</text:p>
          </table:table-cell>
          <table:table-cell office:value-type="float" office:value="2.5" table:style-name="ce6">
            <text:p>2.5</text:p>
          </table:table-cell>
          <table:table-cell office:value-type="float" office:value="168" table:style-name="ce6">
            <text:p>168</text:p>
          </table:table-cell>
          <table:table-cell office:value-type="string" office:string-value="Medium HP" table:formula="of:=COM.MICROSOFT.IFS([.I37]&gt;299;&quot;High HP&quot;;[.I37]&gt;99;&quot;Medium HP&quot;;[.I3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67.876107840000003" table:style-name="ce6">
            <text:p>67.87610784</text:p>
          </table:table-cell>
          <table:table-cell office:value-type="float" office:value="16" table:style-name="ce6">
            <text:p>16</text:p>
          </table:table-cell>
          <table:table-cell office:value-type="float" office:value="108" table:style-name="ce6">
            <text:p>108</text:p>
          </table:table-cell>
          <table:table-cell office:value-type="float" office:value="71" table:style-name="ce6">
            <text:p>71</text:p>
          </table:table-cell>
          <table:table-cell office:value-type="float" office:value="186" table:style-name="ce6">
            <text:p>186</text:p>
          </table:table-cell>
          <table:table-cell office:value-type="float" office:value="3.0579999999999998" table:style-name="ce6">
            <text:p>3.058</text:p>
          </table:table-cell>
          <table:table-cell office:value-type="date" office:date-value="2011-10-31T00:00:00" table:style-name="ce7">
            <text:p>10/31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Dodge</text:p>
          </table:table-cell>
          <table:table-cell office:value-type="string" table:style-name="ce5">
            <text:p>Intrepid</text:p>
          </table:table-cell>
          <table:table-cell office:value-type="float" office:value="88028" table:style-name="ce11">
            <text:p>88028</text:p>
          </table:table-cell>
          <table:table-cell office:value-type="currency" office:value="22505" table:style-name="ce12">
            <text:p>$22,505</text:p>
          </table:table-cell>
          <table:table-cell office:value-type="currency" office:value="12275" table:style-name="ce12">
            <text:p>$12,275</text:p>
          </table:table-cell>
          <table:table-cell office:value-type="percentage" office:value="0.54543434792268386" table:formula="of:=SUM([.E38]/[.D38])" table:style-name="ce13">
            <text:p>55%</text:p>
          </table:table-cell>
          <table:table-cell office:value-type="string" office:string-value="POOR" table:formula="of:=IF([.F38]&gt;69%; &quot;GOOD&quot;; &quot;POOR&quot;)" table:style-name="ce21">
            <text:p>POOR</text:p>
          </table:table-cell>
          <table:table-cell office:value-type="float" office:value="2.7" table:style-name="ce6">
            <text:p>2.7</text:p>
          </table:table-cell>
          <table:table-cell office:value-type="float" office:value="202" table:style-name="ce6">
            <text:p>202</text:p>
          </table:table-cell>
          <table:table-cell office:value-type="string" office:string-value="Medium HP" table:formula="of:=COM.MICROSOFT.IFS([.I38]&gt;299;&quot;High HP&quot;;[.I38]&gt;99;&quot;Medium HP&quot;;[.I3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80.831470170000003" table:style-name="ce6">
            <text:p>80.83147017</text:p>
          </table:table-cell>
          <table:table-cell office:value-type="float" office:value="17" table:style-name="ce6">
            <text:p>17</text:p>
          </table:table-cell>
          <table:table-cell office:value-type="float" office:value="113" table:style-name="ce6">
            <text:p>113</text:p>
          </table:table-cell>
          <table:table-cell office:value-type="float" office:value="74.7" table:style-name="ce6">
            <text:p>74.7</text:p>
          </table:table-cell>
          <table:table-cell office:value-type="float" office:value="203.7" table:style-name="ce6">
            <text:p>203.7</text:p>
          </table:table-cell>
          <table:table-cell office:value-type="float" office:value="3.4889999999999999" table:style-name="ce6">
            <text:p>3.489</text:p>
          </table:table-cell>
          <table:table-cell office:value-type="date" office:date-value="2012-06-02T00:00:00" table:style-name="ce7">
            <text:p>6/2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Dodge</text:p>
          </table:table-cell>
          <table:table-cell office:value-type="string" table:style-name="ce5">
            <text:p>Viper</text:p>
          </table:table-cell>
          <table:table-cell office:value-type="float" office:value="916" table:style-name="ce11">
            <text:p>916</text:p>
          </table:table-cell>
          <table:table-cell office:value-type="currency" office:value="69725" table:style-name="ce12">
            <text:p>$69,725</text:p>
          </table:table-cell>
          <table:table-cell office:value-type="currency" office:value="58470" table:style-name="ce12">
            <text:p>$58,470</text:p>
          </table:table-cell>
          <table:table-cell office:value-type="percentage" office:value="0.83858013624955186" table:formula="of:=SUM([.E39]/[.D39])" table:style-name="ce13">
            <text:p>84%</text:p>
          </table:table-cell>
          <table:table-cell office:value-type="string" office:string-value="GOOD" table:formula="of:=IF([.F39]&gt;69%; &quot;GOOD&quot;; &quot;POOR&quot;)" table:style-name="ce21">
            <text:p>GOOD</text:p>
          </table:table-cell>
          <table:table-cell office:value-type="float" office:value="8" table:style-name="ce6">
            <text:p>8</text:p>
          </table:table-cell>
          <table:table-cell office:value-type="float" office:value="450" table:style-name="ce6">
            <text:p>450</text:p>
          </table:table-cell>
          <table:table-cell office:value-type="string" office:string-value="High HP" table:formula="of:=COM.MICROSOFT.IFS([.I39]&gt;299;&quot;High HP&quot;;[.I39]&gt;99;&quot;Medium HP&quot;;[.I39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Passenger</text:p>
          </table:table-cell>
          <table:table-cell office:value-type="float" office:value="16" table:style-name="ce6">
            <text:p>16</text:p>
          </table:table-cell>
          <table:table-cell office:value-type="float" office:value="188.14432300000001" table:style-name="ce6">
            <text:p>188.144323</text:p>
          </table:table-cell>
          <table:table-cell office:value-type="float" office:value="19" table:style-name="ce6">
            <text:p>19</text:p>
          </table:table-cell>
          <table:table-cell office:value-type="float" office:value="96.2" table:style-name="ce6">
            <text:p>96.2</text:p>
          </table:table-cell>
          <table:table-cell office:value-type="float" office:value="75.7" table:style-name="ce6">
            <text:p>75.7</text:p>
          </table:table-cell>
          <table:table-cell office:value-type="float" office:value="176.7" table:style-name="ce6">
            <text:p>176.7</text:p>
          </table:table-cell>
          <table:table-cell office:value-type="float" office:value="3.375" table:style-name="ce6">
            <text:p>3.375</text:p>
          </table:table-cell>
          <table:table-cell office:value-type="date" office:date-value="2011-08-07T00:00:00" table:style-name="ce7">
            <text:p>8/7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Dodge</text:p>
          </table:table-cell>
          <table:table-cell office:value-type="string" table:style-name="ce5">
            <text:p>Ram Pickup</text:p>
          </table:table-cell>
          <table:table-cell office:value-type="float" office:value="227061" table:style-name="ce11">
            <text:p>227061</text:p>
          </table:table-cell>
          <table:table-cell office:value-type="currency" office:value="19460" table:style-name="ce12">
            <text:p>$19,460</text:p>
          </table:table-cell>
          <table:table-cell office:value-type="currency" office:value="15060" table:style-name="ce12">
            <text:p>$15,060</text:p>
          </table:table-cell>
          <table:table-cell office:value-type="percentage" office:value="0.77389516957862281" table:formula="of:=SUM([.E40]/[.D40])" table:style-name="ce13">
            <text:p>77%</text:p>
          </table:table-cell>
          <table:table-cell office:value-type="string" office:string-value="GOOD" table:formula="of:=IF([.F40]&gt;69%; &quot;GOOD&quot;; &quot;POOR&quot;)" table:style-name="ce21">
            <text:p>GOOD</text:p>
          </table:table-cell>
          <table:table-cell office:value-type="float" office:value="5.2" table:style-name="ce6">
            <text:p>5.2</text:p>
          </table:table-cell>
          <table:table-cell office:value-type="float" office:value="230" table:style-name="ce6">
            <text:p>230</text:p>
          </table:table-cell>
          <table:table-cell office:value-type="string" office:string-value="Medium HP" table:formula="of:=COM.MICROSOFT.IFS([.I40]&gt;299;&quot;High HP&quot;;[.I40]&gt;99;&quot;Medium HP&quot;;[.I4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7" table:style-name="ce6">
            <text:p>17</text:p>
          </table:table-cell>
          <table:table-cell office:value-type="float" office:value="90.211700050000005" table:style-name="ce6">
            <text:p>90.21170005</text:p>
          </table:table-cell>
          <table:table-cell office:value-type="float" office:value="26" table:style-name="ce6">
            <text:p>26</text:p>
          </table:table-cell>
          <table:table-cell office:value-type="float" office:value="138.69999999999999" table:style-name="ce6">
            <text:p>138.7</text:p>
          </table:table-cell>
          <table:table-cell office:value-type="float" office:value="79.3" table:style-name="ce6">
            <text:p>79.3</text:p>
          </table:table-cell>
          <table:table-cell office:value-type="float" office:value="224.2" table:style-name="ce6">
            <text:p>224.2</text:p>
          </table:table-cell>
          <table:table-cell office:value-type="float" office:value="4.47" table:style-name="ce6">
            <text:p>4.47</text:p>
          </table:table-cell>
          <table:table-cell office:value-type="date" office:date-value="2012-03-06T00:00:00" table:style-name="ce7">
            <text:p>3/6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Dodge</text:p>
          </table:table-cell>
          <table:table-cell office:value-type="string" table:style-name="ce5">
            <text:p>Ram Wagon</text:p>
          </table:table-cell>
          <table:table-cell office:value-type="float" office:value="16767" table:style-name="ce11">
            <text:p>16767</text:p>
          </table:table-cell>
          <table:table-cell office:value-type="currency" office:value="21315" table:style-name="ce12">
            <text:p>$21,315</text:p>
          </table:table-cell>
          <table:table-cell office:value-type="currency" office:value="15510" table:style-name="ce12">
            <text:p>$15,510</text:p>
          </table:table-cell>
          <table:table-cell office:value-type="percentage" office:value="0.72765657987332866" table:formula="of:=SUM([.E41]/[.D41])" table:style-name="ce13">
            <text:p>73%</text:p>
          </table:table-cell>
          <table:table-cell office:value-type="string" office:string-value="GOOD" table:formula="of:=IF([.F41]&gt;69%; &quot;GOOD&quot;; &quot;POOR&quot;)" table:style-name="ce21">
            <text:p>GOOD</text:p>
          </table:table-cell>
          <table:table-cell office:value-type="float" office:value="3.9" table:style-name="ce6">
            <text:p>3.9</text:p>
          </table:table-cell>
          <table:table-cell office:value-type="float" office:value="175" table:style-name="ce6">
            <text:p>175</text:p>
          </table:table-cell>
          <table:table-cell office:value-type="string" office:string-value="Medium HP" table:formula="of:=COM.MICROSOFT.IFS([.I41]&gt;299;&quot;High HP&quot;;[.I41]&gt;99;&quot;Medium HP&quot;;[.I4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5" table:style-name="ce6">
            <text:p>15</text:p>
          </table:table-cell>
          <table:table-cell office:value-type="float" office:value="71.135291609999996" table:style-name="ce6">
            <text:p>71.13529161</text:p>
          </table:table-cell>
          <table:table-cell office:value-type="float" office:value="32" table:style-name="ce6">
            <text:p>32</text:p>
          </table:table-cell>
          <table:table-cell office:value-type="float" office:value="109.6" table:style-name="ce6">
            <text:p>109.6</text:p>
          </table:table-cell>
          <table:table-cell office:value-type="float" office:value="78.8" table:style-name="ce6">
            <text:p>78.8</text:p>
          </table:table-cell>
          <table:table-cell office:value-type="float" office:value="192.6" table:style-name="ce6">
            <text:p>192.6</text:p>
          </table:table-cell>
          <table:table-cell office:value-type="float" office:value="4.2450000000000001" table:style-name="ce6">
            <text:p>4.245</text:p>
          </table:table-cell>
          <table:table-cell office:value-type="date" office:date-value="2012-01-06T00:00:00" table:style-name="ce7">
            <text:p>1/6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Dodge</text:p>
          </table:table-cell>
          <table:table-cell office:value-type="string" table:style-name="ce5">
            <text:p>Ram Van</text:p>
          </table:table-cell>
          <table:table-cell office:value-type="float" office:value="31038" table:style-name="ce11">
            <text:p>31038</text:p>
          </table:table-cell>
          <table:table-cell office:value-type="currency" office:value="18575" table:style-name="ce12">
            <text:p>$18,575</text:p>
          </table:table-cell>
          <table:table-cell office:value-type="currency" office:value="13425" table:style-name="ce12">
            <text:p>$13,425</text:p>
          </table:table-cell>
          <table:table-cell office:value-type="percentage" office:value="0.7227456258411844" table:formula="of:=SUM([.E42]/[.D42])" table:style-name="ce13">
            <text:p>72%</text:p>
          </table:table-cell>
          <table:table-cell office:value-type="string" office:string-value="GOOD" table:formula="of:=IF([.F42]&gt;69%; &quot;GOOD&quot;; &quot;POOR&quot;)" table:style-name="ce21">
            <text:p>GOOD</text:p>
          </table:table-cell>
          <table:table-cell office:value-type="float" office:value="3.9" table:style-name="ce6">
            <text:p>3.9</text:p>
          </table:table-cell>
          <table:table-cell office:value-type="float" office:value="175" table:style-name="ce6">
            <text:p>175</text:p>
          </table:table-cell>
          <table:table-cell office:value-type="string" office:string-value="Medium HP" table:formula="of:=COM.MICROSOFT.IFS([.I42]&gt;299;&quot;High HP&quot;;[.I42]&gt;99;&quot;Medium HP&quot;;[.I4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6" table:style-name="ce6">
            <text:p>16</text:p>
          </table:table-cell>
          <table:table-cell office:value-type="float" office:value="70.078321540000005" table:style-name="ce6">
            <text:p>70.07832154</text:p>
          </table:table-cell>
          <table:table-cell office:value-type="float" office:value="32" table:style-name="ce6">
            <text:p>32</text:p>
          </table:table-cell>
          <table:table-cell office:value-type="float" office:value="127.2" table:style-name="ce6">
            <text:p>127.2</text:p>
          </table:table-cell>
          <table:table-cell office:value-type="float" office:value="78.8" table:style-name="ce6">
            <text:p>78.8</text:p>
          </table:table-cell>
          <table:table-cell office:value-type="float" office:value="208.5" table:style-name="ce6">
            <text:p>208.5</text:p>
          </table:table-cell>
          <table:table-cell office:value-type="float" office:value="4.298" table:style-name="ce6">
            <text:p>4.298</text:p>
          </table:table-cell>
          <table:table-cell office:value-type="date" office:date-value="2012-07-26T00:00:00" table:style-name="ce7">
            <text:p>7/26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Dodge</text:p>
          </table:table-cell>
          <table:table-cell office:value-type="string" table:style-name="ce5">
            <text:p>Dakota</text:p>
          </table:table-cell>
          <table:table-cell office:value-type="float" office:value="111313" table:style-name="ce11">
            <text:p>111313</text:p>
          </table:table-cell>
          <table:table-cell office:value-type="currency" office:value="16980" table:style-name="ce12">
            <text:p>$16,980</text:p>
          </table:table-cell>
          <table:table-cell office:value-type="currency" office:value="11260" table:style-name="ce12">
            <text:p>$11,260</text:p>
          </table:table-cell>
          <table:table-cell office:value-type="percentage" office:value="0.66313309776207308" table:formula="of:=SUM([.E43]/[.D43])" table:style-name="ce13">
            <text:p>66%</text:p>
          </table:table-cell>
          <table:table-cell office:value-type="string" office:string-value="POOR" table:formula="of:=IF([.F43]&gt;69%; &quot;GOOD&quot;; &quot;POOR&quot;)" table:style-name="ce21">
            <text:p>POOR</text:p>
          </table:table-cell>
          <table:table-cell office:value-type="float" office:value="2.5" table:style-name="ce6">
            <text:p>2.5</text:p>
          </table:table-cell>
          <table:table-cell office:value-type="float" office:value="120" table:style-name="ce6">
            <text:p>120</text:p>
          </table:table-cell>
          <table:table-cell office:value-type="string" office:string-value="Medium HP" table:formula="of:=COM.MICROSOFT.IFS([.I43]&gt;299;&quot;High HP&quot;;[.I43]&gt;99;&quot;Medium HP&quot;;[.I4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9" table:style-name="ce6">
            <text:p>19</text:p>
          </table:table-cell>
          <table:table-cell office:value-type="float" office:value="49.64500177" table:style-name="ce6">
            <text:p>49.64500177</text:p>
          </table:table-cell>
          <table:table-cell office:value-type="float" office:value="22" table:style-name="ce6">
            <text:p>22</text:p>
          </table:table-cell>
          <table:table-cell office:value-type="float" office:value="131" table:style-name="ce6">
            <text:p>131</text:p>
          </table:table-cell>
          <table:table-cell office:value-type="float" office:value="71.5" table:style-name="ce6">
            <text:p>71.5</text:p>
          </table:table-cell>
          <table:table-cell office:value-type="float" office:value="215" table:style-name="ce6">
            <text:p>215</text:p>
          </table:table-cell>
          <table:table-cell office:value-type="float" office:value="3.5569999999999999" table:style-name="ce6">
            <text:p>3.557</text:p>
          </table:table-cell>
          <table:table-cell office:value-type="date" office:date-value="2011-11-25T00:00:00" table:style-name="ce7">
            <text:p>11/25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Dodge</text:p>
          </table:table-cell>
          <table:table-cell office:value-type="string" table:style-name="ce5">
            <text:p>Durango</text:p>
          </table:table-cell>
          <table:table-cell office:value-type="float" office:value="101323" table:style-name="ce11">
            <text:p>101323</text:p>
          </table:table-cell>
          <table:table-cell office:value-type="currency" office:value="26310" table:style-name="ce12">
            <text:p>$26,310</text:p>
          </table:table-cell>
          <table:table-cell office:value-type="currency" office:value="21436" table:style-name="ce12">
            <text:p>$21,436</text:p>
          </table:table-cell>
          <table:table-cell office:value-type="percentage" office:value="0.81474724439376667" table:formula="of:=SUM([.E44]/[.D44])" table:style-name="ce13">
            <text:p>81%</text:p>
          </table:table-cell>
          <table:table-cell office:value-type="string" office:string-value="GOOD" table:formula="of:=IF([.F44]&gt;69%; &quot;GOOD&quot;; &quot;POOR&quot;)" table:style-name="ce21">
            <text:p>GOOD</text:p>
          </table:table-cell>
          <table:table-cell office:value-type="float" office:value="5.2" table:style-name="ce6">
            <text:p>5.2</text:p>
          </table:table-cell>
          <table:table-cell office:value-type="float" office:value="230" table:style-name="ce6">
            <text:p>230</text:p>
          </table:table-cell>
          <table:table-cell office:value-type="string" office:string-value="Medium HP" table:formula="of:=COM.MICROSOFT.IFS([.I44]&gt;299;&quot;High HP&quot;;[.I44]&gt;99;&quot;Medium HP&quot;;[.I4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7" table:style-name="ce6">
            <text:p>17</text:p>
          </table:table-cell>
          <table:table-cell office:value-type="float" office:value="92.85412522" table:style-name="ce6">
            <text:p>92.85412522</text:p>
          </table:table-cell>
          <table:table-cell office:value-type="float" office:value="25" table:style-name="ce6">
            <text:p>25</text:p>
          </table:table-cell>
          <table:table-cell office:value-type="float" office:value="115.7" table:style-name="ce6">
            <text:p>115.7</text:p>
          </table:table-cell>
          <table:table-cell office:value-type="float" office:value="71.7" table:style-name="ce6">
            <text:p>71.7</text:p>
          </table:table-cell>
          <table:table-cell office:value-type="float" office:value="193.5" table:style-name="ce6">
            <text:p>193.5</text:p>
          </table:table-cell>
          <table:table-cell office:value-type="float" office:value="4.3940000000000001" table:style-name="ce6">
            <text:p>4.394</text:p>
          </table:table-cell>
          <table:table-cell office:value-type="date" office:date-value="2012-06-27T00:00:00" table:style-name="ce7">
            <text:p>6/27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Dodge</text:p>
          </table:table-cell>
          <table:table-cell office:value-type="string" table:style-name="ce5">
            <text:p>Caravan</text:p>
          </table:table-cell>
          <table:table-cell office:value-type="float" office:value="181749" table:style-name="ce11">
            <text:p>181749</text:p>
          </table:table-cell>
          <table:table-cell office:value-type="currency" office:value="19565" table:style-name="ce12">
            <text:p>$19,565</text:p>
          </table:table-cell>
          <table:table-cell office:value-type="currency" office:value="12025" table:style-name="ce12">
            <text:p>$12,025</text:p>
          </table:table-cell>
          <table:table-cell office:value-type="percentage" office:value="0.61461794019933558" table:formula="of:=SUM([.E45]/[.D45])" table:style-name="ce13">
            <text:p>61%</text:p>
          </table:table-cell>
          <table:table-cell office:value-type="string" office:string-value="POOR" table:formula="of:=IF([.F45]&gt;69%; &quot;GOOD&quot;; &quot;POOR&quot;)" table:style-name="ce21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45]&gt;299;&quot;High HP&quot;;[.I45]&gt;99;&quot;Medium HP&quot;;[.I4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4" table:style-name="ce6">
            <text:p>24</text:p>
          </table:table-cell>
          <table:table-cell office:value-type="float" office:value="61.227000310000001" table:style-name="ce6">
            <text:p>61.22700031</text:p>
          </table:table-cell>
          <table:table-cell office:value-type="float" office:value="20" table:style-name="ce6">
            <text:p>20</text:p>
          </table:table-cell>
          <table:table-cell office:value-type="float" office:value="113.3" table:style-name="ce6">
            <text:p>113.3</text:p>
          </table:table-cell>
          <table:table-cell office:value-type="float" office:value="76.8" table:style-name="ce6">
            <text:p>76.8</text:p>
          </table:table-cell>
          <table:table-cell office:value-type="float" office:value="186.3" table:style-name="ce6">
            <text:p>186.3</text:p>
          </table:table-cell>
          <table:table-cell office:value-type="float" office:value="3.5329999999999999" table:style-name="ce6">
            <text:p>3.533</text:p>
          </table:table-cell>
          <table:table-cell office:value-type="date" office:date-value="2011-09-01T00:00:00" table:style-name="ce7">
            <text:p>9/1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Ford</text:p>
          </table:table-cell>
          <table:table-cell office:value-type="string" table:style-name="ce5">
            <text:p>Escort</text:p>
          </table:table-cell>
          <table:table-cell office:value-type="float" office:value="70227" table:style-name="ce11">
            <text:p>70227</text:p>
          </table:table-cell>
          <table:table-cell office:value-type="currency" office:value="12070" table:style-name="ce12">
            <text:p>$12,070</text:p>
          </table:table-cell>
          <table:table-cell office:value-type="currency" office:value="7425" table:style-name="ce12">
            <text:p>$7,425</text:p>
          </table:table-cell>
          <table:table-cell office:value-type="percentage" office:value="0.61516155758077884" table:formula="of:=SUM([.E46]/[.D46])" table:style-name="ce13">
            <text:p>62%</text:p>
          </table:table-cell>
          <table:table-cell office:value-type="string" office:string-value="POOR" table:formula="of:=IF([.F46]&gt;69%; &quot;GOOD&quot;; &quot;POOR&quot;)" table:style-name="ce21">
            <text:p>POOR</text:p>
          </table:table-cell>
          <table:table-cell office:value-type="float" office:value="2" table:style-name="ce6">
            <text:p>2</text:p>
          </table:table-cell>
          <table:table-cell office:value-type="float" office:value="110" table:style-name="ce6">
            <text:p>110</text:p>
          </table:table-cell>
          <table:table-cell office:value-type="string" office:string-value="Medium HP" table:formula="of:=COM.MICROSOFT.IFS([.I46]&gt;299;&quot;High HP&quot;;[.I46]&gt;99;&quot;Medium HP&quot;;[.I4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0" table:style-name="ce6">
            <text:p>30</text:p>
          </table:table-cell>
          <table:table-cell office:value-type="float" office:value="44.083709460000001" table:style-name="ce6">
            <text:p>44.08370946</text:p>
          </table:table-cell>
          <table:table-cell office:value-type="float" office:value="12.7" table:style-name="ce6">
            <text:p>12.7</text:p>
          </table:table-cell>
          <table:table-cell office:value-type="float" office:value="98.4" table:style-name="ce6">
            <text:p>98.4</text:p>
          </table:table-cell>
          <table:table-cell office:value-type="float" office:value="67" table:style-name="ce6">
            <text:p>67</text:p>
          </table:table-cell>
          <table:table-cell office:value-type="float" office:value="174.7" table:style-name="ce6">
            <text:p>174.7</text:p>
          </table:table-cell>
          <table:table-cell office:value-type="float" office:value="2.468" table:style-name="ce6">
            <text:p>2.468</text:p>
          </table:table-cell>
          <table:table-cell office:value-type="date" office:date-value="2012-03-31T00:00:00" table:style-name="ce7">
            <text:p>3/31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Ford</text:p>
          </table:table-cell>
          <table:table-cell office:value-type="string" table:style-name="ce5">
            <text:p>Mustang</text:p>
          </table:table-cell>
          <table:table-cell office:value-type="float" office:value="113369" table:style-name="ce11">
            <text:p>113369</text:p>
          </table:table-cell>
          <table:table-cell office:value-type="currency" office:value="21560" table:style-name="ce12">
            <text:p>$21,560</text:p>
          </table:table-cell>
          <table:table-cell office:value-type="currency" office:value="12760" table:style-name="ce12">
            <text:p>$12,760</text:p>
          </table:table-cell>
          <table:table-cell office:value-type="percentage" office:value="0.59183673469387754" table:formula="of:=SUM([.E47]/[.D47])" table:style-name="ce13">
            <text:p>59%</text:p>
          </table:table-cell>
          <table:table-cell office:value-type="string" office:string-value="POOR" table:formula="of:=IF([.F47]&gt;69%; &quot;GOOD&quot;; &quot;POOR&quot;)" table:style-name="ce21">
            <text:p>POOR</text:p>
          </table:table-cell>
          <table:table-cell office:value-type="float" office:value="3.8" table:style-name="ce6">
            <text:p>3.8</text:p>
          </table:table-cell>
          <table:table-cell office:value-type="float" office:value="190" table:style-name="ce6">
            <text:p>190</text:p>
          </table:table-cell>
          <table:table-cell office:value-type="string" office:string-value="Medium HP" table:formula="of:=COM.MICROSOFT.IFS([.I47]&gt;299;&quot;High HP&quot;;[.I47]&gt;99;&quot;Medium HP&quot;;[.I4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76.509184559999994" table:style-name="ce6">
            <text:p>76.50918456</text:p>
          </table:table-cell>
          <table:table-cell office:value-type="float" office:value="15.7" table:style-name="ce6">
            <text:p>15.7</text:p>
          </table:table-cell>
          <table:table-cell office:value-type="float" office:value="101.3" table:style-name="ce6">
            <text:p>101.3</text:p>
          </table:table-cell>
          <table:table-cell office:value-type="float" office:value="73.099999999999994" table:style-name="ce6">
            <text:p>73.1</text:p>
          </table:table-cell>
          <table:table-cell office:value-type="float" office:value="183.2" table:style-name="ce6">
            <text:p>183.2</text:p>
          </table:table-cell>
          <table:table-cell office:value-type="float" office:value="3.2029999999999998" table:style-name="ce6">
            <text:p>3.203</text:p>
          </table:table-cell>
          <table:table-cell office:value-type="date" office:date-value="2012-01-31T00:00:00" table:style-name="ce7">
            <text:p>1/31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Ford</text:p>
          </table:table-cell>
          <table:table-cell office:value-type="string" table:style-name="ce5">
            <text:p>Contour</text:p>
          </table:table-cell>
          <table:table-cell office:value-type="float" office:value="35068" table:style-name="ce11">
            <text:p>35068</text:p>
          </table:table-cell>
          <table:table-cell office:value-type="currency" office:value="17035" table:style-name="ce12">
            <text:p>$17,035</text:p>
          </table:table-cell>
          <table:table-cell office:value-type="currency" office:value="8835" table:style-name="ce12">
            <text:p>$8,835</text:p>
          </table:table-cell>
          <table:table-cell office:value-type="percentage" office:value="0.5186380980334605" table:formula="of:=SUM([.E48]/[.D48])" table:style-name="ce13">
            <text:p>52%</text:p>
          </table:table-cell>
          <table:table-cell office:value-type="string" office:string-value="POOR" table:formula="of:=IF([.F48]&gt;69%; &quot;GOOD&quot;; &quot;POOR&quot;)" table:style-name="ce21">
            <text:p>POOR</text:p>
          </table:table-cell>
          <table:table-cell office:value-type="float" office:value="2.5" table:style-name="ce6">
            <text:p>2.5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48]&gt;299;&quot;High HP&quot;;[.I48]&gt;99;&quot;Medium HP&quot;;[.I4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67.351010720000005" table:style-name="ce6">
            <text:p>67.35101072</text:p>
          </table:table-cell>
          <table:table-cell office:value-type="float" office:value="15" table:style-name="ce6">
            <text:p>15</text:p>
          </table:table-cell>
          <table:table-cell office:value-type="float" office:value="106.5" table:style-name="ce6">
            <text:p>106.5</text:p>
          </table:table-cell>
          <table:table-cell office:value-type="float" office:value="69.099999999999994" table:style-name="ce6">
            <text:p>69.1</text:p>
          </table:table-cell>
          <table:table-cell office:value-type="float" office:value="184.6" table:style-name="ce6">
            <text:p>184.6</text:p>
          </table:table-cell>
          <table:table-cell office:value-type="float" office:value="2.7690000000000001" table:style-name="ce6">
            <text:p>2.769</text:p>
          </table:table-cell>
          <table:table-cell office:value-type="date" office:date-value="2012-08-20T00:00:00" table:style-name="ce7">
            <text:p>8/20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Ford</text:p>
          </table:table-cell>
          <table:table-cell office:value-type="string" table:style-name="ce5">
            <text:p>Taurus</text:p>
          </table:table-cell>
          <table:table-cell office:value-type="float" office:value="245815" table:style-name="ce11">
            <text:p>245815</text:p>
          </table:table-cell>
          <table:table-cell office:value-type="currency" office:value="17885" table:style-name="ce12">
            <text:p>$17,885</text:p>
          </table:table-cell>
          <table:table-cell office:value-type="currency" office:value="10055" table:style-name="ce12">
            <text:p>$10,055</text:p>
          </table:table-cell>
          <table:table-cell office:value-type="percentage" office:value="0.56220296337713171" table:formula="of:=SUM([.E49]/[.D49])" table:style-name="ce13">
            <text:p>56%</text:p>
          </table:table-cell>
          <table:table-cell office:value-type="string" office:string-value="POOR" table:formula="of:=IF([.F49]&gt;69%; &quot;GOOD&quot;; &quot;POOR&quot;)" table:style-name="ce21">
            <text:p>POOR</text:p>
          </table:table-cell>
          <table:table-cell office:value-type="float" office:value="3" table:style-name="ce6">
            <text:p>3</text:p>
          </table:table-cell>
          <table:table-cell office:value-type="float" office:value="155" table:style-name="ce6">
            <text:p>155</text:p>
          </table:table-cell>
          <table:table-cell office:value-type="string" office:string-value="Medium HP" table:formula="of:=COM.MICROSOFT.IFS([.I49]&gt;299;&quot;High HP&quot;;[.I49]&gt;99;&quot;Medium HP&quot;;[.I4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62.503739500000002" table:style-name="ce6">
            <text:p>62.5037395</text:p>
          </table:table-cell>
          <table:table-cell office:value-type="float" office:value="16" table:style-name="ce6">
            <text:p>16</text:p>
          </table:table-cell>
          <table:table-cell office:value-type="float" office:value="108.5" table:style-name="ce6">
            <text:p>108.5</text:p>
          </table:table-cell>
          <table:table-cell office:value-type="float" office:value="73" table:style-name="ce6">
            <text:p>73</text:p>
          </table:table-cell>
          <table:table-cell office:value-type="float" office:value="197.6" table:style-name="ce6">
            <text:p>197.6</text:p>
          </table:table-cell>
          <table:table-cell office:value-type="float" office:value="3.3679999999999999" table:style-name="ce6">
            <text:p>3.368</text:p>
          </table:table-cell>
          <table:table-cell office:value-type="date" office:date-value="2011-12-20T00:00:00" table:style-name="ce7">
            <text:p>12/20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Ford</text:p>
          </table:table-cell>
          <table:table-cell office:value-type="string" table:style-name="ce5">
            <text:p>Focus</text:p>
          </table:table-cell>
          <table:table-cell office:value-type="float" office:value="175670" table:style-name="ce11">
            <text:p>175670</text:p>
          </table:table-cell>
          <table:table-cell office:value-type="currency" office:value="12315" table:style-name="ce12">
            <text:p>$12,315</text:p>
          </table:table-cell>
          <table:table-cell office:value-type="currency" office:value="8670" table:style-name="ce12">
            <text:p>$8,670</text:p>
          </table:table-cell>
          <table:table-cell office:value-type="percentage" office:value="0.7040194884287454" table:formula="of:=SUM([.E50]/[.D50])" table:style-name="ce13">
            <text:p>70%</text:p>
          </table:table-cell>
          <table:table-cell office:value-type="string" office:string-value="GOOD" table:formula="of:=IF([.F50]&gt;69%; &quot;GOOD&quot;; &quot;POOR&quot;)" table:style-name="ce21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07" table:style-name="ce6">
            <text:p>107</text:p>
          </table:table-cell>
          <table:table-cell office:value-type="string" office:string-value="Medium HP" table:formula="of:=COM.MICROSOFT.IFS([.I50]&gt;299;&quot;High HP&quot;;[.I50]&gt;99;&quot;Medium HP&quot;;[.I5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0" table:style-name="ce6">
            <text:p>30</text:p>
          </table:table-cell>
          <table:table-cell office:value-type="float" office:value="43.117132009999999" table:style-name="ce6">
            <text:p>43.11713201</text:p>
          </table:table-cell>
          <table:table-cell office:value-type="float" office:value="13.2" table:style-name="ce6">
            <text:p>13.2</text:p>
          </table:table-cell>
          <table:table-cell office:value-type="float" office:value="103" table:style-name="ce6">
            <text:p>103</text:p>
          </table:table-cell>
          <table:table-cell office:value-type="float" office:value="66.900000000000006" table:style-name="ce6">
            <text:p>66.9</text:p>
          </table:table-cell>
          <table:table-cell office:value-type="float" office:value="174.8" table:style-name="ce6">
            <text:p>174.8</text:p>
          </table:table-cell>
          <table:table-cell office:value-type="float" office:value="2.5640000000000001" table:style-name="ce6">
            <text:p>2.564</text:p>
          </table:table-cell>
          <table:table-cell office:value-type="date" office:date-value="2012-07-22T00:00:00" table:style-name="ce7">
            <text:p>7/22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Ford</text:p>
          </table:table-cell>
          <table:table-cell office:value-type="string" table:style-name="ce5">
            <text:p>Crown Victoria</text:p>
          </table:table-cell>
          <table:table-cell office:value-type="float" office:value="63403" table:style-name="ce11">
            <text:p>63403</text:p>
          </table:table-cell>
          <table:table-cell office:value-type="currency" office:value="22195" table:style-name="ce12">
            <text:p>$22,195</text:p>
          </table:table-cell>
          <table:table-cell office:value-type="currency" office:value="14210" table:style-name="ce12">
            <text:p>$14,210</text:p>
          </table:table-cell>
          <table:table-cell office:value-type="percentage" office:value="0.64023428700157692" table:formula="of:=SUM([.E51]/[.D51])" table:style-name="ce13">
            <text:p>64%</text:p>
          </table:table-cell>
          <table:table-cell office:value-type="string" office:string-value="POOR" table:formula="of:=IF([.F51]&gt;69%; &quot;GOOD&quot;; &quot;POOR&quot;)" table:style-name="ce21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00" table:style-name="ce6">
            <text:p>200</text:p>
          </table:table-cell>
          <table:table-cell office:value-type="string" office:string-value="Medium HP" table:formula="of:=COM.MICROSOFT.IFS([.I51]&gt;299;&quot;High HP&quot;;[.I51]&gt;99;&quot;Medium HP&quot;;[.I5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80.499536710000001" table:style-name="ce6">
            <text:p>80.49953671</text:p>
          </table:table-cell>
          <table:table-cell office:value-type="float" office:value="19" table:style-name="ce6">
            <text:p>19</text:p>
          </table:table-cell>
          <table:table-cell office:value-type="float" office:value="114.7" table:style-name="ce6">
            <text:p>114.7</text:p>
          </table:table-cell>
          <table:table-cell office:value-type="float" office:value="78.2" table:style-name="ce6">
            <text:p>78.2</text:p>
          </table:table-cell>
          <table:table-cell office:value-type="float" office:value="212" table:style-name="ce6">
            <text:p>212</text:p>
          </table:table-cell>
          <table:table-cell office:value-type="float" office:value="3.9079999999999999" table:style-name="ce6">
            <text:p>3.908</text:p>
          </table:table-cell>
          <table:table-cell office:value-type="date" office:date-value="2011-09-26T00:00:00" table:style-name="ce7">
            <text:p>9/26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Ford</text:p>
          </table:table-cell>
          <table:table-cell office:value-type="string" table:style-name="ce5">
            <text:p>Explorer</text:p>
          </table:table-cell>
          <table:table-cell office:value-type="float" office:value="276747" table:style-name="ce11">
            <text:p>276747</text:p>
          </table:table-cell>
          <table:table-cell office:value-type="currency" office:value="31930" table:style-name="ce12">
            <text:p>$31,930</text:p>
          </table:table-cell>
          <table:table-cell office:value-type="currency" office:value="16640" table:style-name="ce12">
            <text:p>$16,640</text:p>
          </table:table-cell>
          <table:table-cell office:value-type="percentage" office:value="0.52113999373629816" table:formula="of:=SUM([.E52]/[.D52])" table:style-name="ce13">
            <text:p>52%</text:p>
          </table:table-cell>
          <table:table-cell office:value-type="string" office:string-value="POOR" table:formula="of:=IF([.F52]&gt;69%; &quot;GOOD&quot;; &quot;POOR&quot;)" table:style-name="ce21">
            <text:p>POOR</text:p>
          </table:table-cell>
          <table:table-cell office:value-type="float" office:value="4" table:style-name="ce6">
            <text:p>4</text:p>
          </table:table-cell>
          <table:table-cell office:value-type="float" office:value="210" table:style-name="ce6">
            <text:p>210</text:p>
          </table:table-cell>
          <table:table-cell office:value-type="string" office:string-value="Medium HP" table:formula="of:=COM.MICROSOFT.IFS([.I52]&gt;299;&quot;High HP&quot;;[.I52]&gt;99;&quot;Medium HP&quot;;[.I5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9" table:style-name="ce6">
            <text:p>19</text:p>
          </table:table-cell>
          <table:table-cell office:value-type="float" office:value="87.635495779999999" table:style-name="ce6">
            <text:p>87.63549578</text:p>
          </table:table-cell>
          <table:table-cell office:value-type="float" office:value="21" table:style-name="ce6">
            <text:p>21</text:p>
          </table:table-cell>
          <table:table-cell office:value-type="float" office:value="111.6" table:style-name="ce6">
            <text:p>111.6</text:p>
          </table:table-cell>
          <table:table-cell office:value-type="float" office:value="70.2" table:style-name="ce6">
            <text:p>70.2</text:p>
          </table:table-cell>
          <table:table-cell office:value-type="float" office:value="190.7" table:style-name="ce6">
            <text:p>190.7</text:p>
          </table:table-cell>
          <table:table-cell office:value-type="float" office:value="3.8759999999999999" table:style-name="ce6">
            <text:p>3.876</text:p>
          </table:table-cell>
          <table:table-cell office:value-type="date" office:date-value="2012-04-25T00:00:00" table:style-name="ce7">
            <text:p>4/25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Ford</text:p>
          </table:table-cell>
          <table:table-cell office:value-type="string" table:style-name="ce5">
            <text:p>Windstar</text:p>
          </table:table-cell>
          <table:table-cell office:value-type="float" office:value="155787" table:style-name="ce11">
            <text:p>155787</text:p>
          </table:table-cell>
          <table:table-cell office:value-type="currency" office:value="21410" table:style-name="ce12">
            <text:p>$21,410</text:p>
          </table:table-cell>
          <table:table-cell office:value-type="currency" office:value="13175" table:style-name="ce12">
            <text:p>$13,175</text:p>
          </table:table-cell>
          <table:table-cell office:value-type="percentage" office:value="0.6153666510976179" table:formula="of:=SUM([.E53]/[.D53])" table:style-name="ce13">
            <text:p>62%</text:p>
          </table:table-cell>
          <table:table-cell office:value-type="string" office:string-value="POOR" table:formula="of:=IF([.F53]&gt;69%; &quot;GOOD&quot;; &quot;POOR&quot;)" table:style-name="ce21">
            <text:p>POOR</text:p>
          </table:table-cell>
          <table:table-cell office:value-type="float" office:value="3" table:style-name="ce6">
            <text:p>3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53]&gt;299;&quot;High HP&quot;;[.I53]&gt;99;&quot;Medium HP&quot;;[.I5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1" table:style-name="ce6">
            <text:p>21</text:p>
          </table:table-cell>
          <table:table-cell office:value-type="float" office:value="62.095048390000002" table:style-name="ce6">
            <text:p>62.09504839</text:p>
          </table:table-cell>
          <table:table-cell office:value-type="float" office:value="26" table:style-name="ce6">
            <text:p>26</text:p>
          </table:table-cell>
          <table:table-cell office:value-type="float" office:value="120.7" table:style-name="ce6">
            <text:p>120.7</text:p>
          </table:table-cell>
          <table:table-cell office:value-type="float" office:value="76.599999999999994" table:style-name="ce6">
            <text:p>76.6</text:p>
          </table:table-cell>
          <table:table-cell office:value-type="float" office:value="200.9" table:style-name="ce6">
            <text:p>200.9</text:p>
          </table:table-cell>
          <table:table-cell office:value-type="float" office:value="3.7610000000000001" table:style-name="ce6">
            <text:p>3.761</text:p>
          </table:table-cell>
          <table:table-cell office:value-type="date" office:date-value="2012-02-25T00:00:00" table:style-name="ce7">
            <text:p>2/25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Ford</text:p>
          </table:table-cell>
          <table:table-cell office:value-type="string" table:style-name="ce5">
            <text:p>Expedition</text:p>
          </table:table-cell>
          <table:table-cell office:value-type="float" office:value="125338" table:style-name="ce11">
            <text:p>125338</text:p>
          </table:table-cell>
          <table:table-cell office:value-type="currency" office:value="36135" table:style-name="ce12">
            <text:p>$36,135</text:p>
          </table:table-cell>
          <table:table-cell office:value-type="currency" office:value="23575" table:style-name="ce12">
            <text:p>$23,575</text:p>
          </table:table-cell>
          <table:table-cell office:value-type="percentage" office:value="0.65241455652414559" table:formula="of:=SUM([.E54]/[.D54])" table:style-name="ce13">
            <text:p>65%</text:p>
          </table:table-cell>
          <table:table-cell office:value-type="string" office:string-value="POOR" table:formula="of:=IF([.F54]&gt;69%; &quot;GOOD&quot;; &quot;POOR&quot;)" table:style-name="ce21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40" table:style-name="ce6">
            <text:p>240</text:p>
          </table:table-cell>
          <table:table-cell office:value-type="string" office:string-value="Medium HP" table:formula="of:=COM.MICROSOFT.IFS([.I54]&gt;299;&quot;High HP&quot;;[.I54]&gt;99;&quot;Medium HP&quot;;[.I5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6" table:style-name="ce6">
            <text:p>16</text:p>
          </table:table-cell>
          <table:table-cell office:value-type="float" office:value="100.0248023" table:style-name="ce6">
            <text:p>100.0248023</text:p>
          </table:table-cell>
          <table:table-cell office:value-type="float" office:value="26" table:style-name="ce6">
            <text:p>26</text:p>
          </table:table-cell>
          <table:table-cell office:value-type="float" office:value="119" table:style-name="ce6">
            <text:p>119</text:p>
          </table:table-cell>
          <table:table-cell office:value-type="float" office:value="78.7" table:style-name="ce6">
            <text:p>78.7</text:p>
          </table:table-cell>
          <table:table-cell office:value-type="float" office:value="204.6" table:style-name="ce6">
            <text:p>204.6</text:p>
          </table:table-cell>
          <table:table-cell office:value-type="float" office:value="4.8079999999999998" table:style-name="ce6">
            <text:p>4.808</text:p>
          </table:table-cell>
          <table:table-cell office:value-type="date" office:date-value="2012-09-14T00:00:00" table:style-name="ce7">
            <text:p>9/14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Ford</text:p>
          </table:table-cell>
          <table:table-cell office:value-type="string" table:style-name="ce5">
            <text:p>Ranger</text:p>
          </table:table-cell>
          <table:table-cell office:value-type="float" office:value="220650" table:style-name="ce11">
            <text:p>220650</text:p>
          </table:table-cell>
          <table:table-cell office:value-type="currency" office:value="12050" table:style-name="ce12">
            <text:p>$12,050</text:p>
          </table:table-cell>
          <table:table-cell office:value-type="currency" office:value="7850" table:style-name="ce12">
            <text:p>$7,850</text:p>
          </table:table-cell>
          <table:table-cell office:value-type="percentage" office:value="0.65145228215767637" table:formula="of:=SUM([.E55]/[.D55])" table:style-name="ce13">
            <text:p>65%</text:p>
          </table:table-cell>
          <table:table-cell office:value-type="string" office:string-value="POOR" table:formula="of:=IF([.F55]&gt;69%; &quot;GOOD&quot;; &quot;POOR&quot;)" table:style-name="ce21">
            <text:p>POOR</text:p>
          </table:table-cell>
          <table:table-cell office:value-type="float" office:value="2.5" table:style-name="ce6">
            <text:p>2.5</text:p>
          </table:table-cell>
          <table:table-cell office:value-type="float" office:value="119" table:style-name="ce6">
            <text:p>119</text:p>
          </table:table-cell>
          <table:table-cell office:value-type="string" office:string-value="Medium HP" table:formula="of:=COM.MICROSOFT.IFS([.I55]&gt;299;&quot;High HP&quot;;[.I55]&gt;99;&quot;Medium HP&quot;;[.I5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3" table:style-name="ce6">
            <text:p>23</text:p>
          </table:table-cell>
          <table:table-cell office:value-type="float" office:value="47.389531310000002" table:style-name="ce6">
            <text:p>47.38953131</text:p>
          </table:table-cell>
          <table:table-cell office:value-type="float" office:value="20" table:style-name="ce6">
            <text:p>20</text:p>
          </table:table-cell>
          <table:table-cell office:value-type="float" office:value="117.5" table:style-name="ce6">
            <text:p>117.5</text:p>
          </table:table-cell>
          <table:table-cell office:value-type="float" office:value="69.400000000000006" table:style-name="ce6">
            <text:p>69.4</text:p>
          </table:table-cell>
          <table:table-cell office:value-type="float" office:value="200.7" table:style-name="ce6">
            <text:p>200.7</text:p>
          </table:table-cell>
          <table:table-cell office:value-type="float" office:value="3.0859999999999999" table:style-name="ce6">
            <text:p>3.086</text:p>
          </table:table-cell>
          <table:table-cell office:value-type="date" office:date-value="2012-01-14T00:00:00" table:style-name="ce7">
            <text:p>1/14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Ford</text:p>
          </table:table-cell>
          <table:table-cell office:value-type="string" table:style-name="ce5">
            <text:p>F-Series</text:p>
          </table:table-cell>
          <table:table-cell office:value-type="float" office:value="540561" table:style-name="ce11">
            <text:p>540561</text:p>
          </table:table-cell>
          <table:table-cell office:value-type="currency" office:value="26935" table:style-name="ce12">
            <text:p>$26,935</text:p>
          </table:table-cell>
          <table:table-cell office:value-type="currency" office:value="15075" table:style-name="ce12">
            <text:p>$15,075</text:p>
          </table:table-cell>
          <table:table-cell office:value-type="percentage" office:value="0.55968071282717657" table:formula="of:=SUM([.E56]/[.D56])" table:style-name="ce13">
            <text:p>56%</text:p>
          </table:table-cell>
          <table:table-cell office:value-type="string" office:string-value="POOR" table:formula="of:=IF([.F56]&gt;69%; &quot;GOOD&quot;; &quot;POOR&quot;)" table:style-name="ce21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20" table:style-name="ce6">
            <text:p>220</text:p>
          </table:table-cell>
          <table:table-cell office:value-type="string" office:string-value="Medium HP" table:formula="of:=COM.MICROSOFT.IFS([.I56]&gt;299;&quot;High HP&quot;;[.I56]&gt;99;&quot;Medium HP&quot;;[.I5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8" table:style-name="ce6">
            <text:p>18</text:p>
          </table:table-cell>
          <table:table-cell office:value-type="float" office:value="89.401934729999994" table:style-name="ce6">
            <text:p>89.40193473</text:p>
          </table:table-cell>
          <table:table-cell office:value-type="float" office:value="25.1" table:style-name="ce6">
            <text:p>25.1</text:p>
          </table:table-cell>
          <table:table-cell office:value-type="float" office:value="138.5" table:style-name="ce6">
            <text:p>138.5</text:p>
          </table:table-cell>
          <table:table-cell office:value-type="float" office:value="79.099999999999994" table:style-name="ce6">
            <text:p>79.1</text:p>
          </table:table-cell>
          <table:table-cell office:value-type="float" office:value="224.5" table:style-name="ce6">
            <text:p>224.5</text:p>
          </table:table-cell>
          <table:table-cell office:value-type="float" office:value="4.2409999999999997" table:style-name="ce6">
            <text:p>4.241</text:p>
          </table:table-cell>
          <table:table-cell office:value-type="date" office:date-value="2012-08-16T00:00:00" table:style-name="ce7">
            <text:p>8/16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Honda</text:p>
          </table:table-cell>
          <table:table-cell office:value-type="string" table:style-name="ce5">
            <text:p>Civic</text:p>
          </table:table-cell>
          <table:table-cell office:value-type="float" office:value="199685" table:style-name="ce11">
            <text:p>199685</text:p>
          </table:table-cell>
          <table:table-cell office:value-type="currency" office:value="12885" table:style-name="ce12">
            <text:p>$12,885</text:p>
          </table:table-cell>
          <table:table-cell office:value-type="currency" office:value="9850" table:style-name="ce12">
            <text:p>$9,850</text:p>
          </table:table-cell>
          <table:table-cell office:value-type="percentage" office:value="0.76445479239425684" table:formula="of:=SUM([.E57]/[.D57])" table:style-name="ce13">
            <text:p>76%</text:p>
          </table:table-cell>
          <table:table-cell office:value-type="string" office:string-value="GOOD" table:formula="of:=IF([.F57]&gt;69%; &quot;GOOD&quot;; &quot;POOR&quot;)" table:style-name="ce21">
            <text:p>GOOD</text:p>
          </table:table-cell>
          <table:table-cell office:value-type="float" office:value="1.6" table:style-name="ce6">
            <text:p>1.6</text:p>
          </table:table-cell>
          <table:table-cell office:value-type="float" office:value="106" table:style-name="ce6">
            <text:p>106</text:p>
          </table:table-cell>
          <table:table-cell office:value-type="string" office:string-value="Medium HP" table:formula="of:=COM.MICROSOFT.IFS([.I57]&gt;299;&quot;High HP&quot;;[.I57]&gt;99;&quot;Medium HP&quot;;[.I5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2" table:style-name="ce6">
            <text:p>32</text:p>
          </table:table-cell>
          <table:table-cell office:value-type="float" office:value="42.879097340000001" table:style-name="ce6">
            <text:p>42.87909734</text:p>
          </table:table-cell>
          <table:table-cell office:value-type="float" office:value="11.9" table:style-name="ce6">
            <text:p>11.9</text:p>
          </table:table-cell>
          <table:table-cell office:value-type="float" office:value="103.2" table:style-name="ce6">
            <text:p>103.2</text:p>
          </table:table-cell>
          <table:table-cell office:value-type="float" office:value="67.099999999999994" table:style-name="ce6">
            <text:p>67.1</text:p>
          </table:table-cell>
          <table:table-cell office:value-type="float" office:value="175.1" table:style-name="ce6">
            <text:p>175.1</text:p>
          </table:table-cell>
          <table:table-cell office:value-type="float" office:value="2.339" table:style-name="ce6">
            <text:p>2.339</text:p>
          </table:table-cell>
          <table:table-cell office:value-type="date" office:date-value="2011-10-21T00:00:00" table:style-name="ce7">
            <text:p>10/21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Honda</text:p>
          </table:table-cell>
          <table:table-cell office:value-type="string" table:style-name="ce5">
            <text:p>Accord</text:p>
          </table:table-cell>
          <table:table-cell office:value-type="float" office:value="230902" table:style-name="ce11">
            <text:p>230902</text:p>
          </table:table-cell>
          <table:table-cell office:value-type="currency" office:value="15350" table:style-name="ce12">
            <text:p>$15,350</text:p>
          </table:table-cell>
          <table:table-cell office:value-type="currency" office:value="13210" table:style-name="ce12">
            <text:p>$13,210</text:p>
          </table:table-cell>
          <table:table-cell office:value-type="percentage" office:value="0.86058631921824102" table:formula="of:=SUM([.E58]/[.D58])" table:style-name="ce13">
            <text:p>86%</text:p>
          </table:table-cell>
          <table:table-cell office:value-type="string" office:string-value="GOOD" table:formula="of:=IF([.F58]&gt;69%; &quot;GOOD&quot;; &quot;POOR&quot;)" table:style-name="ce21">
            <text:p>GOOD</text:p>
          </table:table-cell>
          <table:table-cell office:value-type="float" office:value="2.2999999999999998" table:style-name="ce6">
            <text:p>2.3</text:p>
          </table:table-cell>
          <table:table-cell office:value-type="float" office:value="135" table:style-name="ce6">
            <text:p>135</text:p>
          </table:table-cell>
          <table:table-cell office:value-type="string" office:string-value="Medium HP" table:formula="of:=COM.MICROSOFT.IFS([.I58]&gt;299;&quot;High HP&quot;;[.I58]&gt;99;&quot;Medium HP&quot;;[.I5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54.269548290000003" table:style-name="ce6">
            <text:p>54.26954829</text:p>
          </table:table-cell>
          <table:table-cell office:value-type="float" office:value="17.100000000000001" table:style-name="ce6">
            <text:p>17.1</text:p>
          </table:table-cell>
          <table:table-cell office:value-type="float" office:value="106.9" table:style-name="ce6">
            <text:p>106.9</text:p>
          </table:table-cell>
          <table:table-cell office:value-type="float" office:value="70.3" table:style-name="ce6">
            <text:p>70.3</text:p>
          </table:table-cell>
          <table:table-cell office:value-type="float" office:value="188.8" table:style-name="ce6">
            <text:p>188.8</text:p>
          </table:table-cell>
          <table:table-cell office:value-type="float" office:value="2.9319999999999999" table:style-name="ce6">
            <text:p>2.932</text:p>
          </table:table-cell>
          <table:table-cell office:value-type="date" office:date-value="2012-05-20T00:00:00" table:style-name="ce7">
            <text:p>5/20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Honda</text:p>
          </table:table-cell>
          <table:table-cell office:value-type="string" table:style-name="ce5">
            <text:p>CR-V</text:p>
          </table:table-cell>
          <table:table-cell office:value-type="float" office:value="73203" table:style-name="ce11">
            <text:p>73203</text:p>
          </table:table-cell>
          <table:table-cell office:value-type="currency" office:value="20550" table:style-name="ce12">
            <text:p>$20,550</text:p>
          </table:table-cell>
          <table:table-cell office:value-type="currency" office:value="17710" table:style-name="ce12">
            <text:p>$17,710</text:p>
          </table:table-cell>
          <table:table-cell office:value-type="percentage" office:value="0.8618004866180049" table:formula="of:=SUM([.E59]/[.D59])" table:style-name="ce13">
            <text:p>86%</text:p>
          </table:table-cell>
          <table:table-cell office:value-type="string" office:string-value="GOOD" table:formula="of:=IF([.F59]&gt;69%; &quot;GOOD&quot;; &quot;POOR&quot;)" table:style-name="ce21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46" table:style-name="ce6">
            <text:p>146</text:p>
          </table:table-cell>
          <table:table-cell office:value-type="string" office:string-value="Medium HP" table:formula="of:=COM.MICROSOFT.IFS([.I59]&gt;299;&quot;High HP&quot;;[.I59]&gt;99;&quot;Medium HP&quot;;[.I5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4" table:style-name="ce6">
            <text:p>24</text:p>
          </table:table-cell>
          <table:table-cell office:value-type="float" office:value="60.087966620000003" table:style-name="ce6">
            <text:p>60.08796662</text:p>
          </table:table-cell>
          <table:table-cell office:value-type="float" office:value="15.3" table:style-name="ce6">
            <text:p>15.3</text:p>
          </table:table-cell>
          <table:table-cell office:value-type="float" office:value="103.2" table:style-name="ce6">
            <text:p>103.2</text:p>
          </table:table-cell>
          <table:table-cell office:value-type="float" office:value="68.900000000000006" table:style-name="ce6">
            <text:p>68.9</text:p>
          </table:table-cell>
          <table:table-cell office:value-type="float" office:value="177.6" table:style-name="ce6">
            <text:p>177.6</text:p>
          </table:table-cell>
          <table:table-cell office:value-type="float" office:value="3.2189999999999999" table:style-name="ce6">
            <text:p>3.219</text:p>
          </table:table-cell>
          <table:table-cell office:value-type="date" office:date-value="2012-03-21T00:00:00" table:style-name="ce7">
            <text:p>3/21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Honda</text:p>
          </table:table-cell>
          <table:table-cell office:value-type="string" table:style-name="ce5">
            <text:p>Passport</text:p>
          </table:table-cell>
          <table:table-cell office:value-type="float" office:value="12855" table:style-name="ce11">
            <text:p>12855</text:p>
          </table:table-cell>
          <table:table-cell office:value-type="currency" office:value="26600" table:style-name="ce12">
            <text:p>$26,600</text:p>
          </table:table-cell>
          <table:table-cell office:value-type="currency" office:value="17525" table:style-name="ce12">
            <text:p>$17,525</text:p>
          </table:table-cell>
          <table:table-cell office:value-type="percentage" office:value="0.65883458646616544" table:formula="of:=SUM([.E60]/[.D60])" table:style-name="ce13">
            <text:p>66%</text:p>
          </table:table-cell>
          <table:table-cell office:value-type="string" office:string-value="POOR" table:formula="of:=IF([.F60]&gt;69%; &quot;GOOD&quot;; &quot;POOR&quot;)" table:style-name="ce21">
            <text:p>POOR</text:p>
          </table:table-cell>
          <table:table-cell office:value-type="float" office:value="3.2" table:style-name="ce6">
            <text:p>3.2</text:p>
          </table:table-cell>
          <table:table-cell office:value-type="float" office:value="205" table:style-name="ce6">
            <text:p>205</text:p>
          </table:table-cell>
          <table:table-cell office:value-type="string" office:string-value="Medium HP" table:formula="of:=COM.MICROSOFT.IFS([.I60]&gt;299;&quot;High HP&quot;;[.I60]&gt;99;&quot;Medium HP&quot;;[.I6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9" table:style-name="ce6">
            <text:p>19</text:p>
          </table:table-cell>
          <table:table-cell office:value-type="float" office:value="83.602500800000001" table:style-name="ce6">
            <text:p>83.6025008</text:p>
          </table:table-cell>
          <table:table-cell office:value-type="float" office:value="21.1" table:style-name="ce6">
            <text:p>21.1</text:p>
          </table:table-cell>
          <table:table-cell office:value-type="float" office:value="106.4" table:style-name="ce6">
            <text:p>106.4</text:p>
          </table:table-cell>
          <table:table-cell office:value-type="float" office:value="70.400000000000006" table:style-name="ce6">
            <text:p>70.4</text:p>
          </table:table-cell>
          <table:table-cell office:value-type="float" office:value="178.2" table:style-name="ce6">
            <text:p>178.2</text:p>
          </table:table-cell>
          <table:table-cell office:value-type="float" office:value="3.8570000000000002" table:style-name="ce6">
            <text:p>3.857</text:p>
          </table:table-cell>
          <table:table-cell office:value-type="date" office:date-value="2012-10-09T00:00:00" table:style-name="ce7">
            <text:p>10/9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Honda</text:p>
          </table:table-cell>
          <table:table-cell office:value-type="string" table:style-name="ce5">
            <text:p>Odyssey</text:p>
          </table:table-cell>
          <table:table-cell office:value-type="float" office:value="76029" table:style-name="ce11">
            <text:p>76029</text:p>
          </table:table-cell>
          <table:table-cell office:value-type="currency" office:value="26000" table:style-name="ce12">
            <text:p>$26,000</text:p>
          </table:table-cell>
          <table:table-cell office:value-type="currency" office:value="19490" table:style-name="ce12">
            <text:p>$19,490</text:p>
          </table:table-cell>
          <table:table-cell office:value-type="percentage" office:value="0.74961538461538457" table:formula="of:=SUM([.E61]/[.D61])" table:style-name="ce13">
            <text:p>75%</text:p>
          </table:table-cell>
          <table:table-cell office:value-type="string" office:string-value="GOOD" table:formula="of:=IF([.F61]&gt;69%; &quot;GOOD&quot;; &quot;POOR&quot;)" table:style-name="ce21">
            <text:p>GOOD</text:p>
          </table:table-cell>
          <table:table-cell office:value-type="float" office:value="3.5" table:style-name="ce6">
            <text:p>3.5</text:p>
          </table:table-cell>
          <table:table-cell office:value-type="float" office:value="210" table:style-name="ce6">
            <text:p>210</text:p>
          </table:table-cell>
          <table:table-cell office:value-type="string" office:string-value="Medium HP" table:formula="of:=COM.MICROSOFT.IFS([.I61]&gt;299;&quot;High HP&quot;;[.I61]&gt;99;&quot;Medium HP&quot;;[.I6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3" table:style-name="ce6">
            <text:p>23</text:p>
          </table:table-cell>
          <table:table-cell office:value-type="float" office:value="85.217691340000002" table:style-name="ce6">
            <text:p>85.21769134</text:p>
          </table:table-cell>
          <table:table-cell office:value-type="float" office:value="20" table:style-name="ce6">
            <text:p>20</text:p>
          </table:table-cell>
          <table:table-cell office:value-type="float" office:value="118.1" table:style-name="ce6">
            <text:p>118.1</text:p>
          </table:table-cell>
          <table:table-cell office:value-type="float" office:value="75.599999999999994" table:style-name="ce6">
            <text:p>75.6</text:p>
          </table:table-cell>
          <table:table-cell office:value-type="float" office:value="201.2" table:style-name="ce6">
            <text:p>201.2</text:p>
          </table:table-cell>
          <table:table-cell office:value-type="float" office:value="4.2880000000000003" table:style-name="ce6">
            <text:p>4.288</text:p>
          </table:table-cell>
          <table:table-cell office:value-type="date" office:date-value="2012-02-08T00:00:00" table:style-name="ce7">
            <text:p>2/8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Hyundai</text:p>
          </table:table-cell>
          <table:table-cell office:value-type="string" table:style-name="ce5">
            <text:p>Accent</text:p>
          </table:table-cell>
          <table:table-cell office:value-type="float" office:value="41184" table:style-name="ce11">
            <text:p>41184</text:p>
          </table:table-cell>
          <table:table-cell office:value-type="currency" office:value="9699" table:style-name="ce12">
            <text:p>$9,699</text:p>
          </table:table-cell>
          <table:table-cell office:value-type="currency" office:value="5860" table:style-name="ce12">
            <text:p>$5,860</text:p>
          </table:table-cell>
          <table:table-cell office:value-type="percentage" office:value="0.6041859985565522" table:formula="of:=SUM([.E62]/[.D62])" table:style-name="ce13">
            <text:p>60%</text:p>
          </table:table-cell>
          <table:table-cell office:value-type="string" office:string-value="POOR" table:formula="of:=IF([.F62]&gt;69%; &quot;GOOD&quot;; &quot;POOR&quot;)" table:style-name="ce21">
            <text:p>POOR</text:p>
          </table:table-cell>
          <table:table-cell office:value-type="float" office:value="1.5" table:style-name="ce6">
            <text:p>1.5</text:p>
          </table:table-cell>
          <table:table-cell office:value-type="float" office:value="92" table:style-name="ce6">
            <text:p>92</text:p>
          </table:table-cell>
          <table:table-cell office:value-type="string" office:string-value="Low HP" table:formula="of:=COM.MICROSOFT.IFS([.I62]&gt;299;&quot;High HP&quot;;[.I62]&gt;99;&quot;Medium HP&quot;;[.I62]&lt;100;&quot;Low HP&quot;)" table:number-matrix-columns-spanned="1" table:number-matrix-rows-spanned="1" table:style-name="ce6">
            <text:p>Low HP</text:p>
          </table:table-cell>
          <table:table-cell office:value-type="string" table:style-name="ce6">
            <text:p>Passenger</text:p>
          </table:table-cell>
          <table:table-cell office:value-type="float" office:value="31" table:style-name="ce6">
            <text:p>31</text:p>
          </table:table-cell>
          <table:table-cell office:value-type="float" office:value="36.672283579999998" table:style-name="ce6">
            <text:p>36.67228358</text:p>
          </table:table-cell>
          <table:table-cell office:value-type="float" office:value="11.9" table:style-name="ce6">
            <text:p>11.9</text:p>
          </table:table-cell>
          <table:table-cell office:value-type="float" office:value="96.1" table:style-name="ce6">
            <text:p>96.1</text:p>
          </table:table-cell>
          <table:table-cell office:value-type="float" office:value="65.7" table:style-name="ce6">
            <text:p>65.7</text:p>
          </table:table-cell>
          <table:table-cell office:value-type="float" office:value="166.7" table:style-name="ce6">
            <text:p>166.7</text:p>
          </table:table-cell>
          <table:table-cell office:value-type="float" office:value="2.2400000000000002" table:style-name="ce6">
            <text:p>2.24</text:p>
          </table:table-cell>
          <table:table-cell office:value-type="date" office:date-value="2012-09-10T00:00:00" table:style-name="ce7">
            <text:p>9/10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Hyundai</text:p>
          </table:table-cell>
          <table:table-cell office:value-type="string" table:style-name="ce5">
            <text:p>Elantra</text:p>
          </table:table-cell>
          <table:table-cell office:value-type="float" office:value="66692" table:style-name="ce11">
            <text:p>66692</text:p>
          </table:table-cell>
          <table:table-cell office:value-type="currency" office:value="11799" table:style-name="ce12">
            <text:p>$11,799</text:p>
          </table:table-cell>
          <table:table-cell office:value-type="currency" office:value="7825" table:style-name="ce12">
            <text:p>$7,825</text:p>
          </table:table-cell>
          <table:table-cell office:value-type="percentage" office:value="0.66319179591490807" table:formula="of:=SUM([.E63]/[.D63])" table:style-name="ce13">
            <text:p>66%</text:p>
          </table:table-cell>
          <table:table-cell office:value-type="string" office:string-value="POOR" table:formula="of:=IF([.F63]&gt;69%; &quot;GOOD&quot;; &quot;POOR&quot;)" table:style-name="ce21">
            <text:p>POOR</text:p>
          </table:table-cell>
          <table:table-cell office:value-type="float" office:value="2" table:style-name="ce6">
            <text:p>2</text:p>
          </table:table-cell>
          <table:table-cell office:value-type="float" office:value="140" table:style-name="ce6">
            <text:p>140</text:p>
          </table:table-cell>
          <table:table-cell office:value-type="string" office:string-value="Medium HP" table:formula="of:=COM.MICROSOFT.IFS([.I63]&gt;299;&quot;High HP&quot;;[.I63]&gt;99;&quot;Medium HP&quot;;[.I6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54.590045160000003" table:style-name="ce6">
            <text:p>54.59004516</text:p>
          </table:table-cell>
          <table:table-cell office:value-type="float" office:value="14.5" table:style-name="ce6">
            <text:p>14.5</text:p>
          </table:table-cell>
          <table:table-cell office:value-type="float" office:value="100.4" table:style-name="ce6">
            <text:p>100.4</text:p>
          </table:table-cell>
          <table:table-cell office:value-type="float" office:value="66.900000000000006" table:style-name="ce6">
            <text:p>66.9</text:p>
          </table:table-cell>
          <table:table-cell office:value-type="float" office:value="174" table:style-name="ce6">
            <text:p>174</text:p>
          </table:table-cell>
          <table:table-cell office:value-type="float" office:value="2.6259999999999999" table:style-name="ce6">
            <text:p>2.626</text:p>
          </table:table-cell>
          <table:table-cell office:value-type="date" office:date-value="2011-11-15T00:00:00" table:style-name="ce7">
            <text:p>11/15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Hyundai</text:p>
          </table:table-cell>
          <table:table-cell office:value-type="string" table:style-name="ce5">
            <text:p>Sonata</text:p>
          </table:table-cell>
          <table:table-cell office:value-type="float" office:value="29450" table:style-name="ce11">
            <text:p>29450</text:p>
          </table:table-cell>
          <table:table-cell office:value-type="currency" office:value="14999" table:style-name="ce12">
            <text:p>$14,999</text:p>
          </table:table-cell>
          <table:table-cell office:value-type="currency" office:value="8910" table:style-name="ce12">
            <text:p>$8,910</text:p>
          </table:table-cell>
          <table:table-cell office:value-type="percentage" office:value="0.59403960264017597" table:formula="of:=SUM([.E64]/[.D64])" table:style-name="ce13">
            <text:p>59%</text:p>
          </table:table-cell>
          <table:table-cell office:value-type="string" office:string-value="POOR" table:formula="of:=IF([.F64]&gt;69%; &quot;GOOD&quot;; &quot;POOR&quot;)" table:style-name="ce21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48" table:style-name="ce6">
            <text:p>148</text:p>
          </table:table-cell>
          <table:table-cell office:value-type="string" office:string-value="Medium HP" table:formula="of:=COM.MICROSOFT.IFS([.I64]&gt;299;&quot;High HP&quot;;[.I64]&gt;99;&quot;Medium HP&quot;;[.I6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58.758248999999999" table:style-name="ce6">
            <text:p>58.758249</text:p>
          </table:table-cell>
          <table:table-cell office:value-type="float" office:value="17.2" table:style-name="ce6">
            <text:p>17.2</text:p>
          </table:table-cell>
          <table:table-cell office:value-type="float" office:value="106.3" table:style-name="ce6">
            <text:p>106.3</text:p>
          </table:table-cell>
          <table:table-cell office:value-type="float" office:value="71.599999999999994" table:style-name="ce6">
            <text:p>71.6</text:p>
          </table:table-cell>
          <table:table-cell office:value-type="float" office:value="185.4" table:style-name="ce6">
            <text:p>185.4</text:p>
          </table:table-cell>
          <table:table-cell office:value-type="float" office:value="3.0720000000000001" table:style-name="ce6">
            <text:p>3.072</text:p>
          </table:table-cell>
          <table:table-cell office:value-type="date" office:date-value="2012-06-14T00:00:00" table:style-name="ce7">
            <text:p>6/14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Infiniti</text:p>
          </table:table-cell>
          <table:table-cell office:value-type="string" table:style-name="ce5">
            <text:p>I30</text:p>
          </table:table-cell>
          <table:table-cell office:value-type="float" office:value="23713" table:style-name="ce11">
            <text:p>23713</text:p>
          </table:table-cell>
          <table:table-cell office:value-type="currency" office:value="29465" table:style-name="ce12">
            <text:p>$29,465</text:p>
          </table:table-cell>
          <table:table-cell office:value-type="currency" office:value="19690" table:style-name="ce12">
            <text:p>$19,690</text:p>
          </table:table-cell>
          <table:table-cell office:value-type="percentage" office:value="0.66825046665535381" table:formula="of:=SUM([.E65]/[.D65])" table:style-name="ce13">
            <text:p>67%</text:p>
          </table:table-cell>
          <table:table-cell office:value-type="string" office:string-value="POOR" table:formula="of:=IF([.F65]&gt;69%; &quot;GOOD&quot;; &quot;POOR&quot;)" table:style-name="ce21">
            <text:p>POOR</text:p>
          </table:table-cell>
          <table:table-cell office:value-type="float" office:value="3" table:style-name="ce6">
            <text:p>3</text:p>
          </table:table-cell>
          <table:table-cell office:value-type="float" office:value="227" table:style-name="ce6">
            <text:p>227</text:p>
          </table:table-cell>
          <table:table-cell office:value-type="string" office:string-value="Medium HP" table:formula="of:=COM.MICROSOFT.IFS([.I65]&gt;299;&quot;High HP&quot;;[.I65]&gt;99;&quot;Medium HP&quot;;[.I6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92.436889230000006" table:style-name="ce6">
            <text:p>92.43688923</text:p>
          </table:table-cell>
          <table:table-cell office:value-type="float" office:value="18.5" table:style-name="ce6">
            <text:p>18.5</text:p>
          </table:table-cell>
          <table:table-cell office:value-type="float" office:value="108.3" table:style-name="ce6">
            <text:p>108.3</text:p>
          </table:table-cell>
          <table:table-cell office:value-type="float" office:value="70.2" table:style-name="ce6">
            <text:p>70.2</text:p>
          </table:table-cell>
          <table:table-cell office:value-type="float" office:value="193.7" table:style-name="ce6">
            <text:p>193.7</text:p>
          </table:table-cell>
          <table:table-cell office:value-type="float" office:value="3.3420000000000001" table:style-name="ce6">
            <text:p>3.342</text:p>
          </table:table-cell>
          <table:table-cell office:value-type="date" office:date-value="2012-04-15T00:00:00" table:style-name="ce7">
            <text:p>4/15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Jaguar</text:p>
          </table:table-cell>
          <table:table-cell office:value-type="string" table:style-name="ce5">
            <text:p>S-Type</text:p>
          </table:table-cell>
          <table:table-cell office:value-type="float" office:value="15467" table:style-name="ce11">
            <text:p>15467</text:p>
          </table:table-cell>
          <table:table-cell office:value-type="currency" office:value="42800" table:style-name="ce12">
            <text:p>$42,800</text:p>
          </table:table-cell>
          <table:table-cell office:value-type="currency" office:value="33219" table:style-name="ce12">
            <text:p>$33,219</text:p>
          </table:table-cell>
          <table:table-cell office:value-type="percentage" office:value="0.77614485981308412" table:formula="of:=SUM([.E66]/[.D66])" table:style-name="ce13">
            <text:p>78%</text:p>
          </table:table-cell>
          <table:table-cell office:value-type="string" office:string-value="GOOD" table:formula="of:=IF([.F66]&gt;69%; &quot;GOOD&quot;; &quot;POOR&quot;)" table:style-name="ce21">
            <text:p>GOOD</text:p>
          </table:table-cell>
          <table:table-cell office:value-type="float" office:value="3" table:style-name="ce6">
            <text:p>3</text:p>
          </table:table-cell>
          <table:table-cell office:value-type="float" office:value="240" table:style-name="ce6">
            <text:p>240</text:p>
          </table:table-cell>
          <table:table-cell office:value-type="string" office:string-value="Medium HP" table:formula="of:=COM.MICROSOFT.IFS([.I66]&gt;299;&quot;High HP&quot;;[.I66]&gt;99;&quot;Medium HP&quot;;[.I6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102.17898479999999" table:style-name="ce6">
            <text:p>102.1789848</text:p>
          </table:table-cell>
          <table:table-cell office:value-type="float" office:value="18.399999999999999" table:style-name="ce6">
            <text:p>18.4</text:p>
          </table:table-cell>
          <table:table-cell office:value-type="float" office:value="114.5" table:style-name="ce6">
            <text:p>114.5</text:p>
          </table:table-cell>
          <table:table-cell office:value-type="float" office:value="71.599999999999994" table:style-name="ce6">
            <text:p>71.6</text:p>
          </table:table-cell>
          <table:table-cell office:value-type="float" office:value="191.3" table:style-name="ce6">
            <text:p>191.3</text:p>
          </table:table-cell>
          <table:table-cell office:value-type="float" office:value="3.65" table:style-name="ce6">
            <text:p>3.65</text:p>
          </table:table-cell>
          <table:table-cell office:value-type="date" office:date-value="2012-11-03T00:00:00" table:style-name="ce7">
            <text:p>11/3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Jeep</text:p>
          </table:table-cell>
          <table:table-cell office:value-type="string" table:style-name="ce5">
            <text:p>Wrangler</text:p>
          </table:table-cell>
          <table:table-cell office:value-type="float" office:value="55557" table:style-name="ce11">
            <text:p>55557</text:p>
          </table:table-cell>
          <table:table-cell office:value-type="currency" office:value="14460" table:style-name="ce12">
            <text:p>$14,460</text:p>
          </table:table-cell>
          <table:table-cell office:value-type="currency" office:value="13475" table:style-name="ce12">
            <text:p>$13,475</text:p>
          </table:table-cell>
          <table:table-cell office:value-type="percentage" office:value="0.931881051175657" table:formula="of:=SUM([.E67]/[.D67])" table:style-name="ce13">
            <text:p>93%</text:p>
          </table:table-cell>
          <table:table-cell office:value-type="string" office:string-value="GOOD" table:formula="of:=IF([.F67]&gt;69%; &quot;GOOD&quot;; &quot;POOR&quot;)" table:style-name="ce21">
            <text:p>GOOD</text:p>
          </table:table-cell>
          <table:table-cell office:value-type="float" office:value="2.5" table:style-name="ce6">
            <text:p>2.5</text:p>
          </table:table-cell>
          <table:table-cell office:value-type="float" office:value="120" table:style-name="ce6">
            <text:p>120</text:p>
          </table:table-cell>
          <table:table-cell office:value-type="string" office:string-value="Medium HP" table:formula="of:=COM.MICROSOFT.IFS([.I67]&gt;299;&quot;High HP&quot;;[.I67]&gt;99;&quot;Medium HP&quot;;[.I6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7" table:style-name="ce6">
            <text:p>17</text:p>
          </table:table-cell>
          <table:table-cell office:value-type="float" office:value="48.672897910000003" table:style-name="ce6">
            <text:p>48.67289791</text:p>
          </table:table-cell>
          <table:table-cell office:value-type="float" office:value="19" table:style-name="ce6">
            <text:p>19</text:p>
          </table:table-cell>
          <table:table-cell office:value-type="float" office:value="93.4" table:style-name="ce6">
            <text:p>93.4</text:p>
          </table:table-cell>
          <table:table-cell office:value-type="float" office:value="66.7" table:style-name="ce6">
            <text:p>66.7</text:p>
          </table:table-cell>
          <table:table-cell office:value-type="float" office:value="152" table:style-name="ce6">
            <text:p>152</text:p>
          </table:table-cell>
          <table:table-cell office:value-type="float" office:value="3.0449999999999999" table:style-name="ce6">
            <text:p>3.045</text:p>
          </table:table-cell>
          <table:table-cell office:value-type="date" office:date-value="2012-03-04T00:00:00" table:style-name="ce7">
            <text:p>3/4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Jeep</text:p>
          </table:table-cell>
          <table:table-cell office:value-type="string" table:style-name="ce5">
            <text:p>Cherokee</text:p>
          </table:table-cell>
          <table:table-cell office:value-type="float" office:value="80556" table:style-name="ce11">
            <text:p>80556</text:p>
          </table:table-cell>
          <table:table-cell office:value-type="currency" office:value="21620" table:style-name="ce12">
            <text:p>$21,620</text:p>
          </table:table-cell>
          <table:table-cell office:value-type="currency" office:value="13775" table:style-name="ce12">
            <text:p>$13,775</text:p>
          </table:table-cell>
          <table:table-cell office:value-type="percentage" office:value="0.63714153561517117" table:formula="of:=SUM([.E68]/[.D68])" table:style-name="ce13">
            <text:p>64%</text:p>
          </table:table-cell>
          <table:table-cell office:value-type="string" office:string-value="POOR" table:formula="of:=IF([.F68]&gt;69%; &quot;GOOD&quot;; &quot;POOR&quot;)" table:style-name="ce21">
            <text:p>POOR</text:p>
          </table:table-cell>
          <table:table-cell office:value-type="float" office:value="4" table:style-name="ce6">
            <text:p>4</text:p>
          </table:table-cell>
          <table:table-cell office:value-type="float" office:value="190" table:style-name="ce6">
            <text:p>190</text:p>
          </table:table-cell>
          <table:table-cell office:value-type="string" office:string-value="Medium HP" table:formula="of:=COM.MICROSOFT.IFS([.I68]&gt;299;&quot;High HP&quot;;[.I68]&gt;99;&quot;Medium HP&quot;;[.I6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0" table:style-name="ce6">
            <text:p>20</text:p>
          </table:table-cell>
          <table:table-cell office:value-type="float" office:value="76.584439619999998" table:style-name="ce6">
            <text:p>76.58443962</text:p>
          </table:table-cell>
          <table:table-cell office:value-type="float" office:value="20" table:style-name="ce6">
            <text:p>20</text:p>
          </table:table-cell>
          <table:table-cell office:value-type="float" office:value="101.4" table:style-name="ce6">
            <text:p>101.4</text:p>
          </table:table-cell>
          <table:table-cell office:value-type="float" office:value="69.400000000000006" table:style-name="ce6">
            <text:p>69.4</text:p>
          </table:table-cell>
          <table:table-cell office:value-type="float" office:value="167.5" table:style-name="ce6">
            <text:p>167.5</text:p>
          </table:table-cell>
          <table:table-cell office:value-type="float" office:value="3.194" table:style-name="ce6">
            <text:p>3.194</text:p>
          </table:table-cell>
          <table:table-cell office:value-type="date" office:date-value="2012-10-05T00:00:00" table:style-name="ce7">
            <text:p>10/5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Jeep</text:p>
          </table:table-cell>
          <table:table-cell office:value-type="string" table:style-name="ce5">
            <text:p>Grand Cherokee</text:p>
          </table:table-cell>
          <table:table-cell office:value-type="float" office:value="157040" table:style-name="ce11">
            <text:p>157040</text:p>
          </table:table-cell>
          <table:table-cell office:value-type="currency" office:value="26895" table:style-name="ce12">
            <text:p>$26,895</text:p>
          </table:table-cell>
          <table:table-cell office:value-type="currency" office:value="18810" table:style-name="ce12">
            <text:p>$18,810</text:p>
          </table:table-cell>
          <table:table-cell office:value-type="percentage" office:value="0.69938650306748462" table:formula="of:=SUM([.E69]/[.D69])" table:style-name="ce13">
            <text:p>70%</text:p>
          </table:table-cell>
          <table:table-cell office:value-type="string" office:string-value="GOOD" table:formula="of:=IF([.F69]&gt;69%; &quot;GOOD&quot;; &quot;POOR&quot;)" table:style-name="ce21">
            <text:p>GOOD</text:p>
          </table:table-cell>
          <table:table-cell office:value-type="float" office:value="4" table:style-name="ce6">
            <text:p>4</text:p>
          </table:table-cell>
          <table:table-cell office:value-type="float" office:value="195" table:style-name="ce6">
            <text:p>195</text:p>
          </table:table-cell>
          <table:table-cell office:value-type="string" office:string-value="Medium HP" table:formula="of:=COM.MICROSOFT.IFS([.I69]&gt;299;&quot;High HP&quot;;[.I69]&gt;99;&quot;Medium HP&quot;;[.I6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9" table:style-name="ce6">
            <text:p>19</text:p>
          </table:table-cell>
          <table:table-cell office:value-type="float" office:value="80.387779120000005" table:style-name="ce6">
            <text:p>80.38777912</text:p>
          </table:table-cell>
          <table:table-cell office:value-type="float" office:value="20.5" table:style-name="ce6">
            <text:p>20.5</text:p>
          </table:table-cell>
          <table:table-cell office:value-type="float" office:value="105.9" table:style-name="ce6">
            <text:p>105.9</text:p>
          </table:table-cell>
          <table:table-cell office:value-type="float" office:value="72.3" table:style-name="ce6">
            <text:p>72.3</text:p>
          </table:table-cell>
          <table:table-cell office:value-type="float" office:value="181.5" table:style-name="ce6">
            <text:p>181.5</text:p>
          </table:table-cell>
          <table:table-cell office:value-type="float" office:value="3.88" table:style-name="ce6">
            <text:p>3.88</text:p>
          </table:table-cell>
          <table:table-cell office:value-type="date" office:date-value="2011-12-10T00:00:00" table:style-name="ce7">
            <text:p>12/10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Lexus</text:p>
          </table:table-cell>
          <table:table-cell office:value-type="string" table:style-name="ce5">
            <text:p>ES300</text:p>
          </table:table-cell>
          <table:table-cell office:value-type="float" office:value="24072" table:style-name="ce11">
            <text:p>24072</text:p>
          </table:table-cell>
          <table:table-cell office:value-type="currency" office:value="31505" table:style-name="ce12">
            <text:p>$31,505</text:p>
          </table:table-cell>
          <table:table-cell office:value-type="currency" office:value="26975" table:style-name="ce12">
            <text:p>$26,975</text:p>
          </table:table-cell>
          <table:table-cell office:value-type="percentage" office:value="0.85621329947627356" table:formula="of:=SUM([.E70]/[.D70])" table:style-name="ce13">
            <text:p>86%</text:p>
          </table:table-cell>
          <table:table-cell office:value-type="string" office:string-value="GOOD" table:formula="of:=IF([.F70]&gt;69%; &quot;GOOD&quot;; &quot;POOR&quot;)" table:style-name="ce21">
            <text:p>GOOD</text:p>
          </table:table-cell>
          <table:table-cell office:value-type="float" office:value="3" table:style-name="ce6">
            <text:p>3</text:p>
          </table:table-cell>
          <table:table-cell office:value-type="float" office:value="210" table:style-name="ce6">
            <text:p>210</text:p>
          </table:table-cell>
          <table:table-cell office:value-type="string" office:string-value="Medium HP" table:formula="of:=COM.MICROSOFT.IFS([.I70]&gt;299;&quot;High HP&quot;;[.I70]&gt;99;&quot;Medium HP&quot;;[.I7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87.211001039999999" table:style-name="ce6">
            <text:p>87.21100104</text:p>
          </table:table-cell>
          <table:table-cell office:value-type="float" office:value="18.5" table:style-name="ce6">
            <text:p>18.5</text:p>
          </table:table-cell>
          <table:table-cell office:value-type="float" office:value="105.1" table:style-name="ce6">
            <text:p>105.1</text:p>
          </table:table-cell>
          <table:table-cell office:value-type="float" office:value="70.5" table:style-name="ce6">
            <text:p>70.5</text:p>
          </table:table-cell>
          <table:table-cell office:value-type="float" office:value="190.2" table:style-name="ce6">
            <text:p>190.2</text:p>
          </table:table-cell>
          <table:table-cell office:value-type="float" office:value="3.3730000000000002" table:style-name="ce6">
            <text:p>3.373</text:p>
          </table:table-cell>
          <table:table-cell office:value-type="date" office:date-value="2012-07-09T00:00:00" table:style-name="ce7">
            <text:p>7/9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Lexus</text:p>
          </table:table-cell>
          <table:table-cell office:value-type="string" table:style-name="ce5">
            <text:p>GS300</text:p>
          </table:table-cell>
          <table:table-cell office:value-type="float" office:value="12698" table:style-name="ce11">
            <text:p>12698</text:p>
          </table:table-cell>
          <table:table-cell office:value-type="currency" office:value="37805" table:style-name="ce12">
            <text:p>$37,805</text:p>
          </table:table-cell>
          <table:table-cell office:value-type="currency" office:value="32075.000000000004" table:style-name="ce12">
            <text:p>$32,075</text:p>
          </table:table-cell>
          <table:table-cell office:value-type="percentage" office:value="0.8484327469911388" table:formula="of:=SUM([.E71]/[.D71])" table:style-name="ce13">
            <text:p>85%</text:p>
          </table:table-cell>
          <table:table-cell office:value-type="string" office:string-value="GOOD" table:formula="of:=IF([.F71]&gt;69%; &quot;GOOD&quot;; &quot;POOR&quot;)" table:style-name="ce21">
            <text:p>GOOD</text:p>
          </table:table-cell>
          <table:table-cell office:value-type="float" office:value="3" table:style-name="ce6">
            <text:p>3</text:p>
          </table:table-cell>
          <table:table-cell office:value-type="float" office:value="225" table:style-name="ce6">
            <text:p>225</text:p>
          </table:table-cell>
          <table:table-cell office:value-type="string" office:string-value="Medium HP" table:formula="of:=COM.MICROSOFT.IFS([.I71]&gt;299;&quot;High HP&quot;;[.I71]&gt;99;&quot;Medium HP&quot;;[.I7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94.946698400000002" table:style-name="ce6">
            <text:p>94.9466984</text:p>
          </table:table-cell>
          <table:table-cell office:value-type="float" office:value="19.8" table:style-name="ce6">
            <text:p>19.8</text:p>
          </table:table-cell>
          <table:table-cell office:value-type="float" office:value="110.2" table:style-name="ce6">
            <text:p>110.2</text:p>
          </table:table-cell>
          <table:table-cell office:value-type="float" office:value="70.900000000000006" table:style-name="ce6">
            <text:p>70.9</text:p>
          </table:table-cell>
          <table:table-cell office:value-type="float" office:value="189.2" table:style-name="ce6">
            <text:p>189.2</text:p>
          </table:table-cell>
          <table:table-cell office:value-type="float" office:value="3.6379999999999999" table:style-name="ce6">
            <text:p>3.638</text:p>
          </table:table-cell>
          <table:table-cell office:value-type="date" office:date-value="2012-05-10T00:00:00" table:style-name="ce7">
            <text:p>5/10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Lexus</text:p>
          </table:table-cell>
          <table:table-cell office:value-type="string" table:style-name="ce5">
            <text:p>GS400</text:p>
          </table:table-cell>
          <table:table-cell office:value-type="float" office:value="3334" table:style-name="ce11">
            <text:p>3334</text:p>
          </table:table-cell>
          <table:table-cell office:value-type="currency" office:value="46305" table:style-name="ce12">
            <text:p>$46,305</text:p>
          </table:table-cell>
          <table:table-cell office:value-type="currency" office:value="38955" table:style-name="ce12">
            <text:p>$38,955</text:p>
          </table:table-cell>
          <table:table-cell office:value-type="percentage" office:value="0.84126984126984128" table:formula="of:=SUM([.E72]/[.D72])" table:style-name="ce13">
            <text:p>84%</text:p>
          </table:table-cell>
          <table:table-cell office:value-type="string" office:string-value="GOOD" table:formula="of:=IF([.F72]&gt;69%; &quot;GOOD&quot;; &quot;POOR&quot;)" table:style-name="ce21">
            <text:p>GOOD</text:p>
          </table:table-cell>
          <table:table-cell office:value-type="float" office:value="4" table:style-name="ce6">
            <text:p>4</text:p>
          </table:table-cell>
          <table:table-cell office:value-type="float" office:value="300" table:style-name="ce6">
            <text:p>300</text:p>
          </table:table-cell>
          <table:table-cell office:value-type="string" office:string-value="High HP" table:formula="of:=COM.MICROSOFT.IFS([.I72]&gt;299;&quot;High HP&quot;;[.I72]&gt;99;&quot;Medium HP&quot;;[.I72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125.0133574" table:style-name="ce6">
            <text:p>125.0133574</text:p>
          </table:table-cell>
          <table:table-cell office:value-type="float" office:value="19.8" table:style-name="ce6">
            <text:p>19.8</text:p>
          </table:table-cell>
          <table:table-cell office:value-type="float" office:value="110.2" table:style-name="ce6">
            <text:p>110.2</text:p>
          </table:table-cell>
          <table:table-cell office:value-type="float" office:value="70.900000000000006" table:style-name="ce6">
            <text:p>70.9</text:p>
          </table:table-cell>
          <table:table-cell office:value-type="float" office:value="189.2" table:style-name="ce6">
            <text:p>189.2</text:p>
          </table:table-cell>
          <table:table-cell office:value-type="float" office:value="3.6930000000000001" table:style-name="ce6">
            <text:p>3.693</text:p>
          </table:table-cell>
          <table:table-cell office:value-type="date" office:date-value="2012-11-28T00:00:00" table:style-name="ce7">
            <text:p>11/28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Lexus</text:p>
          </table:table-cell>
          <table:table-cell office:value-type="string" table:style-name="ce5">
            <text:p>LS400</text:p>
          </table:table-cell>
          <table:table-cell office:value-type="float" office:value="6375" table:style-name="ce11">
            <text:p>6375</text:p>
          </table:table-cell>
          <table:table-cell office:value-type="currency" office:value="54005" table:style-name="ce12">
            <text:p>$54,005</text:p>
          </table:table-cell>
          <table:table-cell office:value-type="currency" office:value="40375" table:style-name="ce12">
            <text:p>$40,375</text:p>
          </table:table-cell>
          <table:table-cell office:value-type="percentage" office:value="0.74761596148504772" table:formula="of:=SUM([.E73]/[.D73])" table:style-name="ce13">
            <text:p>75%</text:p>
          </table:table-cell>
          <table:table-cell office:value-type="string" office:string-value="GOOD" table:formula="of:=IF([.F73]&gt;69%; &quot;GOOD&quot;; &quot;POOR&quot;)" table:style-name="ce21">
            <text:p>GOOD</text:p>
          </table:table-cell>
          <table:table-cell office:value-type="float" office:value="4" table:style-name="ce6">
            <text:p>4</text:p>
          </table:table-cell>
          <table:table-cell office:value-type="float" office:value="290" table:style-name="ce6">
            <text:p>290</text:p>
          </table:table-cell>
          <table:table-cell office:value-type="string" office:string-value="Medium HP" table:formula="of:=COM.MICROSOFT.IFS([.I73]&gt;299;&quot;High HP&quot;;[.I73]&gt;99;&quot;Medium HP&quot;;[.I7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124.44671630000001" table:style-name="ce6">
            <text:p>124.4467163</text:p>
          </table:table-cell>
          <table:table-cell office:value-type="float" office:value="22.5" table:style-name="ce6">
            <text:p>22.5</text:p>
          </table:table-cell>
          <table:table-cell office:value-type="float" office:value="112.2" table:style-name="ce6">
            <text:p>112.2</text:p>
          </table:table-cell>
          <table:table-cell office:value-type="float" office:value="72" table:style-name="ce6">
            <text:p>72</text:p>
          </table:table-cell>
          <table:table-cell office:value-type="float" office:value="196.7" table:style-name="ce6">
            <text:p>196.7</text:p>
          </table:table-cell>
          <table:table-cell office:value-type="float" office:value="3.89" table:style-name="ce6">
            <text:p>3.89</text:p>
          </table:table-cell>
          <table:table-cell office:value-type="date" office:date-value="2012-03-29T00:00:00" table:style-name="ce7">
            <text:p>3/29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Lexus</text:p>
          </table:table-cell>
          <table:table-cell office:value-type="string" table:style-name="ce5">
            <text:p>LX470</text:p>
          </table:table-cell>
          <table:table-cell office:value-type="float" office:value="9126" table:style-name="ce11">
            <text:p>9126</text:p>
          </table:table-cell>
          <table:table-cell office:value-type="currency" office:value="60105" table:style-name="ce12">
            <text:p>$60,105</text:p>
          </table:table-cell>
          <table:table-cell office:value-type="currency" office:value="43870" table:style-name="ce12">
            <text:p>$43,870</text:p>
          </table:table-cell>
          <table:table-cell office:value-type="percentage" office:value="0.72988936028616591" table:formula="of:=SUM([.E74]/[.D74])" table:style-name="ce13">
            <text:p>73%</text:p>
          </table:table-cell>
          <table:table-cell office:value-type="string" office:string-value="GOOD" table:formula="of:=IF([.F74]&gt;69%; &quot;GOOD&quot;; &quot;POOR&quot;)" table:style-name="ce21">
            <text:p>GOOD</text:p>
          </table:table-cell>
          <table:table-cell office:value-type="float" office:value="4.7" table:style-name="ce6">
            <text:p>4.7</text:p>
          </table:table-cell>
          <table:table-cell office:value-type="float" office:value="230" table:style-name="ce6">
            <text:p>230</text:p>
          </table:table-cell>
          <table:table-cell office:value-type="string" office:string-value="Medium HP" table:formula="of:=COM.MICROSOFT.IFS([.I74]&gt;299;&quot;High HP&quot;;[.I74]&gt;99;&quot;Medium HP&quot;;[.I7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5" table:style-name="ce6">
            <text:p>15</text:p>
          </table:table-cell>
          <table:table-cell office:value-type="float" office:value="105.760458" table:style-name="ce6">
            <text:p>105.760458</text:p>
          </table:table-cell>
          <table:table-cell office:value-type="float" office:value="25.4" table:style-name="ce6">
            <text:p>25.4</text:p>
          </table:table-cell>
          <table:table-cell office:value-type="float" office:value="112.2" table:style-name="ce6">
            <text:p>112.2</text:p>
          </table:table-cell>
          <table:table-cell office:value-type="float" office:value="76.400000000000006" table:style-name="ce6">
            <text:p>76.4</text:p>
          </table:table-cell>
          <table:table-cell office:value-type="float" office:value="192.5" table:style-name="ce6">
            <text:p>192.5</text:p>
          </table:table-cell>
          <table:table-cell office:value-type="float" office:value="5.4009999999999998" table:style-name="ce6">
            <text:p>5.401</text:p>
          </table:table-cell>
          <table:table-cell office:value-type="date" office:date-value="2012-10-30T00:00:00" table:style-name="ce7">
            <text:p>10/30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Lexus</text:p>
          </table:table-cell>
          <table:table-cell office:value-type="string" table:style-name="ce5">
            <text:p>RX300</text:p>
          </table:table-cell>
          <table:table-cell office:value-type="float" office:value="51238" table:style-name="ce11">
            <text:p>51238</text:p>
          </table:table-cell>
          <table:table-cell office:value-type="currency" office:value="34605" table:style-name="ce12">
            <text:p>$34,605</text:p>
          </table:table-cell>
          <table:table-cell office:value-type="currency" office:value="29140" table:style-name="ce12">
            <text:p>$29,140</text:p>
          </table:table-cell>
          <table:table-cell office:value-type="percentage" office:value="0.84207484467562488" table:formula="of:=SUM([.E75]/[.D75])" table:style-name="ce13">
            <text:p>84%</text:p>
          </table:table-cell>
          <table:table-cell office:value-type="string" office:string-value="GOOD" table:formula="of:=IF([.F75]&gt;69%; &quot;GOOD&quot;; &quot;POOR&quot;)" table:style-name="ce21">
            <text:p>GOOD</text:p>
          </table:table-cell>
          <table:table-cell office:value-type="float" office:value="3" table:style-name="ce6">
            <text:p>3</text:p>
          </table:table-cell>
          <table:table-cell office:value-type="float" office:value="220" table:style-name="ce6">
            <text:p>220</text:p>
          </table:table-cell>
          <table:table-cell office:value-type="string" office:string-value="Medium HP" table:formula="of:=COM.MICROSOFT.IFS([.I75]&gt;299;&quot;High HP&quot;;[.I75]&gt;99;&quot;Medium HP&quot;;[.I7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1" table:style-name="ce6">
            <text:p>21</text:p>
          </table:table-cell>
          <table:table-cell office:value-type="float" office:value="91.943801559999997" table:style-name="ce6">
            <text:p>91.94380156</text:p>
          </table:table-cell>
          <table:table-cell office:value-type="float" office:value="17.2" table:style-name="ce6">
            <text:p>17.2</text:p>
          </table:table-cell>
          <table:table-cell office:value-type="float" office:value="103" table:style-name="ce6">
            <text:p>103</text:p>
          </table:table-cell>
          <table:table-cell office:value-type="float" office:value="71.5" table:style-name="ce6">
            <text:p>71.5</text:p>
          </table:table-cell>
          <table:table-cell office:value-type="float" office:value="180.1" table:style-name="ce6">
            <text:p>180.1</text:p>
          </table:table-cell>
          <table:table-cell office:value-type="float" office:value="3.9" table:style-name="ce6">
            <text:p>3.9</text:p>
          </table:table-cell>
          <table:table-cell office:value-type="date" office:date-value="2012-01-04T00:00:00" table:style-name="ce7">
            <text:p>1/4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Lincoln</text:p>
          </table:table-cell>
          <table:table-cell office:value-type="string" table:style-name="ce5">
            <text:p>Continental</text:p>
          </table:table-cell>
          <table:table-cell office:value-type="float" office:value="13798" table:style-name="ce11">
            <text:p>13798</text:p>
          </table:table-cell>
          <table:table-cell office:value-type="currency" office:value="39080" table:style-name="ce12">
            <text:p>$39,080</text:p>
          </table:table-cell>
          <table:table-cell office:value-type="currency" office:value="20525" table:style-name="ce12">
            <text:p>$20,525</text:p>
          </table:table-cell>
          <table:table-cell office:value-type="percentage" office:value="0.52520470829068577" table:formula="of:=SUM([.E76]/[.D76])" table:style-name="ce13">
            <text:p>53%</text:p>
          </table:table-cell>
          <table:table-cell office:value-type="string" office:string-value="POOR" table:formula="of:=IF([.F76]&gt;69%; &quot;GOOD&quot;; &quot;POOR&quot;)" table:style-name="ce21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75" table:style-name="ce6">
            <text:p>275</text:p>
          </table:table-cell>
          <table:table-cell office:value-type="string" office:string-value="Medium HP" table:formula="of:=COM.MICROSOFT.IFS([.I76]&gt;299;&quot;High HP&quot;;[.I76]&gt;99;&quot;Medium HP&quot;;[.I7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113.5402069" table:style-name="ce6">
            <text:p>113.5402069</text:p>
          </table:table-cell>
          <table:table-cell office:value-type="float" office:value="20" table:style-name="ce6">
            <text:p>20</text:p>
          </table:table-cell>
          <table:table-cell office:value-type="float" office:value="109" table:style-name="ce6">
            <text:p>109</text:p>
          </table:table-cell>
          <table:table-cell office:value-type="float" office:value="73.599999999999994" table:style-name="ce6">
            <text:p>73.6</text:p>
          </table:table-cell>
          <table:table-cell office:value-type="float" office:value="208.5" table:style-name="ce6">
            <text:p>208.5</text:p>
          </table:table-cell>
          <table:table-cell office:value-type="float" office:value="3.8679999999999999" table:style-name="ce6">
            <text:p>3.868</text:p>
          </table:table-cell>
          <table:table-cell office:value-type="date" office:date-value="2012-08-03T00:00:00" table:style-name="ce7">
            <text:p>8/3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Lincoln</text:p>
          </table:table-cell>
          <table:table-cell office:value-type="string" table:style-name="ce5">
            <text:p>Town car</text:p>
          </table:table-cell>
          <table:table-cell office:value-type="float" office:value="48911" table:style-name="ce11">
            <text:p>48911</text:p>
          </table:table-cell>
          <table:table-cell office:value-type="currency" office:value="43330" table:style-name="ce12">
            <text:p>$43,330</text:p>
          </table:table-cell>
          <table:table-cell office:value-type="currency" office:value="21725" table:style-name="ce12">
            <text:p>$21,725</text:p>
          </table:table-cell>
          <table:table-cell office:value-type="percentage" office:value="0.5013847219016847" table:formula="of:=SUM([.E77]/[.D77])" table:style-name="ce13">
            <text:p>50%</text:p>
          </table:table-cell>
          <table:table-cell office:value-type="string" office:string-value="POOR" table:formula="of:=IF([.F77]&gt;69%; &quot;GOOD&quot;; &quot;POOR&quot;)" table:style-name="ce21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15" table:style-name="ce6">
            <text:p>215</text:p>
          </table:table-cell>
          <table:table-cell office:value-type="string" office:string-value="Medium HP" table:formula="of:=COM.MICROSOFT.IFS([.I77]&gt;299;&quot;High HP&quot;;[.I77]&gt;99;&quot;Medium HP&quot;;[.I7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93.957916900000001" table:style-name="ce6">
            <text:p>93.9579169</text:p>
          </table:table-cell>
          <table:table-cell office:value-type="float" office:value="19" table:style-name="ce6">
            <text:p>19</text:p>
          </table:table-cell>
          <table:table-cell office:value-type="float" office:value="117.7" table:style-name="ce6">
            <text:p>117.7</text:p>
          </table:table-cell>
          <table:table-cell office:value-type="float" office:value="78.2" table:style-name="ce6">
            <text:p>78.2</text:p>
          </table:table-cell>
          <table:table-cell office:value-type="float" office:value="215.3" table:style-name="ce6">
            <text:p>215.3</text:p>
          </table:table-cell>
          <table:table-cell office:value-type="float" office:value="4.1210000000000004" table:style-name="ce6">
            <text:p>4.121</text:p>
          </table:table-cell>
          <table:table-cell office:value-type="date" office:date-value="2012-06-04T00:00:00" table:style-name="ce7">
            <text:p>6/4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Lincoln</text:p>
          </table:table-cell>
          <table:table-cell office:value-type="string" table:style-name="ce5">
            <text:p>Navigator</text:p>
          </table:table-cell>
          <table:table-cell office:value-type="float" office:value="22925" table:style-name="ce11">
            <text:p>22925</text:p>
          </table:table-cell>
          <table:table-cell office:value-type="currency" office:value="42660" table:style-name="ce12">
            <text:p>$42,660</text:p>
          </table:table-cell>
          <table:table-cell office:value-type="currency" office:value="20765" table:style-name="ce12">
            <text:p>$20,765</text:p>
          </table:table-cell>
          <table:table-cell office:value-type="percentage" office:value="0.48675574308485703" table:formula="of:=SUM([.E78]/[.D78])" table:style-name="ce13">
            <text:p>49%</text:p>
          </table:table-cell>
          <table:table-cell office:value-type="string" office:string-value="POOR" table:formula="of:=IF([.F78]&gt;69%; &quot;GOOD&quot;; &quot;POOR&quot;)" table:style-name="ce21">
            <text:p>POOR</text:p>
          </table:table-cell>
          <table:table-cell office:value-type="float" office:value="5.4" table:style-name="ce6">
            <text:p>5.4</text:p>
          </table:table-cell>
          <table:table-cell office:value-type="float" office:value="300" table:style-name="ce6">
            <text:p>300</text:p>
          </table:table-cell>
          <table:table-cell office:value-type="string" office:string-value="High HP" table:formula="of:=COM.MICROSOFT.IFS([.I78]&gt;299;&quot;High HP&quot;;[.I78]&gt;99;&quot;Medium HP&quot;;[.I78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Car</text:p>
          </table:table-cell>
          <table:table-cell office:value-type="float" office:value="15" table:style-name="ce6">
            <text:p>15</text:p>
          </table:table-cell>
          <table:table-cell office:value-type="float" office:value="123.97204670000001" table:style-name="ce6">
            <text:p>123.9720467</text:p>
          </table:table-cell>
          <table:table-cell office:value-type="float" office:value="30" table:style-name="ce6">
            <text:p>30</text:p>
          </table:table-cell>
          <table:table-cell office:value-type="float" office:value="119" table:style-name="ce6">
            <text:p>119</text:p>
          </table:table-cell>
          <table:table-cell office:value-type="float" office:value="79.900000000000006" table:style-name="ce6">
            <text:p>79.9</text:p>
          </table:table-cell>
          <table:table-cell office:value-type="float" office:value="204.8" table:style-name="ce6">
            <text:p>204.8</text:p>
          </table:table-cell>
          <table:table-cell office:value-type="float" office:value="5.3929999999999998" table:style-name="ce6">
            <text:p>5.393</text:p>
          </table:table-cell>
          <table:table-cell office:value-type="date" office:date-value="2012-12-23T00:00:00" table:style-name="ce7">
            <text:p>12/23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itsubishi</text:p>
          </table:table-cell>
          <table:table-cell office:value-type="string" table:style-name="ce5">
            <text:p>Mirage</text:p>
          </table:table-cell>
          <table:table-cell office:value-type="float" office:value="26232" table:style-name="ce11">
            <text:p>26232</text:p>
          </table:table-cell>
          <table:table-cell office:value-type="currency" office:value="13987" table:style-name="ce12">
            <text:p>$13,987</text:p>
          </table:table-cell>
          <table:table-cell office:value-type="currency" office:value="8325" table:style-name="ce12">
            <text:p>$8,325</text:p>
          </table:table-cell>
          <table:table-cell office:value-type="percentage" office:value="0.59519553871452058" table:formula="of:=SUM([.E79]/[.D79])" table:style-name="ce13">
            <text:p>60%</text:p>
          </table:table-cell>
          <table:table-cell office:value-type="string" office:string-value="POOR" table:formula="of:=IF([.F79]&gt;69%; &quot;GOOD&quot;; &quot;POOR&quot;)" table:style-name="ce21">
            <text:p>POOR</text:p>
          </table:table-cell>
          <table:table-cell office:value-type="float" office:value="1.8" table:style-name="ce6">
            <text:p>1.8</text:p>
          </table:table-cell>
          <table:table-cell office:value-type="float" office:value="113" table:style-name="ce6">
            <text:p>113</text:p>
          </table:table-cell>
          <table:table-cell office:value-type="string" office:string-value="Medium HP" table:formula="of:=COM.MICROSOFT.IFS([.I79]&gt;299;&quot;High HP&quot;;[.I79]&gt;99;&quot;Medium HP&quot;;[.I7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0" table:style-name="ce6">
            <text:p>30</text:p>
          </table:table-cell>
          <table:table-cell office:value-type="float" office:value="45.832180559999998" table:style-name="ce6">
            <text:p>45.83218056</text:p>
          </table:table-cell>
          <table:table-cell office:value-type="float" office:value="13.2" table:style-name="ce6">
            <text:p>13.2</text:p>
          </table:table-cell>
          <table:table-cell office:value-type="float" office:value="98.4" table:style-name="ce6">
            <text:p>98.4</text:p>
          </table:table-cell>
          <table:table-cell office:value-type="float" office:value="66.5" table:style-name="ce6">
            <text:p>66.5</text:p>
          </table:table-cell>
          <table:table-cell office:value-type="float" office:value="173.6" table:style-name="ce6">
            <text:p>173.6</text:p>
          </table:table-cell>
          <table:table-cell office:value-type="float" office:value="2.25" table:style-name="ce6">
            <text:p>2.25</text:p>
          </table:table-cell>
          <table:table-cell office:value-type="date" office:date-value="2012-04-23T00:00:00" table:style-name="ce7">
            <text:p>4/23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itsubishi</text:p>
          </table:table-cell>
          <table:table-cell office:value-type="string" table:style-name="ce5">
            <text:p>Eclipse</text:p>
          </table:table-cell>
          <table:table-cell office:value-type="float" office:value="42541" table:style-name="ce11">
            <text:p>42541</text:p>
          </table:table-cell>
          <table:table-cell office:value-type="currency" office:value="19047" table:style-name="ce12">
            <text:p>$19,047</text:p>
          </table:table-cell>
          <table:table-cell office:value-type="currency" office:value="10395" table:style-name="ce12">
            <text:p>$10,395</text:p>
          </table:table-cell>
          <table:table-cell office:value-type="percentage" office:value="0.54575523704520401" table:formula="of:=SUM([.E80]/[.D80])" table:style-name="ce13">
            <text:p>55%</text:p>
          </table:table-cell>
          <table:table-cell office:value-type="string" office:string-value="POOR" table:formula="of:=IF([.F80]&gt;69%; &quot;GOOD&quot;; &quot;POOR&quot;)" table:style-name="ce21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54" table:style-name="ce6">
            <text:p>154</text:p>
          </table:table-cell>
          <table:table-cell office:value-type="string" office:string-value="Medium HP" table:formula="of:=COM.MICROSOFT.IFS([.I80]&gt;299;&quot;High HP&quot;;[.I80]&gt;99;&quot;Medium HP&quot;;[.I8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62.441962349999997" table:style-name="ce6">
            <text:p>62.44196235</text:p>
          </table:table-cell>
          <table:table-cell office:value-type="float" office:value="15.9" table:style-name="ce6">
            <text:p>15.9</text:p>
          </table:table-cell>
          <table:table-cell office:value-type="float" office:value="100.8" table:style-name="ce6">
            <text:p>100.8</text:p>
          </table:table-cell>
          <table:table-cell office:value-type="float" office:value="68.900000000000006" table:style-name="ce6">
            <text:p>68.9</text:p>
          </table:table-cell>
          <table:table-cell office:value-type="float" office:value="175.4" table:style-name="ce6">
            <text:p>175.4</text:p>
          </table:table-cell>
          <table:table-cell office:value-type="float" office:value="2.91" table:style-name="ce6">
            <text:p>2.91</text:p>
          </table:table-cell>
          <table:table-cell office:value-type="date" office:date-value="2012-11-24T00:00:00" table:style-name="ce7">
            <text:p>11/24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itsubishi</text:p>
          </table:table-cell>
          <table:table-cell office:value-type="string" table:style-name="ce5">
            <text:p>Galant</text:p>
          </table:table-cell>
          <table:table-cell office:value-type="float" office:value="55616" table:style-name="ce11">
            <text:p>55616</text:p>
          </table:table-cell>
          <table:table-cell office:value-type="currency" office:value="17357" table:style-name="ce12">
            <text:p>$17,357</text:p>
          </table:table-cell>
          <table:table-cell office:value-type="currency" office:value="10595" table:style-name="ce12">
            <text:p>$10,595</text:p>
          </table:table-cell>
          <table:table-cell office:value-type="percentage" office:value="0.61041654663824396" table:formula="of:=SUM([.E81]/[.D81])" table:style-name="ce13">
            <text:p>61%</text:p>
          </table:table-cell>
          <table:table-cell office:value-type="string" office:string-value="POOR" table:formula="of:=IF([.F81]&gt;69%; &quot;GOOD&quot;; &quot;POOR&quot;)" table:style-name="ce21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45" table:style-name="ce6">
            <text:p>145</text:p>
          </table:table-cell>
          <table:table-cell office:value-type="string" office:string-value="Medium HP" table:formula="of:=COM.MICROSOFT.IFS([.I81]&gt;299;&quot;High HP&quot;;[.I81]&gt;99;&quot;Medium HP&quot;;[.I8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58.606772919999997" table:style-name="ce6">
            <text:p>58.60677292</text:p>
          </table:table-cell>
          <table:table-cell office:value-type="float" office:value="16.3" table:style-name="ce6">
            <text:p>16.3</text:p>
          </table:table-cell>
          <table:table-cell office:value-type="float" office:value="103.7" table:style-name="ce6">
            <text:p>103.7</text:p>
          </table:table-cell>
          <table:table-cell office:value-type="float" office:value="68.5" table:style-name="ce6">
            <text:p>68.5</text:p>
          </table:table-cell>
          <table:table-cell office:value-type="float" office:value="187.8" table:style-name="ce6">
            <text:p>187.8</text:p>
          </table:table-cell>
          <table:table-cell office:value-type="float" office:value="2.9449999999999998" table:style-name="ce6">
            <text:p>2.945</text:p>
          </table:table-cell>
          <table:table-cell office:value-type="date" office:date-value="2012-01-29T00:00:00" table:style-name="ce7">
            <text:p>1/29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itsubishi</text:p>
          </table:table-cell>
          <table:table-cell office:value-type="string" table:style-name="ce5">
            <text:p>Diamante</text:p>
          </table:table-cell>
          <table:table-cell office:value-type="float" office:value="5711" table:style-name="ce11">
            <text:p>5711</text:p>
          </table:table-cell>
          <table:table-cell office:value-type="currency" office:value="24997" table:style-name="ce12">
            <text:p>$24,997</text:p>
          </table:table-cell>
          <table:table-cell office:value-type="currency" office:value="16575" table:style-name="ce12">
            <text:p>$16,575</text:p>
          </table:table-cell>
          <table:table-cell office:value-type="percentage" office:value="0.66307956954834579" table:formula="of:=SUM([.E82]/[.D82])" table:style-name="ce13">
            <text:p>66%</text:p>
          </table:table-cell>
          <table:table-cell office:value-type="string" office:string-value="POOR" table:formula="of:=IF([.F82]&gt;69%; &quot;GOOD&quot;; &quot;POOR&quot;)" table:style-name="ce21">
            <text:p>POOR</text:p>
          </table:table-cell>
          <table:table-cell office:value-type="float" office:value="3.5" table:style-name="ce6">
            <text:p>3.5</text:p>
          </table:table-cell>
          <table:table-cell office:value-type="float" office:value="210" table:style-name="ce6">
            <text:p>210</text:p>
          </table:table-cell>
          <table:table-cell office:value-type="string" office:string-value="Medium HP" table:formula="of:=COM.MICROSOFT.IFS([.I82]&gt;299;&quot;High HP&quot;;[.I82]&gt;99;&quot;Medium HP&quot;;[.I8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84.83077858" table:style-name="ce6">
            <text:p>84.83077858</text:p>
          </table:table-cell>
          <table:table-cell office:value-type="float" office:value="19" table:style-name="ce6">
            <text:p>19</text:p>
          </table:table-cell>
          <table:table-cell office:value-type="float" office:value="107.1" table:style-name="ce6">
            <text:p>107.1</text:p>
          </table:table-cell>
          <table:table-cell office:value-type="float" office:value="70.3" table:style-name="ce6">
            <text:p>70.3</text:p>
          </table:table-cell>
          <table:table-cell office:value-type="float" office:value="194.1" table:style-name="ce6">
            <text:p>194.1</text:p>
          </table:table-cell>
          <table:table-cell office:value-type="float" office:value="3.4430000000000001" table:style-name="ce6">
            <text:p>3.443</text:p>
          </table:table-cell>
          <table:table-cell office:value-type="date" office:date-value="2012-08-28T00:00:00" table:style-name="ce7">
            <text:p>8/28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itsubishi</text:p>
          </table:table-cell>
          <table:table-cell office:value-type="string" table:style-name="ce5">
            <text:p>3000GT</text:p>
          </table:table-cell>
          <table:table-cell office:value-type="float" office:value="110" table:style-name="ce11">
            <text:p>110</text:p>
          </table:table-cell>
          <table:table-cell office:value-type="currency" office:value="25450" table:style-name="ce12">
            <text:p>$25,450</text:p>
          </table:table-cell>
          <table:table-cell office:value-type="currency" office:value="20940" table:style-name="ce12">
            <text:p>$20,940</text:p>
          </table:table-cell>
          <table:table-cell office:value-type="percentage" office:value="0.82278978388998036" table:formula="of:=SUM([.E83]/[.D83])" table:style-name="ce13">
            <text:p>82%</text:p>
          </table:table-cell>
          <table:table-cell office:value-type="string" office:string-value="GOOD" table:formula="of:=IF([.F83]&gt;69%; &quot;GOOD&quot;; &quot;POOR&quot;)" table:style-name="ce21">
            <text:p>GOOD</text:p>
          </table:table-cell>
          <table:table-cell office:value-type="float" office:value="3" table:style-name="ce6">
            <text:p>3</text:p>
          </table:table-cell>
          <table:table-cell office:value-type="float" office:value="161" table:style-name="ce6">
            <text:p>161</text:p>
          </table:table-cell>
          <table:table-cell office:value-type="string" office:string-value="Medium HP" table:formula="of:=COM.MICROSOFT.IFS([.I83]&gt;299;&quot;High HP&quot;;[.I83]&gt;99;&quot;Medium HP&quot;;[.I8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67.544154939999999" table:style-name="ce6">
            <text:p>67.54415494</text:p>
          </table:table-cell>
          <table:table-cell office:value-type="float" office:value="19.8" table:style-name="ce6">
            <text:p>19.8</text:p>
          </table:table-cell>
          <table:table-cell office:value-type="float" office:value="97.2" table:style-name="ce6">
            <text:p>97.2</text:p>
          </table:table-cell>
          <table:table-cell office:value-type="float" office:value="72.400000000000006" table:style-name="ce6">
            <text:p>72.4</text:p>
          </table:table-cell>
          <table:table-cell office:value-type="float" office:value="180.3" table:style-name="ce6">
            <text:p>180.3</text:p>
          </table:table-cell>
          <table:table-cell office:value-type="float" office:value="3.1309999999999998" table:style-name="ce6">
            <text:p>3.131</text:p>
          </table:table-cell>
          <table:table-cell office:value-type="date" office:date-value="2012-06-29T00:00:00" table:style-name="ce7">
            <text:p>6/29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itsubishi</text:p>
          </table:table-cell>
          <table:table-cell office:value-type="string" table:style-name="ce5">
            <text:p>Montero</text:p>
          </table:table-cell>
          <table:table-cell office:value-type="float" office:value="11337" table:style-name="ce11">
            <text:p>11337</text:p>
          </table:table-cell>
          <table:table-cell office:value-type="currency" office:value="31807" table:style-name="ce12">
            <text:p>$31,807</text:p>
          </table:table-cell>
          <table:table-cell office:value-type="currency" office:value="19125" table:style-name="ce12">
            <text:p>$19,125</text:p>
          </table:table-cell>
          <table:table-cell office:value-type="percentage" office:value="0.601282736504543" table:formula="of:=SUM([.E84]/[.D84])" table:style-name="ce13">
            <text:p>60%</text:p>
          </table:table-cell>
          <table:table-cell office:value-type="string" office:string-value="POOR" table:formula="of:=IF([.F84]&gt;69%; &quot;GOOD&quot;; &quot;POOR&quot;)" table:style-name="ce21">
            <text:p>POOR</text:p>
          </table:table-cell>
          <table:table-cell office:value-type="float" office:value="3.5" table:style-name="ce6">
            <text:p>3.5</text:p>
          </table:table-cell>
          <table:table-cell office:value-type="float" office:value="200" table:style-name="ce6">
            <text:p>200</text:p>
          </table:table-cell>
          <table:table-cell office:value-type="string" office:string-value="Medium HP" table:formula="of:=COM.MICROSOFT.IFS([.I84]&gt;299;&quot;High HP&quot;;[.I84]&gt;99;&quot;Medium HP&quot;;[.I8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8" table:style-name="ce6">
            <text:p>18</text:p>
          </table:table-cell>
          <table:table-cell office:value-type="float" office:value="83.920815039999994" table:style-name="ce6">
            <text:p>83.92081504</text:p>
          </table:table-cell>
          <table:table-cell office:value-type="float" office:value="24.3" table:style-name="ce6">
            <text:p>24.3</text:p>
          </table:table-cell>
          <table:table-cell office:value-type="float" office:value="107.3" table:style-name="ce6">
            <text:p>107.3</text:p>
          </table:table-cell>
          <table:table-cell office:value-type="float" office:value="69.900000000000006" table:style-name="ce6">
            <text:p>69.9</text:p>
          </table:table-cell>
          <table:table-cell office:value-type="float" office:value="186.6" table:style-name="ce6">
            <text:p>186.6</text:p>
          </table:table-cell>
          <table:table-cell office:value-type="float" office:value="4.5199999999999996" table:style-name="ce6">
            <text:p>4.52</text:p>
          </table:table-cell>
          <table:table-cell office:value-type="date" office:date-value="2012-01-17T00:00:00" table:style-name="ce7">
            <text:p>1/17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itsubishi</text:p>
          </table:table-cell>
          <table:table-cell office:value-type="string" table:style-name="ce5">
            <text:p>Montero Sport</text:p>
          </table:table-cell>
          <table:table-cell office:value-type="float" office:value="39348" table:style-name="ce11">
            <text:p>39348</text:p>
          </table:table-cell>
          <table:table-cell office:value-type="currency" office:value="22527" table:style-name="ce12">
            <text:p>$22,527</text:p>
          </table:table-cell>
          <table:table-cell office:value-type="currency" office:value="13880" table:style-name="ce12">
            <text:p>$13,880</text:p>
          </table:table-cell>
          <table:table-cell office:value-type="percentage" office:value="0.6161495094775159" table:formula="of:=SUM([.E85]/[.D85])" table:style-name="ce13">
            <text:p>62%</text:p>
          </table:table-cell>
          <table:table-cell office:value-type="string" office:string-value="POOR" table:formula="of:=IF([.F85]&gt;69%; &quot;GOOD&quot;; &quot;POOR&quot;)" table:style-name="ce21">
            <text:p>POOR</text:p>
          </table:table-cell>
          <table:table-cell office:value-type="float" office:value="3" table:style-name="ce6">
            <text:p>3</text:p>
          </table:table-cell>
          <table:table-cell office:value-type="float" office:value="173" table:style-name="ce6">
            <text:p>173</text:p>
          </table:table-cell>
          <table:table-cell office:value-type="string" office:string-value="Medium HP" table:formula="of:=COM.MICROSOFT.IFS([.I85]&gt;299;&quot;High HP&quot;;[.I85]&gt;99;&quot;Medium HP&quot;;[.I8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0" table:style-name="ce6">
            <text:p>20</text:p>
          </table:table-cell>
          <table:table-cell office:value-type="float" office:value="70.660941789999995" table:style-name="ce6">
            <text:p>70.66094179</text:p>
          </table:table-cell>
          <table:table-cell office:value-type="float" office:value="19.5" table:style-name="ce6">
            <text:p>19.5</text:p>
          </table:table-cell>
          <table:table-cell office:value-type="float" office:value="107.3" table:style-name="ce6">
            <text:p>107.3</text:p>
          </table:table-cell>
          <table:table-cell office:value-type="float" office:value="66.7" table:style-name="ce6">
            <text:p>66.7</text:p>
          </table:table-cell>
          <table:table-cell office:value-type="float" office:value="178.3" table:style-name="ce6">
            <text:p>178.3</text:p>
          </table:table-cell>
          <table:table-cell office:value-type="float" office:value="3.51" table:style-name="ce6">
            <text:p>3.51</text:p>
          </table:table-cell>
          <table:table-cell office:value-type="date" office:date-value="2012-05-18T00:00:00" table:style-name="ce7">
            <text:p>5/18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ercury</text:p>
          </table:table-cell>
          <table:table-cell office:value-type="string" table:style-name="ce5">
            <text:p>Mystique</text:p>
          </table:table-cell>
          <table:table-cell office:value-type="float" office:value="14351" table:style-name="ce11">
            <text:p>14351</text:p>
          </table:table-cell>
          <table:table-cell office:value-type="currency" office:value="16239.999999999998" table:style-name="ce12">
            <text:p>$16,240</text:p>
          </table:table-cell>
          <table:table-cell office:value-type="currency" office:value="8800" table:style-name="ce12">
            <text:p>$8,800</text:p>
          </table:table-cell>
          <table:table-cell office:value-type="percentage" office:value="0.54187192118226613" table:formula="of:=SUM([.E86]/[.D86])" table:style-name="ce13">
            <text:p>54%</text:p>
          </table:table-cell>
          <table:table-cell office:value-type="string" office:string-value="POOR" table:formula="of:=IF([.F86]&gt;69%; &quot;GOOD&quot;; &quot;POOR&quot;)" table:style-name="ce21">
            <text:p>POOR</text:p>
          </table:table-cell>
          <table:table-cell office:value-type="float" office:value="2" table:style-name="ce6">
            <text:p>2</text:p>
          </table:table-cell>
          <table:table-cell office:value-type="float" office:value="125" table:style-name="ce6">
            <text:p>125</text:p>
          </table:table-cell>
          <table:table-cell office:value-type="string" office:string-value="Medium HP" table:formula="of:=COM.MICROSOFT.IFS([.I86]&gt;299;&quot;High HP&quot;;[.I86]&gt;99;&quot;Medium HP&quot;;[.I8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8" table:style-name="ce6">
            <text:p>28</text:p>
          </table:table-cell>
          <table:table-cell office:value-type="float" office:value="50.997747609999998" table:style-name="ce6">
            <text:p>50.99774761</text:p>
          </table:table-cell>
          <table:table-cell office:value-type="float" office:value="15" table:style-name="ce6">
            <text:p>15</text:p>
          </table:table-cell>
          <table:table-cell office:value-type="float" office:value="106.5" table:style-name="ce6">
            <text:p>106.5</text:p>
          </table:table-cell>
          <table:table-cell office:value-type="float" office:value="69.099999999999994" table:style-name="ce6">
            <text:p>69.1</text:p>
          </table:table-cell>
          <table:table-cell office:value-type="float" office:value="184.8" table:style-name="ce6">
            <text:p>184.8</text:p>
          </table:table-cell>
          <table:table-cell office:value-type="float" office:value="2.7690000000000001" table:style-name="ce6">
            <text:p>2.769</text:p>
          </table:table-cell>
          <table:table-cell office:value-type="date" office:date-value="2012-12-19T00:00:00" table:style-name="ce7">
            <text:p>12/19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ercury</text:p>
          </table:table-cell>
          <table:table-cell office:value-type="string" table:style-name="ce5">
            <text:p>Cougar</text:p>
          </table:table-cell>
          <table:table-cell office:value-type="float" office:value="26529" table:style-name="ce11">
            <text:p>26529</text:p>
          </table:table-cell>
          <table:table-cell office:value-type="currency" office:value="16540" table:style-name="ce12">
            <text:p>$16,540</text:p>
          </table:table-cell>
          <table:table-cell office:value-type="currency" office:value="13890" table:style-name="ce12">
            <text:p>$13,890</text:p>
          </table:table-cell>
          <table:table-cell office:value-type="percentage" office:value="0.83978234582829503" table:formula="of:=SUM([.E87]/[.D87])" table:style-name="ce13">
            <text:p>84%</text:p>
          </table:table-cell>
          <table:table-cell office:value-type="string" office:string-value="GOOD" table:formula="of:=IF([.F87]&gt;69%; &quot;GOOD&quot;; &quot;POOR&quot;)" table:style-name="ce21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25" table:style-name="ce6">
            <text:p>125</text:p>
          </table:table-cell>
          <table:table-cell office:value-type="string" office:string-value="Medium HP" table:formula="of:=COM.MICROSOFT.IFS([.I87]&gt;299;&quot;High HP&quot;;[.I87]&gt;99;&quot;Medium HP&quot;;[.I8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0" table:style-name="ce6">
            <text:p>30</text:p>
          </table:table-cell>
          <table:table-cell office:value-type="float" office:value="51.113474259999997" table:style-name="ce6">
            <text:p>51.11347426</text:p>
          </table:table-cell>
          <table:table-cell office:value-type="float" office:value="16" table:style-name="ce6">
            <text:p>16</text:p>
          </table:table-cell>
          <table:table-cell office:value-type="float" office:value="106.4" table:style-name="ce6">
            <text:p>106.4</text:p>
          </table:table-cell>
          <table:table-cell office:value-type="float" office:value="69.599999999999994" table:style-name="ce6">
            <text:p>69.6</text:p>
          </table:table-cell>
          <table:table-cell office:value-type="float" office:value="185" table:style-name="ce6">
            <text:p>185</text:p>
          </table:table-cell>
          <table:table-cell office:value-type="float" office:value="2.8919999999999999" table:style-name="ce6">
            <text:p>2.892</text:p>
          </table:table-cell>
          <table:table-cell office:value-type="date" office:date-value="2012-02-23T00:00:00" table:style-name="ce7">
            <text:p>2/23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ercury</text:p>
          </table:table-cell>
          <table:table-cell office:value-type="string" table:style-name="ce5">
            <text:p>Sable</text:p>
          </table:table-cell>
          <table:table-cell office:value-type="float" office:value="67956" table:style-name="ce11">
            <text:p>67956</text:p>
          </table:table-cell>
          <table:table-cell office:value-type="currency" office:value="19035" table:style-name="ce12">
            <text:p>$19,035</text:p>
          </table:table-cell>
          <table:table-cell office:value-type="currency" office:value="11030" table:style-name="ce12">
            <text:p>$11,030</text:p>
          </table:table-cell>
          <table:table-cell office:value-type="percentage" office:value="0.57945889151562913" table:formula="of:=SUM([.E88]/[.D88])" table:style-name="ce13">
            <text:p>58%</text:p>
          </table:table-cell>
          <table:table-cell office:value-type="string" office:string-value="POOR" table:formula="of:=IF([.F88]&gt;69%; &quot;GOOD&quot;; &quot;POOR&quot;)" table:style-name="ce21">
            <text:p>POOR</text:p>
          </table:table-cell>
          <table:table-cell office:value-type="float" office:value="3" table:style-name="ce6">
            <text:p>3</text:p>
          </table:table-cell>
          <table:table-cell office:value-type="float" office:value="153" table:style-name="ce6">
            <text:p>153</text:p>
          </table:table-cell>
          <table:table-cell office:value-type="string" office:string-value="Medium HP" table:formula="of:=COM.MICROSOFT.IFS([.I88]&gt;299;&quot;High HP&quot;;[.I88]&gt;99;&quot;Medium HP&quot;;[.I8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62.239966629999998" table:style-name="ce6">
            <text:p>62.23996663</text:p>
          </table:table-cell>
          <table:table-cell office:value-type="float" office:value="16" table:style-name="ce6">
            <text:p>16</text:p>
          </table:table-cell>
          <table:table-cell office:value-type="float" office:value="108.5" table:style-name="ce6">
            <text:p>108.5</text:p>
          </table:table-cell>
          <table:table-cell office:value-type="float" office:value="73" table:style-name="ce6">
            <text:p>73</text:p>
          </table:table-cell>
          <table:table-cell office:value-type="float" office:value="199.7" table:style-name="ce6">
            <text:p>199.7</text:p>
          </table:table-cell>
          <table:table-cell office:value-type="float" office:value="3.379" table:style-name="ce6">
            <text:p>3.379</text:p>
          </table:table-cell>
          <table:table-cell office:value-type="date" office:date-value="2012-09-22T00:00:00" table:style-name="ce7">
            <text:p>9/22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ercury</text:p>
          </table:table-cell>
          <table:table-cell office:value-type="string" table:style-name="ce5">
            <text:p>Grand Marquis</text:p>
          </table:table-cell>
          <table:table-cell office:value-type="float" office:value="81174" table:style-name="ce11">
            <text:p>81174</text:p>
          </table:table-cell>
          <table:table-cell office:value-type="currency" office:value="22605" table:style-name="ce12">
            <text:p>$22,605</text:p>
          </table:table-cell>
          <table:table-cell office:value-type="currency" office:value="14875" table:style-name="ce12">
            <text:p>$14,875</text:p>
          </table:table-cell>
          <table:table-cell office:value-type="percentage" office:value="0.65804025658040255" table:formula="of:=SUM([.E89]/[.D89])" table:style-name="ce13">
            <text:p>66%</text:p>
          </table:table-cell>
          <table:table-cell office:value-type="string" office:string-value="POOR" table:formula="of:=IF([.F89]&gt;69%; &quot;GOOD&quot;; &quot;POOR&quot;)" table:style-name="ce21">
            <text:p>POOR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200" table:style-name="ce6">
            <text:p>200</text:p>
          </table:table-cell>
          <table:table-cell office:value-type="string" office:string-value="Medium HP" table:formula="of:=COM.MICROSOFT.IFS([.I89]&gt;299;&quot;High HP&quot;;[.I89]&gt;99;&quot;Medium HP&quot;;[.I8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80.657696459999997" table:style-name="ce6">
            <text:p>80.65769646</text:p>
          </table:table-cell>
          <table:table-cell office:value-type="float" office:value="19" table:style-name="ce6">
            <text:p>19</text:p>
          </table:table-cell>
          <table:table-cell office:value-type="float" office:value="114.7" table:style-name="ce6">
            <text:p>114.7</text:p>
          </table:table-cell>
          <table:table-cell office:value-type="float" office:value="78.2" table:style-name="ce6">
            <text:p>78.2</text:p>
          </table:table-cell>
          <table:table-cell office:value-type="float" office:value="212" table:style-name="ce6">
            <text:p>212</text:p>
          </table:table-cell>
          <table:table-cell office:value-type="float" office:value="3.9580000000000002" table:style-name="ce6">
            <text:p>3.958</text:p>
          </table:table-cell>
          <table:table-cell office:value-type="date" office:date-value="2012-07-24T00:00:00" table:style-name="ce7">
            <text:p>7/24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ercury</text:p>
          </table:table-cell>
          <table:table-cell office:value-type="string" table:style-name="ce5">
            <text:p>Mountaineer</text:p>
          </table:table-cell>
          <table:table-cell office:value-type="float" office:value="27609" table:style-name="ce11">
            <text:p>27609</text:p>
          </table:table-cell>
          <table:table-cell office:value-type="currency" office:value="27560" table:style-name="ce12">
            <text:p>$27,560</text:p>
          </table:table-cell>
          <table:table-cell office:value-type="currency" office:value="20430" table:style-name="ce12">
            <text:p>$20,430</text:p>
          </table:table-cell>
          <table:table-cell office:value-type="percentage" office:value="0.74129172714078373" table:formula="of:=SUM([.E90]/[.D90])" table:style-name="ce13">
            <text:p>74%</text:p>
          </table:table-cell>
          <table:table-cell office:value-type="string" office:string-value="GOOD" table:formula="of:=IF([.F90]&gt;69%; &quot;GOOD&quot;; &quot;POOR&quot;)" table:style-name="ce21">
            <text:p>GOOD</text:p>
          </table:table-cell>
          <table:table-cell office:value-type="float" office:value="4" table:style-name="ce6">
            <text:p>4</text:p>
          </table:table-cell>
          <table:table-cell office:value-type="float" office:value="210" table:style-name="ce6">
            <text:p>210</text:p>
          </table:table-cell>
          <table:table-cell office:value-type="string" office:string-value="Medium HP" table:formula="of:=COM.MICROSOFT.IFS([.I90]&gt;299;&quot;High HP&quot;;[.I90]&gt;99;&quot;Medium HP&quot;;[.I9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8" table:style-name="ce6">
            <text:p>18</text:p>
          </table:table-cell>
          <table:table-cell office:value-type="float" office:value="85.949744249999995" table:style-name="ce6">
            <text:p>85.94974425</text:p>
          </table:table-cell>
          <table:table-cell office:value-type="float" office:value="21" table:style-name="ce6">
            <text:p>21</text:p>
          </table:table-cell>
          <table:table-cell office:value-type="float" office:value="111.6" table:style-name="ce6">
            <text:p>111.6</text:p>
          </table:table-cell>
          <table:table-cell office:value-type="float" office:value="70.2" table:style-name="ce6">
            <text:p>70.2</text:p>
          </table:table-cell>
          <table:table-cell office:value-type="float" office:value="190.1" table:style-name="ce6">
            <text:p>190.1</text:p>
          </table:table-cell>
          <table:table-cell office:value-type="float" office:value="3.8759999999999999" table:style-name="ce6">
            <text:p>3.876</text:p>
          </table:table-cell>
          <table:table-cell office:value-type="date" office:date-value="2008-02-13T00:00:00" table:style-name="ce7">
            <text:p>2/13/2008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ercury</text:p>
          </table:table-cell>
          <table:table-cell office:value-type="string" table:style-name="ce5">
            <text:p>Villager</text:p>
          </table:table-cell>
          <table:table-cell office:value-type="float" office:value="20380" table:style-name="ce11">
            <text:p>20380</text:p>
          </table:table-cell>
          <table:table-cell office:value-type="currency" office:value="22510" table:style-name="ce12">
            <text:p>$22,510</text:p>
          </table:table-cell>
          <table:table-cell office:value-type="currency" office:value="14795" table:style-name="ce12">
            <text:p>$14,795</text:p>
          </table:table-cell>
          <table:table-cell office:value-type="percentage" office:value="0.65726343847179036" table:formula="of:=SUM([.E91]/[.D91])" table:style-name="ce13">
            <text:p>66%</text:p>
          </table:table-cell>
          <table:table-cell office:value-type="string" office:string-value="POOR" table:formula="of:=IF([.F91]&gt;69%; &quot;GOOD&quot;; &quot;POOR&quot;)" table:style-name="ce21">
            <text:p>POOR</text:p>
          </table:table-cell>
          <table:table-cell office:value-type="float" office:value="3.3" table:style-name="ce6">
            <text:p>3.3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91]&gt;299;&quot;High HP&quot;;[.I91]&gt;99;&quot;Medium HP&quot;;[.I9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1" table:style-name="ce6">
            <text:p>21</text:p>
          </table:table-cell>
          <table:table-cell office:value-type="float" office:value="69.671460999999994" table:style-name="ce6">
            <text:p>69.671461</text:p>
          </table:table-cell>
          <table:table-cell office:value-type="float" office:value="20" table:style-name="ce6">
            <text:p>20</text:p>
          </table:table-cell>
          <table:table-cell office:value-type="float" office:value="112.2" table:style-name="ce6">
            <text:p>112.2</text:p>
          </table:table-cell>
          <table:table-cell office:value-type="float" office:value="74.900000000000006" table:style-name="ce6">
            <text:p>74.9</text:p>
          </table:table-cell>
          <table:table-cell office:value-type="float" office:value="194.7" table:style-name="ce6">
            <text:p>194.7</text:p>
          </table:table-cell>
          <table:table-cell office:value-type="float" office:value="3.944" table:style-name="ce6">
            <text:p>3.944</text:p>
          </table:table-cell>
          <table:table-cell office:value-type="date" office:date-value="2009-10-20T00:00:00" table:style-name="ce7">
            <text:p>10/20/2009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ercedes-B</text:p>
          </table:table-cell>
          <table:table-cell office:value-type="string" table:style-name="ce5">
            <text:p>C-Class</text:p>
          </table:table-cell>
          <table:table-cell office:value-type="float" office:value="18392" table:style-name="ce11">
            <text:p>18392</text:p>
          </table:table-cell>
          <table:table-cell office:value-type="currency" office:value="31750" table:style-name="ce12">
            <text:p>$31,750</text:p>
          </table:table-cell>
          <table:table-cell office:value-type="currency" office:value="26050" table:style-name="ce12">
            <text:p>$26,050</text:p>
          </table:table-cell>
          <table:table-cell office:value-type="percentage" office:value="0.82047244094488192" table:formula="of:=SUM([.E92]/[.D92])" table:style-name="ce13">
            <text:p>82%</text:p>
          </table:table-cell>
          <table:table-cell office:value-type="string" office:string-value="GOOD" table:formula="of:=IF([.F92]&gt;69%; &quot;GOOD&quot;; &quot;POOR&quot;)" table:style-name="ce21">
            <text:p>GOOD</text:p>
          </table:table-cell>
          <table:table-cell office:value-type="float" office:value="2.2999999999999998" table:style-name="ce6">
            <text:p>2.3</text:p>
          </table:table-cell>
          <table:table-cell office:value-type="float" office:value="185" table:style-name="ce6">
            <text:p>185</text:p>
          </table:table-cell>
          <table:table-cell office:value-type="string" office:string-value="Medium HP" table:formula="of:=COM.MICROSOFT.IFS([.I92]&gt;299;&quot;High HP&quot;;[.I92]&gt;99;&quot;Medium HP&quot;;[.I9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78.280730879999993" table:style-name="ce6">
            <text:p>78.28073088</text:p>
          </table:table-cell>
          <table:table-cell office:value-type="float" office:value="16.399999999999999" table:style-name="ce6">
            <text:p>16.4</text:p>
          </table:table-cell>
          <table:table-cell office:value-type="float" office:value="105.9" table:style-name="ce6">
            <text:p>105.9</text:p>
          </table:table-cell>
          <table:table-cell office:value-type="float" office:value="67.7" table:style-name="ce6">
            <text:p>67.7</text:p>
          </table:table-cell>
          <table:table-cell office:value-type="float" office:value="177.4" table:style-name="ce6">
            <text:p>177.4</text:p>
          </table:table-cell>
          <table:table-cell office:value-type="float" office:value="3.25" table:style-name="ce6">
            <text:p>3.25</text:p>
          </table:table-cell>
          <table:table-cell office:value-type="date" office:date-value="2011-04-24T00:00:00" table:style-name="ce7">
            <text:p>4/24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ercedes-B</text:p>
          </table:table-cell>
          <table:table-cell office:value-type="string" table:style-name="ce5">
            <text:p>E-Class</text:p>
          </table:table-cell>
          <table:table-cell office:value-type="float" office:value="27602" table:style-name="ce11">
            <text:p>27602</text:p>
          </table:table-cell>
          <table:table-cell office:value-type="currency" office:value="49900" table:style-name="ce12">
            <text:p>$49,900</text:p>
          </table:table-cell>
          <table:table-cell office:value-type="currency" office:value="41450" table:style-name="ce12">
            <text:p>$41,450</text:p>
          </table:table-cell>
          <table:table-cell office:value-type="percentage" office:value="0.83066132264529058" table:formula="of:=SUM([.E93]/[.D93])" table:style-name="ce13">
            <text:p>83%</text:p>
          </table:table-cell>
          <table:table-cell office:value-type="string" office:string-value="GOOD" table:formula="of:=IF([.F93]&gt;69%; &quot;GOOD&quot;; &quot;POOR&quot;)" table:style-name="ce21">
            <text:p>GOOD</text:p>
          </table:table-cell>
          <table:table-cell office:value-type="float" office:value="3.2" table:style-name="ce6">
            <text:p>3.2</text:p>
          </table:table-cell>
          <table:table-cell office:value-type="float" office:value="221" table:style-name="ce6">
            <text:p>221</text:p>
          </table:table-cell>
          <table:table-cell office:value-type="string" office:string-value="Medium HP" table:formula="of:=COM.MICROSOFT.IFS([.I93]&gt;299;&quot;High HP&quot;;[.I93]&gt;99;&quot;Medium HP&quot;;[.I9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98.249737499999995" table:style-name="ce6">
            <text:p>98.2497375</text:p>
          </table:table-cell>
          <table:table-cell office:value-type="float" office:value="21.1" table:style-name="ce6">
            <text:p>21.1</text:p>
          </table:table-cell>
          <table:table-cell office:value-type="float" office:value="111.5" table:style-name="ce6">
            <text:p>111.5</text:p>
          </table:table-cell>
          <table:table-cell office:value-type="float" office:value="70.8" table:style-name="ce6">
            <text:p>70.8</text:p>
          </table:table-cell>
          <table:table-cell office:value-type="float" office:value="189.4" table:style-name="ce6">
            <text:p>189.4</text:p>
          </table:table-cell>
          <table:table-cell office:value-type="float" office:value="3.823" table:style-name="ce6">
            <text:p>3.823</text:p>
          </table:table-cell>
          <table:table-cell office:value-type="date" office:date-value="2011-07-12T00:00:00" table:style-name="ce7">
            <text:p>7/12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ercedes-B</text:p>
          </table:table-cell>
          <table:table-cell office:value-type="string" table:style-name="ce5">
            <text:p>S-Class</text:p>
          </table:table-cell>
          <table:table-cell office:value-type="float" office:value="16774" table:style-name="ce11">
            <text:p>16774</text:p>
          </table:table-cell>
          <table:table-cell office:value-type="currency" office:value="69700" table:style-name="ce12">
            <text:p>$69,700</text:p>
          </table:table-cell>
          <table:table-cell office:value-type="currency" office:value="50375" table:style-name="ce12">
            <text:p>$50,375</text:p>
          </table:table-cell>
          <table:table-cell office:value-type="percentage" office:value="0.72274031563845054" table:formula="of:=SUM([.E94]/[.D94])" table:style-name="ce13">
            <text:p>72%</text:p>
          </table:table-cell>
          <table:table-cell office:value-type="string" office:string-value="GOOD" table:formula="of:=IF([.F94]&gt;69%; &quot;GOOD&quot;; &quot;POOR&quot;)" table:style-name="ce21">
            <text:p>GOOD</text:p>
          </table:table-cell>
          <table:table-cell office:value-type="float" office:value="4.3" table:style-name="ce6">
            <text:p>4.3</text:p>
          </table:table-cell>
          <table:table-cell office:value-type="float" office:value="275" table:style-name="ce6">
            <text:p>275</text:p>
          </table:table-cell>
          <table:table-cell office:value-type="string" office:string-value="Medium HP" table:formula="of:=COM.MICROSOFT.IFS([.I94]&gt;299;&quot;High HP&quot;;[.I94]&gt;99;&quot;Medium HP&quot;;[.I9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125.2738757" table:style-name="ce6">
            <text:p>125.2738757</text:p>
          </table:table-cell>
          <table:table-cell office:value-type="float" office:value="23.2" table:style-name="ce6">
            <text:p>23.2</text:p>
          </table:table-cell>
          <table:table-cell office:value-type="float" office:value="121.5" table:style-name="ce6">
            <text:p>121.5</text:p>
          </table:table-cell>
          <table:table-cell office:value-type="float" office:value="73.099999999999994" table:style-name="ce6">
            <text:p>73.1</text:p>
          </table:table-cell>
          <table:table-cell office:value-type="float" office:value="203.1" table:style-name="ce6">
            <text:p>203.1</text:p>
          </table:table-cell>
          <table:table-cell office:value-type="float" office:value="4.133" table:style-name="ce6">
            <text:p>4.133</text:p>
          </table:table-cell>
          <table:table-cell office:value-type="date" office:date-value="2011-06-13T00:00:00" table:style-name="ce7">
            <text:p>6/13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ercedes-B</text:p>
          </table:table-cell>
          <table:table-cell office:value-type="string" table:style-name="ce5">
            <text:p>SL-Class</text:p>
          </table:table-cell>
          <table:table-cell office:value-type="float" office:value="3311" table:style-name="ce11">
            <text:p>3311</text:p>
          </table:table-cell>
          <table:table-cell office:value-type="currency" office:value="82600" table:style-name="ce12">
            <text:p>$82,600</text:p>
          </table:table-cell>
          <table:table-cell office:value-type="currency" office:value="58600" table:style-name="ce12">
            <text:p>$58,600</text:p>
          </table:table-cell>
          <table:table-cell office:value-type="percentage" office:value="0.70944309927360771" table:formula="of:=SUM([.E95]/[.D95])" table:style-name="ce13">
            <text:p>71%</text:p>
          </table:table-cell>
          <table:table-cell office:value-type="string" office:string-value="GOOD" table:formula="of:=IF([.F95]&gt;69%; &quot;GOOD&quot;; &quot;POOR&quot;)" table:style-name="ce21">
            <text:p>GOOD</text:p>
          </table:table-cell>
          <table:table-cell office:value-type="float" office:value="5" table:style-name="ce6">
            <text:p>5</text:p>
          </table:table-cell>
          <table:table-cell office:value-type="float" office:value="302" table:style-name="ce6">
            <text:p>302</text:p>
          </table:table-cell>
          <table:table-cell office:value-type="string" office:string-value="High HP" table:formula="of:=COM.MICROSOFT.IFS([.I95]&gt;299;&quot;High HP&quot;;[.I95]&gt;99;&quot;Medium HP&quot;;[.I95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Passenger</text:p>
          </table:table-cell>
          <table:table-cell office:value-type="float" office:value="20" table:style-name="ce6">
            <text:p>20</text:p>
          </table:table-cell>
          <table:table-cell office:value-type="float" office:value="139.98229359999999" table:style-name="ce6">
            <text:p>139.9822936</text:p>
          </table:table-cell>
          <table:table-cell office:value-type="float" office:value="21.1" table:style-name="ce6">
            <text:p>21.1</text:p>
          </table:table-cell>
          <table:table-cell office:value-type="float" office:value="99" table:style-name="ce6">
            <text:p>99</text:p>
          </table:table-cell>
          <table:table-cell office:value-type="float" office:value="71.3" table:style-name="ce6">
            <text:p>71.3</text:p>
          </table:table-cell>
          <table:table-cell office:value-type="float" office:value="177.1" table:style-name="ce6">
            <text:p>177.1</text:p>
          </table:table-cell>
          <table:table-cell office:value-type="float" office:value="4.125" table:style-name="ce6">
            <text:p>4.125</text:p>
          </table:table-cell>
          <table:table-cell office:value-type="date" office:date-value="2011-03-17T00:00:00" table:style-name="ce7">
            <text:p>3/17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ercedes-B</text:p>
          </table:table-cell>
          <table:table-cell office:value-type="string" table:style-name="ce5">
            <text:p>SLK</text:p>
          </table:table-cell>
          <table:table-cell office:value-type="float" office:value="7998" table:style-name="ce11">
            <text:p>7998</text:p>
          </table:table-cell>
          <table:table-cell office:value-type="currency" office:value="38900" table:style-name="ce12">
            <text:p>$38,900</text:p>
          </table:table-cell>
          <table:table-cell office:value-type="currency" office:value="32436" table:style-name="ce12">
            <text:p>$32,436</text:p>
          </table:table-cell>
          <table:table-cell office:value-type="percentage" office:value="0.83383033419023134" table:formula="of:=SUM([.E96]/[.D96])" table:style-name="ce13">
            <text:p>83%</text:p>
          </table:table-cell>
          <table:table-cell office:value-type="string" office:string-value="GOOD" table:formula="of:=IF([.F96]&gt;69%; &quot;GOOD&quot;; &quot;POOR&quot;)" table:style-name="ce21">
            <text:p>GOOD</text:p>
          </table:table-cell>
          <table:table-cell office:value-type="float" office:value="2.2999999999999998" table:style-name="ce6">
            <text:p>2.3</text:p>
          </table:table-cell>
          <table:table-cell office:value-type="float" office:value="190" table:style-name="ce6">
            <text:p>190</text:p>
          </table:table-cell>
          <table:table-cell office:value-type="string" office:string-value="Medium HP" table:formula="of:=COM.MICROSOFT.IFS([.I96]&gt;299;&quot;High HP&quot;;[.I96]&gt;99;&quot;Medium HP&quot;;[.I9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82.807361929999999" table:style-name="ce6">
            <text:p>82.80736193</text:p>
          </table:table-cell>
          <table:table-cell office:value-type="float" office:value="15.9" table:style-name="ce6">
            <text:p>15.9</text:p>
          </table:table-cell>
          <table:table-cell office:value-type="float" office:value="94.5" table:style-name="ce6">
            <text:p>94.5</text:p>
          </table:table-cell>
          <table:table-cell office:value-type="float" office:value="67.5" table:style-name="ce6">
            <text:p>67.5</text:p>
          </table:table-cell>
          <table:table-cell office:value-type="float" office:value="157.9" table:style-name="ce6">
            <text:p>157.9</text:p>
          </table:table-cell>
          <table:table-cell office:value-type="float" office:value="3.0550000000000002" table:style-name="ce6">
            <text:p>3.055</text:p>
          </table:table-cell>
          <table:table-cell office:value-type="date" office:date-value="2011-01-16T00:00:00" table:style-name="ce7">
            <text:p>1/16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ercedes-B</text:p>
          </table:table-cell>
          <table:table-cell office:value-type="string" table:style-name="ce5">
            <text:p>SLK230</text:p>
          </table:table-cell>
          <table:table-cell office:value-type="float" office:value="1526" table:style-name="ce11">
            <text:p>1526</text:p>
          </table:table-cell>
          <table:table-cell office:value-type="currency" office:value="41000" table:style-name="ce12">
            <text:p>$41,000</text:p>
          </table:table-cell>
          <table:table-cell office:value-type="currency" office:value="28635" table:style-name="ce12">
            <text:p>$28,635</text:p>
          </table:table-cell>
          <table:table-cell office:value-type="percentage" office:value="0.69841463414634142" table:formula="of:=SUM([.E97]/[.D97])" table:style-name="ce13">
            <text:p>70%</text:p>
          </table:table-cell>
          <table:table-cell office:value-type="string" office:string-value="GOOD" table:formula="of:=IF([.F97]&gt;69%; &quot;GOOD&quot;; &quot;POOR&quot;)" table:style-name="ce21">
            <text:p>GOOD</text:p>
          </table:table-cell>
          <table:table-cell office:value-type="float" office:value="2.2999999999999998" table:style-name="ce6">
            <text:p>2.3</text:p>
          </table:table-cell>
          <table:table-cell office:value-type="float" office:value="185" table:style-name="ce6">
            <text:p>185</text:p>
          </table:table-cell>
          <table:table-cell office:value-type="string" office:string-value="Medium HP" table:formula="of:=COM.MICROSOFT.IFS([.I97]&gt;299;&quot;High HP&quot;;[.I97]&gt;99;&quot;Medium HP&quot;;[.I9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81.848969240000002" table:style-name="ce6">
            <text:p>81.84896924</text:p>
          </table:table-cell>
          <table:table-cell office:value-type="float" office:value="14" table:style-name="ce6">
            <text:p>14</text:p>
          </table:table-cell>
          <table:table-cell office:value-type="float" office:value="94.5" table:style-name="ce6">
            <text:p>94.5</text:p>
          </table:table-cell>
          <table:table-cell office:value-type="float" office:value="67.5" table:style-name="ce6">
            <text:p>67.5</text:p>
          </table:table-cell>
          <table:table-cell office:value-type="float" office:value="157.30000000000001" table:style-name="ce6">
            <text:p>157.3</text:p>
          </table:table-cell>
          <table:table-cell office:value-type="float" office:value="2.9750000000000001" table:style-name="ce6">
            <text:p>2.975</text:p>
          </table:table-cell>
          <table:table-cell office:value-type="date" office:date-value="2011-08-06T00:00:00" table:style-name="ce7">
            <text:p>8/6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ercedes-B</text:p>
          </table:table-cell>
          <table:table-cell office:value-type="string" table:style-name="ce5">
            <text:p>CLK Coupe</text:p>
          </table:table-cell>
          <table:table-cell office:value-type="float" office:value="11592" table:style-name="ce11">
            <text:p>11592</text:p>
          </table:table-cell>
          <table:table-cell office:value-type="currency" office:value="41600" table:style-name="ce12">
            <text:p>$41,600</text:p>
          </table:table-cell>
          <table:table-cell office:value-type="currency" office:value="29200" table:style-name="ce12">
            <text:p>$29,200</text:p>
          </table:table-cell>
          <table:table-cell office:value-type="percentage" office:value="0.70192307692307687" table:formula="of:=SUM([.E98]/[.D98])" table:style-name="ce13">
            <text:p>70%</text:p>
          </table:table-cell>
          <table:table-cell office:value-type="string" office:string-value="GOOD" table:formula="of:=IF([.F98]&gt;69%; &quot;GOOD&quot;; &quot;POOR&quot;)" table:style-name="ce21">
            <text:p>GOOD</text:p>
          </table:table-cell>
          <table:table-cell office:value-type="float" office:value="3.2" table:style-name="ce6">
            <text:p>3.2</text:p>
          </table:table-cell>
          <table:table-cell office:value-type="float" office:value="215" table:style-name="ce6">
            <text:p>215</text:p>
          </table:table-cell>
          <table:table-cell office:value-type="string" office:string-value="Medium HP" table:formula="of:=COM.MICROSOFT.IFS([.I98]&gt;299;&quot;High HP&quot;;[.I98]&gt;99;&quot;Medium HP&quot;;[.I9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92.925791770000004" table:style-name="ce6">
            <text:p>92.92579177</text:p>
          </table:table-cell>
          <table:table-cell office:value-type="float" office:value="16.399999999999999" table:style-name="ce6">
            <text:p>16.4</text:p>
          </table:table-cell>
          <table:table-cell office:value-type="float" office:value="105.9" table:style-name="ce6">
            <text:p>105.9</text:p>
          </table:table-cell>
          <table:table-cell office:value-type="float" office:value="67.8" table:style-name="ce6">
            <text:p>67.8</text:p>
          </table:table-cell>
          <table:table-cell office:value-type="float" office:value="180.3" table:style-name="ce6">
            <text:p>180.3</text:p>
          </table:table-cell>
          <table:table-cell office:value-type="float" office:value="3.2130000000000001" table:style-name="ce6">
            <text:p>3.213</text:p>
          </table:table-cell>
          <table:table-cell office:value-type="date" office:date-value="2011-07-08T00:00:00" table:style-name="ce7">
            <text:p>7/8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ercedes-B</text:p>
          </table:table-cell>
          <table:table-cell office:value-type="string" table:style-name="ce5">
            <text:p>CL500</text:p>
          </table:table-cell>
          <table:table-cell office:value-type="float" office:value="954" table:style-name="ce11">
            <text:p>954</text:p>
          </table:table-cell>
          <table:table-cell office:value-type="currency" office:value="85500" table:style-name="ce12">
            <text:p>$85,500</text:p>
          </table:table-cell>
          <table:table-cell office:value-type="currency" office:value="63423" table:style-name="ce12">
            <text:p>$63,423</text:p>
          </table:table-cell>
          <table:table-cell office:value-type="percentage" office:value="0.74178947368421055" table:formula="of:=SUM([.E99]/[.D99])" table:style-name="ce13">
            <text:p>74%</text:p>
          </table:table-cell>
          <table:table-cell office:value-type="string" office:string-value="GOOD" table:formula="of:=IF([.F99]&gt;69%; &quot;GOOD&quot;; &quot;POOR&quot;)" table:style-name="ce21">
            <text:p>GOOD</text:p>
          </table:table-cell>
          <table:table-cell office:value-type="float" office:value="5" table:style-name="ce6">
            <text:p>5</text:p>
          </table:table-cell>
          <table:table-cell office:value-type="float" office:value="302" table:style-name="ce6">
            <text:p>302</text:p>
          </table:table-cell>
          <table:table-cell office:value-type="string" office:string-value="High HP" table:formula="of:=COM.MICROSOFT.IFS([.I99]&gt;299;&quot;High HP&quot;;[.I99]&gt;99;&quot;Medium HP&quot;;[.I99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Passenger</text:p>
          </table:table-cell>
          <table:table-cell office:value-type="float" office:value="20" table:style-name="ce6">
            <text:p>20</text:p>
          </table:table-cell>
          <table:table-cell office:value-type="float" office:value="141.10098450000001" table:style-name="ce6">
            <text:p>141.1009845</text:p>
          </table:table-cell>
          <table:table-cell office:value-type="float" office:value="23.2" table:style-name="ce6">
            <text:p>23.2</text:p>
          </table:table-cell>
          <table:table-cell office:value-type="float" office:value="113.6" table:style-name="ce6">
            <text:p>113.6</text:p>
          </table:table-cell>
          <table:table-cell office:value-type="float" office:value="73.099999999999994" table:style-name="ce6">
            <text:p>73.1</text:p>
          </table:table-cell>
          <table:table-cell office:value-type="float" office:value="196.6" table:style-name="ce6">
            <text:p>196.6</text:p>
          </table:table-cell>
          <table:table-cell office:value-type="float" office:value="4.1150000000000002" table:style-name="ce6">
            <text:p>4.115</text:p>
          </table:table-cell>
          <table:table-cell office:value-type="date" office:date-value="2011-04-11T00:00:00" table:style-name="ce7">
            <text:p>4/11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Mercedes-B</text:p>
          </table:table-cell>
          <table:table-cell office:value-type="string" table:style-name="ce5">
            <text:p>M-Class</text:p>
          </table:table-cell>
          <table:table-cell office:value-type="float" office:value="28976" table:style-name="ce11">
            <text:p>28976</text:p>
          </table:table-cell>
          <table:table-cell office:value-type="currency" office:value="35300" table:style-name="ce12">
            <text:p>$35,300</text:p>
          </table:table-cell>
          <table:table-cell office:value-type="currency" office:value="28720" table:style-name="ce12">
            <text:p>$28,720</text:p>
          </table:table-cell>
          <table:table-cell office:value-type="percentage" office:value="0.81359773371104815" table:formula="of:=SUM([.E100]/[.D100])" table:style-name="ce13">
            <text:p>81%</text:p>
          </table:table-cell>
          <table:table-cell office:value-type="string" office:string-value="GOOD" table:formula="of:=IF([.F100]&gt;69%; &quot;GOOD&quot;; &quot;POOR&quot;)" table:style-name="ce21">
            <text:p>GOOD</text:p>
          </table:table-cell>
          <table:table-cell office:value-type="float" office:value="3.2" table:style-name="ce6">
            <text:p>3.2</text:p>
          </table:table-cell>
          <table:table-cell office:value-type="float" office:value="215" table:style-name="ce6">
            <text:p>215</text:p>
          </table:table-cell>
          <table:table-cell office:value-type="string" office:string-value="Medium HP" table:formula="of:=COM.MICROSOFT.IFS([.I100]&gt;299;&quot;High HP&quot;;[.I100]&gt;99;&quot;Medium HP&quot;;[.I10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0" table:style-name="ce6">
            <text:p>20</text:p>
          </table:table-cell>
          <table:table-cell office:value-type="float" office:value="90.495532130000001" table:style-name="ce6">
            <text:p>90.49553213</text:p>
          </table:table-cell>
          <table:table-cell office:value-type="float" office:value="19" table:style-name="ce6">
            <text:p>19</text:p>
          </table:table-cell>
          <table:table-cell office:value-type="float" office:value="111" table:style-name="ce6">
            <text:p>111</text:p>
          </table:table-cell>
          <table:table-cell office:value-type="float" office:value="72.2" table:style-name="ce6">
            <text:p>72.2</text:p>
          </table:table-cell>
          <table:table-cell office:value-type="float" office:value="180.6" table:style-name="ce6">
            <text:p>180.6</text:p>
          </table:table-cell>
          <table:table-cell office:value-type="float" office:value="4.3869999999999996" table:style-name="ce6">
            <text:p>4.387</text:p>
          </table:table-cell>
          <table:table-cell office:value-type="date" office:date-value="2011-02-10T00:00:00" table:style-name="ce7">
            <text:p>2/10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Nissan</text:p>
          </table:table-cell>
          <table:table-cell office:value-type="string" table:style-name="ce5">
            <text:p>Sentra</text:p>
          </table:table-cell>
          <table:table-cell office:value-type="float" office:value="42643" table:style-name="ce11">
            <text:p>42643</text:p>
          </table:table-cell>
          <table:table-cell office:value-type="currency" office:value="13499" table:style-name="ce12">
            <text:p>$13,499</text:p>
          </table:table-cell>
          <table:table-cell office:value-type="currency" office:value="8450" table:style-name="ce12">
            <text:p>$8,450</text:p>
          </table:table-cell>
          <table:table-cell office:value-type="percentage" office:value="0.62597229424401812" table:formula="of:=SUM([.E101]/[.D101])" table:style-name="ce13">
            <text:p>63%</text:p>
          </table:table-cell>
          <table:table-cell office:value-type="string" office:string-value="POOR" table:formula="of:=IF([.F101]&gt;69%; &quot;GOOD&quot;; &quot;POOR&quot;)" table:style-name="ce21">
            <text:p>POOR</text:p>
          </table:table-cell>
          <table:table-cell office:value-type="float" office:value="1.8" table:style-name="ce6">
            <text:p>1.8</text:p>
          </table:table-cell>
          <table:table-cell office:value-type="float" office:value="126" table:style-name="ce6">
            <text:p>126</text:p>
          </table:table-cell>
          <table:table-cell office:value-type="string" office:string-value="Medium HP" table:formula="of:=COM.MICROSOFT.IFS([.I101]&gt;299;&quot;High HP&quot;;[.I101]&gt;99;&quot;Medium HP&quot;;[.I10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0" table:style-name="ce6">
            <text:p>30</text:p>
          </table:table-cell>
          <table:table-cell office:value-type="float" office:value="50.241977910000003" table:style-name="ce6">
            <text:p>50.24197791</text:p>
          </table:table-cell>
          <table:table-cell office:value-type="float" office:value="13.2" table:style-name="ce6">
            <text:p>13.2</text:p>
          </table:table-cell>
          <table:table-cell office:value-type="float" office:value="99.8" table:style-name="ce6">
            <text:p>99.8</text:p>
          </table:table-cell>
          <table:table-cell office:value-type="float" office:value="67.3" table:style-name="ce6">
            <text:p>67.3</text:p>
          </table:table-cell>
          <table:table-cell office:value-type="float" office:value="177.5" table:style-name="ce6">
            <text:p>177.5</text:p>
          </table:table-cell>
          <table:table-cell office:value-type="float" office:value="2.593" table:style-name="ce6">
            <text:p>2.593</text:p>
          </table:table-cell>
          <table:table-cell office:value-type="date" office:date-value="2011-08-31T00:00:00" table:style-name="ce7">
            <text:p>8/31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Nissan</text:p>
          </table:table-cell>
          <table:table-cell office:value-type="string" table:style-name="ce5">
            <text:p>Altima</text:p>
          </table:table-cell>
          <table:table-cell office:value-type="float" office:value="88094" table:style-name="ce11">
            <text:p>88094</text:p>
          </table:table-cell>
          <table:table-cell office:value-type="currency" office:value="20390" table:style-name="ce12">
            <text:p>$20,390</text:p>
          </table:table-cell>
          <table:table-cell office:value-type="currency" office:value="11295" table:style-name="ce12">
            <text:p>$11,295</text:p>
          </table:table-cell>
          <table:table-cell office:value-type="percentage" office:value="0.55394801373222169" table:formula="of:=SUM([.E102]/[.D102])" table:style-name="ce13">
            <text:p>55%</text:p>
          </table:table-cell>
          <table:table-cell office:value-type="string" office:string-value="POOR" table:formula="of:=IF([.F102]&gt;69%; &quot;GOOD&quot;; &quot;POOR&quot;)" table:style-name="ce21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55" table:style-name="ce6">
            <text:p>155</text:p>
          </table:table-cell>
          <table:table-cell office:value-type="string" office:string-value="Medium HP" table:formula="of:=COM.MICROSOFT.IFS([.I102]&gt;299;&quot;High HP&quot;;[.I102]&gt;99;&quot;Medium HP&quot;;[.I10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63.313727829999998" table:style-name="ce6">
            <text:p>63.31372783</text:p>
          </table:table-cell>
          <table:table-cell office:value-type="float" office:value="15.9" table:style-name="ce6">
            <text:p>15.9</text:p>
          </table:table-cell>
          <table:table-cell office:value-type="float" office:value="103.1" table:style-name="ce6">
            <text:p>103.1</text:p>
          </table:table-cell>
          <table:table-cell office:value-type="float" office:value="69.099999999999994" table:style-name="ce6">
            <text:p>69.1</text:p>
          </table:table-cell>
          <table:table-cell office:value-type="float" office:value="183.5" table:style-name="ce6">
            <text:p>183.5</text:p>
          </table:table-cell>
          <table:table-cell office:value-type="float" office:value="3.012" table:style-name="ce6">
            <text:p>3.012</text:p>
          </table:table-cell>
          <table:table-cell office:value-type="date" office:date-value="2011-08-02T00:00:00" table:style-name="ce7">
            <text:p>8/2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Nissan</text:p>
          </table:table-cell>
          <table:table-cell office:value-type="string" table:style-name="ce5">
            <text:p>Maxima</text:p>
          </table:table-cell>
          <table:table-cell office:value-type="float" office:value="79853" table:style-name="ce11">
            <text:p>79853</text:p>
          </table:table-cell>
          <table:table-cell office:value-type="currency" office:value="26249" table:style-name="ce12">
            <text:p>$26,249</text:p>
          </table:table-cell>
          <table:table-cell office:value-type="currency" office:value="15125" table:style-name="ce12">
            <text:p>$15,125</text:p>
          </table:table-cell>
          <table:table-cell office:value-type="percentage" office:value="0.57621242714008147" table:formula="of:=SUM([.E103]/[.D103])" table:style-name="ce13">
            <text:p>58%</text:p>
          </table:table-cell>
          <table:table-cell office:value-type="string" office:string-value="POOR" table:formula="of:=IF([.F103]&gt;69%; &quot;GOOD&quot;; &quot;POOR&quot;)" table:style-name="ce21">
            <text:p>POOR</text:p>
          </table:table-cell>
          <table:table-cell office:value-type="float" office:value="3" table:style-name="ce6">
            <text:p>3</text:p>
          </table:table-cell>
          <table:table-cell office:value-type="float" office:value="222" table:style-name="ce6">
            <text:p>222</text:p>
          </table:table-cell>
          <table:table-cell office:value-type="string" office:string-value="Medium HP" table:formula="of:=COM.MICROSOFT.IFS([.I103]&gt;299;&quot;High HP&quot;;[.I103]&gt;99;&quot;Medium HP&quot;;[.I10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89.427820310000001" table:style-name="ce6">
            <text:p>89.42782031</text:p>
          </table:table-cell>
          <table:table-cell office:value-type="float" office:value="18.5" table:style-name="ce6">
            <text:p>18.5</text:p>
          </table:table-cell>
          <table:table-cell office:value-type="float" office:value="108.3" table:style-name="ce6">
            <text:p>108.3</text:p>
          </table:table-cell>
          <table:table-cell office:value-type="float" office:value="70.3" table:style-name="ce6">
            <text:p>70.3</text:p>
          </table:table-cell>
          <table:table-cell office:value-type="float" office:value="190.5" table:style-name="ce6">
            <text:p>190.5</text:p>
          </table:table-cell>
          <table:table-cell office:value-type="float" office:value="3.294" table:style-name="ce6">
            <text:p>3.294</text:p>
          </table:table-cell>
          <table:table-cell office:value-type="date" office:date-value="2011-05-06T00:00:00" table:style-name="ce7">
            <text:p>5/6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Nissan</text:p>
          </table:table-cell>
          <table:table-cell office:value-type="string" table:style-name="ce5">
            <text:p>Quest</text:p>
          </table:table-cell>
          <table:table-cell office:value-type="float" office:value="27308" table:style-name="ce11">
            <text:p>27308</text:p>
          </table:table-cell>
          <table:table-cell office:value-type="currency" office:value="26399" table:style-name="ce12">
            <text:p>$26,399</text:p>
          </table:table-cell>
          <table:table-cell office:value-type="currency" office:value="15380" table:style-name="ce12">
            <text:p>$15,380</text:p>
          </table:table-cell>
          <table:table-cell office:value-type="percentage" office:value="0.58259782567521501" table:formula="of:=SUM([.E104]/[.D104])" table:style-name="ce13">
            <text:p>58%</text:p>
          </table:table-cell>
          <table:table-cell office:value-type="string" office:string-value="POOR" table:formula="of:=IF([.F104]&gt;69%; &quot;GOOD&quot;; &quot;POOR&quot;)" table:style-name="ce21">
            <text:p>POOR</text:p>
          </table:table-cell>
          <table:table-cell office:value-type="float" office:value="3.3" table:style-name="ce6">
            <text:p>3.3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104]&gt;299;&quot;High HP&quot;;[.I104]&gt;99;&quot;Medium HP&quot;;[.I10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1" table:style-name="ce6">
            <text:p>21</text:p>
          </table:table-cell>
          <table:table-cell office:value-type="float" office:value="71.171664129999996" table:style-name="ce6">
            <text:p>71.17166413</text:p>
          </table:table-cell>
          <table:table-cell office:value-type="float" office:value="20" table:style-name="ce6">
            <text:p>20</text:p>
          </table:table-cell>
          <table:table-cell office:value-type="float" office:value="112.2" table:style-name="ce6">
            <text:p>112.2</text:p>
          </table:table-cell>
          <table:table-cell office:value-type="float" office:value="74.900000000000006" table:style-name="ce6">
            <text:p>74.9</text:p>
          </table:table-cell>
          <table:table-cell office:value-type="float" office:value="194.8" table:style-name="ce6">
            <text:p>194.8</text:p>
          </table:table-cell>
          <table:table-cell office:value-type="float" office:value="3.9910000000000001" table:style-name="ce6">
            <text:p>3.991</text:p>
          </table:table-cell>
          <table:table-cell office:value-type="date" office:date-value="2011-03-07T00:00:00" table:style-name="ce7">
            <text:p>3/7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Nissan</text:p>
          </table:table-cell>
          <table:table-cell office:value-type="string" table:style-name="ce5">
            <text:p>Pathfinder</text:p>
          </table:table-cell>
          <table:table-cell office:value-type="float" office:value="42574" table:style-name="ce11">
            <text:p>42574</text:p>
          </table:table-cell>
          <table:table-cell office:value-type="currency" office:value="29299" table:style-name="ce12">
            <text:p>$29,299</text:p>
          </table:table-cell>
          <table:table-cell office:value-type="currency" office:value="17810" table:style-name="ce12">
            <text:p>$17,810</text:p>
          </table:table-cell>
          <table:table-cell office:value-type="percentage" office:value="0.60787057578756953" table:formula="of:=SUM([.E105]/[.D105])" table:style-name="ce13">
            <text:p>61%</text:p>
          </table:table-cell>
          <table:table-cell office:value-type="string" office:string-value="POOR" table:formula="of:=IF([.F105]&gt;69%; &quot;GOOD&quot;; &quot;POOR&quot;)" table:style-name="ce21">
            <text:p>POOR</text:p>
          </table:table-cell>
          <table:table-cell office:value-type="float" office:value="3.3" table:style-name="ce6">
            <text:p>3.3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105]&gt;299;&quot;High HP&quot;;[.I105]&gt;99;&quot;Medium HP&quot;;[.I10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9" table:style-name="ce6">
            <text:p>19</text:p>
          </table:table-cell>
          <table:table-cell office:value-type="float" office:value="72.290355079999998" table:style-name="ce6">
            <text:p>72.29035508</text:p>
          </table:table-cell>
          <table:table-cell office:value-type="float" office:value="21" table:style-name="ce6">
            <text:p>21</text:p>
          </table:table-cell>
          <table:table-cell office:value-type="float" office:value="106.3" table:style-name="ce6">
            <text:p>106.3</text:p>
          </table:table-cell>
          <table:table-cell office:value-type="float" office:value="71.7" table:style-name="ce6">
            <text:p>71.7</text:p>
          </table:table-cell>
          <table:table-cell office:value-type="float" office:value="182.6" table:style-name="ce6">
            <text:p>182.6</text:p>
          </table:table-cell>
          <table:table-cell office:value-type="float" office:value="3.9470000000000001" table:style-name="ce6">
            <text:p>3.947</text:p>
          </table:table-cell>
          <table:table-cell office:value-type="date" office:date-value="2011-09-25T00:00:00" table:style-name="ce7">
            <text:p>9/25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Nissan</text:p>
          </table:table-cell>
          <table:table-cell office:value-type="string" table:style-name="ce5">
            <text:p>Xterra</text:p>
          </table:table-cell>
          <table:table-cell office:value-type="float" office:value="54158" table:style-name="ce11">
            <text:p>54158</text:p>
          </table:table-cell>
          <table:table-cell office:value-type="currency" office:value="22799" table:style-name="ce12">
            <text:p>$22,799</text:p>
          </table:table-cell>
          <table:table-cell office:value-type="currency" office:value="13093" table:style-name="ce12">
            <text:p>$13,093</text:p>
          </table:table-cell>
          <table:table-cell office:value-type="percentage" office:value="0.57427957366551163" table:formula="of:=SUM([.E106]/[.D106])" table:style-name="ce13">
            <text:p>57%</text:p>
          </table:table-cell>
          <table:table-cell office:value-type="string" office:string-value="POOR" table:formula="of:=IF([.F106]&gt;69%; &quot;GOOD&quot;; &quot;POOR&quot;)" table:style-name="ce21">
            <text:p>POOR</text:p>
          </table:table-cell>
          <table:table-cell office:value-type="float" office:value="3.3" table:style-name="ce6">
            <text:p>3.3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106]&gt;299;&quot;High HP&quot;;[.I106]&gt;99;&quot;Medium HP&quot;;[.I10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8" table:style-name="ce6">
            <text:p>18</text:p>
          </table:table-cell>
          <table:table-cell office:value-type="float" office:value="69.78294434" table:style-name="ce6">
            <text:p>69.78294434</text:p>
          </table:table-cell>
          <table:table-cell office:value-type="float" office:value="19.399999999999999" table:style-name="ce6">
            <text:p>19.4</text:p>
          </table:table-cell>
          <table:table-cell office:value-type="float" office:value="104.3" table:style-name="ce6">
            <text:p>104.3</text:p>
          </table:table-cell>
          <table:table-cell office:value-type="float" office:value="70.400000000000006" table:style-name="ce6">
            <text:p>70.4</text:p>
          </table:table-cell>
          <table:table-cell office:value-type="float" office:value="178" table:style-name="ce6">
            <text:p>178</text:p>
          </table:table-cell>
          <table:table-cell office:value-type="float" office:value="3.8210000000000002" table:style-name="ce6">
            <text:p>3.821</text:p>
          </table:table-cell>
          <table:table-cell office:value-type="date" office:date-value="2011-01-24T00:00:00" table:style-name="ce7">
            <text:p>1/24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Nissan</text:p>
          </table:table-cell>
          <table:table-cell office:value-type="string" table:style-name="ce5">
            <text:p>Frontier</text:p>
          </table:table-cell>
          <table:table-cell office:value-type="float" office:value="65004.999999999993" table:style-name="ce11">
            <text:p>65005</text:p>
          </table:table-cell>
          <table:table-cell office:value-type="currency" office:value="17890" table:style-name="ce12">
            <text:p>$17,890</text:p>
          </table:table-cell>
          <table:table-cell office:value-type="currency" office:value="10670" table:style-name="ce12">
            <text:p>$10,670</text:p>
          </table:table-cell>
          <table:table-cell office:value-type="percentage" office:value="0.59642258244829516" table:formula="of:=SUM([.E107]/[.D107])" table:style-name="ce13">
            <text:p>60%</text:p>
          </table:table-cell>
          <table:table-cell office:value-type="string" office:string-value="POOR" table:formula="of:=IF([.F107]&gt;69%; &quot;GOOD&quot;; &quot;POOR&quot;)" table:style-name="ce21">
            <text:p>POOR</text:p>
          </table:table-cell>
          <table:table-cell office:value-type="float" office:value="3.3" table:style-name="ce6">
            <text:p>3.3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107]&gt;299;&quot;High HP&quot;;[.I107]&gt;99;&quot;Medium HP&quot;;[.I10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8" table:style-name="ce6">
            <text:p>18</text:p>
          </table:table-cell>
          <table:table-cell office:value-type="float" office:value="67.889270589999995" table:style-name="ce6">
            <text:p>67.88927059</text:p>
          </table:table-cell>
          <table:table-cell office:value-type="float" office:value="19.399999999999999" table:style-name="ce6">
            <text:p>19.4</text:p>
          </table:table-cell>
          <table:table-cell office:value-type="float" office:value="116.1" table:style-name="ce6">
            <text:p>116.1</text:p>
          </table:table-cell>
          <table:table-cell office:value-type="float" office:value="66.5" table:style-name="ce6">
            <text:p>66.5</text:p>
          </table:table-cell>
          <table:table-cell office:value-type="float" office:value="196.1" table:style-name="ce6">
            <text:p>196.1</text:p>
          </table:table-cell>
          <table:table-cell office:value-type="float" office:value="3.2170000000000001" table:style-name="ce6">
            <text:p>3.217</text:p>
          </table:table-cell>
          <table:table-cell office:value-type="date" office:date-value="2011-08-27T00:00:00" table:style-name="ce7">
            <text:p>8/27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Oldsmobile</text:p>
          </table:table-cell>
          <table:table-cell office:value-type="string" table:style-name="ce5">
            <text:p>Cutlass</text:p>
          </table:table-cell>
          <table:table-cell office:value-type="float" office:value="1112" table:style-name="ce11">
            <text:p>1112</text:p>
          </table:table-cell>
          <table:table-cell office:value-type="currency" office:value="18145" table:style-name="ce12">
            <text:p>$18,145</text:p>
          </table:table-cell>
          <table:table-cell office:value-type="currency" office:value="11240" table:style-name="ce12">
            <text:p>$11,240</text:p>
          </table:table-cell>
          <table:table-cell office:value-type="percentage" office:value="0.61945439515017908" table:formula="of:=SUM([.E108]/[.D108])" table:style-name="ce13">
            <text:p>62%</text:p>
          </table:table-cell>
          <table:table-cell office:value-type="string" office:string-value="POOR" table:formula="of:=IF([.F108]&gt;69%; &quot;GOOD&quot;; &quot;POOR&quot;)" table:style-name="ce21">
            <text:p>POOR</text:p>
          </table:table-cell>
          <table:table-cell office:value-type="float" office:value="3.1" table:style-name="ce6">
            <text:p>3.1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108]&gt;299;&quot;High HP&quot;;[.I108]&gt;99;&quot;Medium HP&quot;;[.I10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60.861611549999999" table:style-name="ce6">
            <text:p>60.86161155</text:p>
          </table:table-cell>
          <table:table-cell office:value-type="float" office:value="15.2" table:style-name="ce6">
            <text:p>15.2</text:p>
          </table:table-cell>
          <table:table-cell office:value-type="float" office:value="107" table:style-name="ce6">
            <text:p>107</text:p>
          </table:table-cell>
          <table:table-cell office:value-type="float" office:value="69.400000000000006" table:style-name="ce6">
            <text:p>69.4</text:p>
          </table:table-cell>
          <table:table-cell office:value-type="float" office:value="192" table:style-name="ce6">
            <text:p>192</text:p>
          </table:table-cell>
          <table:table-cell office:value-type="float" office:value="3.1019999999999999" table:style-name="ce6">
            <text:p>3.102</text:p>
          </table:table-cell>
          <table:table-cell office:value-type="date" office:date-value="2011-05-31T00:00:00" table:style-name="ce7">
            <text:p>5/31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Oldsmobile</text:p>
          </table:table-cell>
          <table:table-cell office:value-type="string" table:style-name="ce5">
            <text:p>Intrigue</text:p>
          </table:table-cell>
          <table:table-cell office:value-type="float" office:value="38554" table:style-name="ce11">
            <text:p>38554</text:p>
          </table:table-cell>
          <table:table-cell office:value-type="currency" office:value="24150" table:style-name="ce12">
            <text:p>$24,150</text:p>
          </table:table-cell>
          <table:table-cell office:value-type="currency" office:value="17100" table:style-name="ce12">
            <text:p>$17,100</text:p>
          </table:table-cell>
          <table:table-cell office:value-type="percentage" office:value="0.70807453416149069" table:formula="of:=SUM([.E109]/[.D109])" table:style-name="ce13">
            <text:p>71%</text:p>
          </table:table-cell>
          <table:table-cell office:value-type="string" office:string-value="GOOD" table:formula="of:=IF([.F109]&gt;69%; &quot;GOOD&quot;; &quot;POOR&quot;)" table:style-name="ce21">
            <text:p>GOOD</text:p>
          </table:table-cell>
          <table:table-cell office:value-type="float" office:value="3.5" table:style-name="ce6">
            <text:p>3.5</text:p>
          </table:table-cell>
          <table:table-cell office:value-type="float" office:value="215" table:style-name="ce6">
            <text:p>215</text:p>
          </table:table-cell>
          <table:table-cell office:value-type="string" office:string-value="Medium HP" table:formula="of:=COM.MICROSOFT.IFS([.I109]&gt;299;&quot;High HP&quot;;[.I109]&gt;99;&quot;Medium HP&quot;;[.I10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86.272522910000006" table:style-name="ce6">
            <text:p>86.27252291</text:p>
          </table:table-cell>
          <table:table-cell office:value-type="float" office:value="18" table:style-name="ce6">
            <text:p>18</text:p>
          </table:table-cell>
          <table:table-cell office:value-type="float" office:value="109" table:style-name="ce6">
            <text:p>109</text:p>
          </table:table-cell>
          <table:table-cell office:value-type="float" office:value="73.599999999999994" table:style-name="ce6">
            <text:p>73.6</text:p>
          </table:table-cell>
          <table:table-cell office:value-type="float" office:value="195.9" table:style-name="ce6">
            <text:p>195.9</text:p>
          </table:table-cell>
          <table:table-cell office:value-type="float" office:value="3.4550000000000001" table:style-name="ce6">
            <text:p>3.455</text:p>
          </table:table-cell>
          <table:table-cell office:value-type="date" office:date-value="2011-04-01T00:00:00" table:style-name="ce7">
            <text:p>4/1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Oldsmobile</text:p>
          </table:table-cell>
          <table:table-cell office:value-type="string" table:style-name="ce5">
            <text:p>Alero</text:p>
          </table:table-cell>
          <table:table-cell office:value-type="float" office:value="80255" table:style-name="ce11">
            <text:p>80255</text:p>
          </table:table-cell>
          <table:table-cell office:value-type="currency" office:value="18270" table:style-name="ce12">
            <text:p>$18,270</text:p>
          </table:table-cell>
          <table:table-cell office:value-type="currency" office:value="11459" table:style-name="ce12">
            <text:p>$11,459</text:p>
          </table:table-cell>
          <table:table-cell office:value-type="percentage" office:value="0.62720306513409962" table:formula="of:=SUM([.E110]/[.D110])" table:style-name="ce13">
            <text:p>63%</text:p>
          </table:table-cell>
          <table:table-cell office:value-type="string" office:string-value="POOR" table:formula="of:=IF([.F110]&gt;69%; &quot;GOOD&quot;; &quot;POOR&quot;)" table:style-name="ce21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110]&gt;299;&quot;High HP&quot;;[.I110]&gt;99;&quot;Medium HP&quot;;[.I11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60.727446929999999" table:style-name="ce6">
            <text:p>60.72744693</text:p>
          </table:table-cell>
          <table:table-cell office:value-type="float" office:value="15" table:style-name="ce6">
            <text:p>15</text:p>
          </table:table-cell>
          <table:table-cell office:value-type="float" office:value="107" table:style-name="ce6">
            <text:p>107</text:p>
          </table:table-cell>
          <table:table-cell office:value-type="float" office:value="70.099999999999994" table:style-name="ce6">
            <text:p>70.1</text:p>
          </table:table-cell>
          <table:table-cell office:value-type="float" office:value="186.7" table:style-name="ce6">
            <text:p>186.7</text:p>
          </table:table-cell>
          <table:table-cell office:value-type="float" office:value="2.9580000000000002" table:style-name="ce6">
            <text:p>2.958</text:p>
          </table:table-cell>
          <table:table-cell office:value-type="date" office:date-value="2009-10-20T00:00:00" table:style-name="ce7">
            <text:p>10/20/2009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Oldsmobile</text:p>
          </table:table-cell>
          <table:table-cell office:value-type="string" table:style-name="ce5">
            <text:p>Aurora</text:p>
          </table:table-cell>
          <table:table-cell office:value-type="float" office:value="14690" table:style-name="ce11">
            <text:p>14690</text:p>
          </table:table-cell>
          <table:table-cell office:value-type="currency" office:value="36229" table:style-name="ce12">
            <text:p>$36,229</text:p>
          </table:table-cell>
          <table:table-cell office:value-type="currency" office:value="19890" table:style-name="ce12">
            <text:p>$19,890</text:p>
          </table:table-cell>
          <table:table-cell office:value-type="percentage" office:value="0.54900770101300067" table:formula="of:=SUM([.E111]/[.D111])" table:style-name="ce13">
            <text:p>55%</text:p>
          </table:table-cell>
          <table:table-cell office:value-type="string" office:string-value="POOR" table:formula="of:=IF([.F111]&gt;69%; &quot;GOOD&quot;; &quot;POOR&quot;)" table:style-name="ce21">
            <text:p>POOR</text:p>
          </table:table-cell>
          <table:table-cell office:value-type="float" office:value="4" table:style-name="ce6">
            <text:p>4</text:p>
          </table:table-cell>
          <table:table-cell office:value-type="float" office:value="250" table:style-name="ce6">
            <text:p>250</text:p>
          </table:table-cell>
          <table:table-cell office:value-type="string" office:string-value="Medium HP" table:formula="of:=COM.MICROSOFT.IFS([.I111]&gt;299;&quot;High HP&quot;;[.I111]&gt;99;&quot;Medium HP&quot;;[.I11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103.4416926" table:style-name="ce6">
            <text:p>103.4416926</text:p>
          </table:table-cell>
          <table:table-cell office:value-type="float" office:value="18.5" table:style-name="ce6">
            <text:p>18.5</text:p>
          </table:table-cell>
          <table:table-cell office:value-type="float" office:value="113.8" table:style-name="ce6">
            <text:p>113.8</text:p>
          </table:table-cell>
          <table:table-cell office:value-type="float" office:value="74.400000000000006" table:style-name="ce6">
            <text:p>74.4</text:p>
          </table:table-cell>
          <table:table-cell office:value-type="float" office:value="205.4" table:style-name="ce6">
            <text:p>205.4</text:p>
          </table:table-cell>
          <table:table-cell office:value-type="float" office:value="3.9670000000000001" table:style-name="ce6">
            <text:p>3.967</text:p>
          </table:table-cell>
          <table:table-cell office:value-type="date" office:date-value="2011-02-18T00:00:00" table:style-name="ce7">
            <text:p>2/18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Oldsmobile</text:p>
          </table:table-cell>
          <table:table-cell office:value-type="string" table:style-name="ce5">
            <text:p>Bravada</text:p>
          </table:table-cell>
          <table:table-cell office:value-type="float" office:value="20017" table:style-name="ce11">
            <text:p>20017</text:p>
          </table:table-cell>
          <table:table-cell office:value-type="currency" office:value="31598" table:style-name="ce12">
            <text:p>$31,598</text:p>
          </table:table-cell>
          <table:table-cell office:value-type="currency" office:value="19925" table:style-name="ce12">
            <text:p>$19,925</text:p>
          </table:table-cell>
          <table:table-cell office:value-type="percentage" office:value="0.63057788467624531" table:formula="of:=SUM([.E112]/[.D112])" table:style-name="ce13">
            <text:p>63%</text:p>
          </table:table-cell>
          <table:table-cell office:value-type="string" office:string-value="POOR" table:formula="of:=IF([.F112]&gt;69%; &quot;GOOD&quot;; &quot;POOR&quot;)" table:style-name="ce21">
            <text:p>POOR</text:p>
          </table:table-cell>
          <table:table-cell office:value-type="float" office:value="4.3" table:style-name="ce6">
            <text:p>4.3</text:p>
          </table:table-cell>
          <table:table-cell office:value-type="float" office:value="190" table:style-name="ce6">
            <text:p>190</text:p>
          </table:table-cell>
          <table:table-cell office:value-type="string" office:string-value="Medium HP" table:formula="of:=COM.MICROSOFT.IFS([.I112]&gt;299;&quot;High HP&quot;;[.I112]&gt;99;&quot;Medium HP&quot;;[.I11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9" table:style-name="ce6">
            <text:p>19</text:p>
          </table:table-cell>
          <table:table-cell office:value-type="float" office:value="80.511672590000003" table:style-name="ce6">
            <text:p>80.51167259</text:p>
          </table:table-cell>
          <table:table-cell office:value-type="float" office:value="17.5" table:style-name="ce6">
            <text:p>17.5</text:p>
          </table:table-cell>
          <table:table-cell office:value-type="float" office:value="107" table:style-name="ce6">
            <text:p>107</text:p>
          </table:table-cell>
          <table:table-cell office:value-type="float" office:value="67.8" table:style-name="ce6">
            <text:p>67.8</text:p>
          </table:table-cell>
          <table:table-cell office:value-type="float" office:value="181.2" table:style-name="ce6">
            <text:p>181.2</text:p>
          </table:table-cell>
          <table:table-cell office:value-type="float" office:value="4.0679999999999996" table:style-name="ce6">
            <text:p>4.068</text:p>
          </table:table-cell>
          <table:table-cell office:value-type="date" office:date-value="2011-09-21T00:00:00" table:style-name="ce7">
            <text:p>9/21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Oldsmobile</text:p>
          </table:table-cell>
          <table:table-cell office:value-type="string" table:style-name="ce5">
            <text:p>Silhouette</text:p>
          </table:table-cell>
          <table:table-cell office:value-type="float" office:value="24361" table:style-name="ce11">
            <text:p>24361</text:p>
          </table:table-cell>
          <table:table-cell office:value-type="currency" office:value="25345" table:style-name="ce12">
            <text:p>$25,345</text:p>
          </table:table-cell>
          <table:table-cell office:value-type="currency" office:value="15240" table:style-name="ce12">
            <text:p>$15,240</text:p>
          </table:table-cell>
          <table:table-cell office:value-type="percentage" office:value="0.60130203195896625" table:formula="of:=SUM([.E113]/[.D113])" table:style-name="ce13">
            <text:p>60%</text:p>
          </table:table-cell>
          <table:table-cell office:value-type="string" office:string-value="POOR" table:formula="of:=IF([.F113]&gt;69%; &quot;GOOD&quot;; &quot;POOR&quot;)" table:style-name="ce21">
            <text:p>POOR</text:p>
          </table:table-cell>
          <table:table-cell office:value-type="float" office:value="3.4" table:style-name="ce6">
            <text:p>3.4</text:p>
          </table:table-cell>
          <table:table-cell office:value-type="float" office:value="185" table:style-name="ce6">
            <text:p>185</text:p>
          </table:table-cell>
          <table:table-cell office:value-type="string" office:string-value="Medium HP" table:formula="of:=COM.MICROSOFT.IFS([.I113]&gt;299;&quot;High HP&quot;;[.I113]&gt;99;&quot;Medium HP&quot;;[.I11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2" table:style-name="ce6">
            <text:p>22</text:p>
          </table:table-cell>
          <table:table-cell office:value-type="float" office:value="76.096570420000006" table:style-name="ce6">
            <text:p>76.09657042</text:p>
          </table:table-cell>
          <table:table-cell office:value-type="float" office:value="25" table:style-name="ce6">
            <text:p>25</text:p>
          </table:table-cell>
          <table:table-cell office:value-type="float" office:value="120" table:style-name="ce6">
            <text:p>120</text:p>
          </table:table-cell>
          <table:table-cell office:value-type="float" office:value="72.2" table:style-name="ce6">
            <text:p>72.2</text:p>
          </table:table-cell>
          <table:table-cell office:value-type="float" office:value="201.4" table:style-name="ce6">
            <text:p>201.4</text:p>
          </table:table-cell>
          <table:table-cell office:value-type="float" office:value="3.948" table:style-name="ce6">
            <text:p>3.948</text:p>
          </table:table-cell>
          <table:table-cell office:value-type="date" office:date-value="2011-06-25T00:00:00" table:style-name="ce7">
            <text:p>6/25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Plymouth</text:p>
          </table:table-cell>
          <table:table-cell office:value-type="string" table:style-name="ce5">
            <text:p>Neon</text:p>
          </table:table-cell>
          <table:table-cell office:value-type="float" office:value="32734" table:style-name="ce11">
            <text:p>32734</text:p>
          </table:table-cell>
          <table:table-cell office:value-type="currency" office:value="12640" table:style-name="ce12">
            <text:p>$12,640</text:p>
          </table:table-cell>
          <table:table-cell office:value-type="currency" office:value="7750" table:style-name="ce12">
            <text:p>$7,750</text:p>
          </table:table-cell>
          <table:table-cell office:value-type="percentage" office:value="0.61313291139240511" table:formula="of:=SUM([.E114]/[.D114])" table:style-name="ce13">
            <text:p>61%</text:p>
          </table:table-cell>
          <table:table-cell office:value-type="string" office:string-value="POOR" table:formula="of:=IF([.F114]&gt;69%; &quot;GOOD&quot;; &quot;POOR&quot;)" table:style-name="ce21">
            <text:p>POOR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6">
            <text:p>132</text:p>
          </table:table-cell>
          <table:table-cell office:value-type="string" office:string-value="Medium HP" table:formula="of:=COM.MICROSOFT.IFS([.I114]&gt;299;&quot;High HP&quot;;[.I114]&gt;99;&quot;Medium HP&quot;;[.I11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9" table:style-name="ce6">
            <text:p>29</text:p>
          </table:table-cell>
          <table:table-cell office:value-type="float" office:value="52.084898750000001" table:style-name="ce6">
            <text:p>52.08489875</text:p>
          </table:table-cell>
          <table:table-cell office:value-type="float" office:value="12.5" table:style-name="ce6">
            <text:p>12.5</text:p>
          </table:table-cell>
          <table:table-cell office:value-type="float" office:value="105" table:style-name="ce6">
            <text:p>105</text:p>
          </table:table-cell>
          <table:table-cell office:value-type="float" office:value="74.400000000000006" table:style-name="ce6">
            <text:p>74.4</text:p>
          </table:table-cell>
          <table:table-cell office:value-type="float" office:value="174.4" table:style-name="ce6">
            <text:p>174.4</text:p>
          </table:table-cell>
          <table:table-cell office:value-type="float" office:value="2.5590000000000002" table:style-name="ce6">
            <text:p>2.559</text:p>
          </table:table-cell>
          <table:table-cell office:value-type="date" office:date-value="2011-04-26T00:00:00" table:style-name="ce7">
            <text:p>4/26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Plymouth</text:p>
          </table:table-cell>
          <table:table-cell office:value-type="string" table:style-name="ce5">
            <text:p>Breeze</text:p>
          </table:table-cell>
          <table:table-cell office:value-type="float" office:value="5240" table:style-name="ce11">
            <text:p>5240</text:p>
          </table:table-cell>
          <table:table-cell office:value-type="currency" office:value="16079.999999999998" table:style-name="ce12">
            <text:p>$16,080</text:p>
          </table:table-cell>
          <table:table-cell office:value-type="currency" office:value="9800" table:style-name="ce12">
            <text:p>$9,800</text:p>
          </table:table-cell>
          <table:table-cell office:value-type="percentage" office:value="0.60945273631840802" table:formula="of:=SUM([.E115]/[.D115])" table:style-name="ce13">
            <text:p>61%</text:p>
          </table:table-cell>
          <table:table-cell office:value-type="string" office:string-value="POOR" table:formula="of:=IF([.F115]&gt;69%; &quot;GOOD&quot;; &quot;POOR&quot;)" table:style-name="ce21">
            <text:p>POOR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6">
            <text:p>132</text:p>
          </table:table-cell>
          <table:table-cell office:value-type="string" office:string-value="Medium HP" table:formula="of:=COM.MICROSOFT.IFS([.I115]&gt;299;&quot;High HP&quot;;[.I115]&gt;99;&quot;Medium HP&quot;;[.I11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53.411897670000002" table:style-name="ce6">
            <text:p>53.41189767</text:p>
          </table:table-cell>
          <table:table-cell office:value-type="float" office:value="16" table:style-name="ce6">
            <text:p>16</text:p>
          </table:table-cell>
          <table:table-cell office:value-type="float" office:value="108" table:style-name="ce6">
            <text:p>108</text:p>
          </table:table-cell>
          <table:table-cell office:value-type="float" office:value="71" table:style-name="ce6">
            <text:p>71</text:p>
          </table:table-cell>
          <table:table-cell office:value-type="float" office:value="186.3" table:style-name="ce6">
            <text:p>186.3</text:p>
          </table:table-cell>
          <table:table-cell office:value-type="float" office:value="2.9420000000000002" table:style-name="ce6">
            <text:p>2.942</text:p>
          </table:table-cell>
          <table:table-cell office:value-type="date" office:date-value="2011-11-14T00:00:00" table:style-name="ce7">
            <text:p>11/14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Plymouth</text:p>
          </table:table-cell>
          <table:table-cell office:value-type="string" table:style-name="ce5">
            <text:p>Voyager</text:p>
          </table:table-cell>
          <table:table-cell office:value-type="float" office:value="24155" table:style-name="ce11">
            <text:p>24155</text:p>
          </table:table-cell>
          <table:table-cell office:value-type="currency" office:value="18850" table:style-name="ce12">
            <text:p>$18,850</text:p>
          </table:table-cell>
          <table:table-cell office:value-type="currency" office:value="12025" table:style-name="ce12">
            <text:p>$12,025</text:p>
          </table:table-cell>
          <table:table-cell office:value-type="percentage" office:value="0.63793103448275867" table:formula="of:=SUM([.E116]/[.D116])" table:style-name="ce13">
            <text:p>64%</text:p>
          </table:table-cell>
          <table:table-cell office:value-type="string" office:string-value="POOR" table:formula="of:=IF([.F116]&gt;69%; &quot;GOOD&quot;; &quot;POOR&quot;)" table:style-name="ce21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116]&gt;299;&quot;High HP&quot;;[.I116]&gt;99;&quot;Medium HP&quot;;[.I11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4" table:style-name="ce6">
            <text:p>24</text:p>
          </table:table-cell>
          <table:table-cell office:value-type="float" office:value="60.951185119999998" table:style-name="ce6">
            <text:p>60.95118512</text:p>
          </table:table-cell>
          <table:table-cell office:value-type="float" office:value="20" table:style-name="ce6">
            <text:p>20</text:p>
          </table:table-cell>
          <table:table-cell office:value-type="float" office:value="113.3" table:style-name="ce6">
            <text:p>113.3</text:p>
          </table:table-cell>
          <table:table-cell office:value-type="float" office:value="76.8" table:style-name="ce6">
            <text:p>76.8</text:p>
          </table:table-cell>
          <table:table-cell office:value-type="float" office:value="186.3" table:style-name="ce6">
            <text:p>186.3</text:p>
          </table:table-cell>
          <table:table-cell office:value-type="float" office:value="3.528" table:style-name="ce6">
            <text:p>3.528</text:p>
          </table:table-cell>
          <table:table-cell office:value-type="date" office:date-value="2011-04-24T00:00:00" table:style-name="ce7">
            <text:p>4/24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Plymouth</text:p>
          </table:table-cell>
          <table:table-cell office:value-type="string" table:style-name="ce5">
            <text:p>Prowler</text:p>
          </table:table-cell>
          <table:table-cell office:value-type="float" office:value="1872" table:style-name="ce11">
            <text:p>1872</text:p>
          </table:table-cell>
          <table:table-cell office:value-type="currency" office:value="43000" table:style-name="ce12">
            <text:p>$43,000</text:p>
          </table:table-cell>
          <table:table-cell office:value-type="currency" office:value="30434" table:style-name="ce12">
            <text:p>$30,434</text:p>
          </table:table-cell>
          <table:table-cell office:value-type="percentage" office:value="0.70776744186046514" table:formula="of:=SUM([.E117]/[.D117])" table:style-name="ce13">
            <text:p>71%</text:p>
          </table:table-cell>
          <table:table-cell office:value-type="string" office:string-value="GOOD" table:formula="of:=IF([.F117]&gt;69%; &quot;GOOD&quot;; &quot;POOR&quot;)" table:style-name="ce21">
            <text:p>GOOD</text:p>
          </table:table-cell>
          <table:table-cell office:value-type="float" office:value="3.5" table:style-name="ce6">
            <text:p>3.5</text:p>
          </table:table-cell>
          <table:table-cell office:value-type="float" office:value="253" table:style-name="ce6">
            <text:p>253</text:p>
          </table:table-cell>
          <table:table-cell office:value-type="string" office:string-value="Medium HP" table:formula="of:=COM.MICROSOFT.IFS([.I117]&gt;299;&quot;High HP&quot;;[.I117]&gt;99;&quot;Medium HP&quot;;[.I11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106.98445630000001" table:style-name="ce6">
            <text:p>106.9844563</text:p>
          </table:table-cell>
          <table:table-cell office:value-type="float" office:value="12" table:style-name="ce6">
            <text:p>12</text:p>
          </table:table-cell>
          <table:table-cell office:value-type="float" office:value="113.3" table:style-name="ce6">
            <text:p>113.3</text:p>
          </table:table-cell>
          <table:table-cell office:value-type="float" office:value="76.3" table:style-name="ce6">
            <text:p>76.3</text:p>
          </table:table-cell>
          <table:table-cell office:value-type="float" office:value="165.4" table:style-name="ce6">
            <text:p>165.4</text:p>
          </table:table-cell>
          <table:table-cell office:value-type="float" office:value="2.85" table:style-name="ce6">
            <text:p>2.85</text:p>
          </table:table-cell>
          <table:table-cell office:value-type="date" office:date-value="2012-06-27T00:00:00" table:style-name="ce7">
            <text:p>6/27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Pontiac</text:p>
          </table:table-cell>
          <table:table-cell office:value-type="string" table:style-name="ce5">
            <text:p>Sunfire</text:p>
          </table:table-cell>
          <table:table-cell office:value-type="float" office:value="51645" table:style-name="ce11">
            <text:p>51645</text:p>
          </table:table-cell>
          <table:table-cell office:value-type="currency" office:value="21610" table:style-name="ce12">
            <text:p>$21,610</text:p>
          </table:table-cell>
          <table:table-cell office:value-type="currency" office:value="13790" table:style-name="ce12">
            <text:p>$13,790</text:p>
          </table:table-cell>
          <table:table-cell office:value-type="percentage" office:value="0.6381304951411384" table:formula="of:=SUM([.E118]/[.D118])" table:style-name="ce13">
            <text:p>64%</text:p>
          </table:table-cell>
          <table:table-cell office:value-type="string" office:string-value="POOR" table:formula="of:=IF([.F118]&gt;69%; &quot;GOOD&quot;; &quot;POOR&quot;)" table:style-name="ce21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118]&gt;299;&quot;High HP&quot;;[.I118]&gt;99;&quot;Medium HP&quot;;[.I11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62.015870300000003" table:style-name="ce6">
            <text:p>62.0158703</text:p>
          </table:table-cell>
          <table:table-cell office:value-type="float" office:value="15" table:style-name="ce6">
            <text:p>15</text:p>
          </table:table-cell>
          <table:table-cell office:value-type="float" office:value="104.1" table:style-name="ce6">
            <text:p>104.1</text:p>
          </table:table-cell>
          <table:table-cell office:value-type="float" office:value="68.400000000000006" table:style-name="ce6">
            <text:p>68.4</text:p>
          </table:table-cell>
          <table:table-cell office:value-type="float" office:value="181.9" table:style-name="ce6">
            <text:p>181.9</text:p>
          </table:table-cell>
          <table:table-cell office:value-type="float" office:value="2.9060000000000001" table:style-name="ce6">
            <text:p>2.906</text:p>
          </table:table-cell>
          <table:table-cell office:value-type="date" office:date-value="2012-01-25T00:00:00" table:style-name="ce7">
            <text:p>1/25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Pontiac</text:p>
          </table:table-cell>
          <table:table-cell office:value-type="string" table:style-name="ce5">
            <text:p>Grand Am</text:p>
          </table:table-cell>
          <table:table-cell office:value-type="float" office:value="131097" table:style-name="ce11">
            <text:p>131097</text:p>
          </table:table-cell>
          <table:table-cell office:value-type="currency" office:value="19720" table:style-name="ce12">
            <text:p>$19,720</text:p>
          </table:table-cell>
          <table:table-cell office:value-type="currency" office:value="10290" table:style-name="ce12">
            <text:p>$10,290</text:p>
          </table:table-cell>
          <table:table-cell office:value-type="percentage" office:value="0.52180527383367137" table:formula="of:=SUM([.E119]/[.D119])" table:style-name="ce13">
            <text:p>52%</text:p>
          </table:table-cell>
          <table:table-cell office:value-type="string" office:string-value="POOR" table:formula="of:=IF([.F119]&gt;69%; &quot;GOOD&quot;; &quot;POOR&quot;)" table:style-name="ce21">
            <text:p>POOR</text:p>
          </table:table-cell>
          <table:table-cell office:value-type="float" office:value="3.4" table:style-name="ce6">
            <text:p>3.4</text:p>
          </table:table-cell>
          <table:table-cell office:value-type="float" office:value="175" table:style-name="ce6">
            <text:p>175</text:p>
          </table:table-cell>
          <table:table-cell office:value-type="string" office:string-value="Medium HP" table:formula="of:=COM.MICROSOFT.IFS([.I119]&gt;299;&quot;High HP&quot;;[.I119]&gt;99;&quot;Medium HP&quot;;[.I11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70.389737260000004" table:style-name="ce6">
            <text:p>70.38973726</text:p>
          </table:table-cell>
          <table:table-cell office:value-type="float" office:value="15.2" table:style-name="ce6">
            <text:p>15.2</text:p>
          </table:table-cell>
          <table:table-cell office:value-type="float" office:value="107" table:style-name="ce6">
            <text:p>107</text:p>
          </table:table-cell>
          <table:table-cell office:value-type="float" office:value="70.400000000000006" table:style-name="ce6">
            <text:p>70.4</text:p>
          </table:table-cell>
          <table:table-cell office:value-type="float" office:value="186.3" table:style-name="ce6">
            <text:p>186.3</text:p>
          </table:table-cell>
          <table:table-cell office:value-type="float" office:value="3.0910000000000002" table:style-name="ce6">
            <text:p>3.091</text:p>
          </table:table-cell>
          <table:table-cell office:value-type="date" office:date-value="2012-11-26T00:00:00" table:style-name="ce7">
            <text:p>11/26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Pontiac</text:p>
          </table:table-cell>
          <table:table-cell office:value-type="string" table:style-name="ce5">
            <text:p>Firebird</text:p>
          </table:table-cell>
          <table:table-cell office:value-type="float" office:value="19911" table:style-name="ce11">
            <text:p>19911</text:p>
          </table:table-cell>
          <table:table-cell office:value-type="currency" office:value="25310" table:style-name="ce12">
            <text:p>$25,310</text:p>
          </table:table-cell>
          <table:table-cell office:value-type="currency" office:value="17805" table:style-name="ce12">
            <text:p>$17,805</text:p>
          </table:table-cell>
          <table:table-cell office:value-type="percentage" office:value="0.70347688660608454" table:formula="of:=SUM([.E120]/[.D120])" table:style-name="ce13">
            <text:p>70%</text:p>
          </table:table-cell>
          <table:table-cell office:value-type="string" office:string-value="GOOD" table:formula="of:=IF([.F120]&gt;69%; &quot;GOOD&quot;; &quot;POOR&quot;)" table:style-name="ce21">
            <text:p>GOOD</text:p>
          </table:table-cell>
          <table:table-cell office:value-type="float" office:value="3.8" table:style-name="ce6">
            <text:p>3.8</text:p>
          </table:table-cell>
          <table:table-cell office:value-type="float" office:value="200" table:style-name="ce6">
            <text:p>200</text:p>
          </table:table-cell>
          <table:table-cell office:value-type="string" office:string-value="Medium HP" table:formula="of:=COM.MICROSOFT.IFS([.I120]&gt;299;&quot;High HP&quot;;[.I120]&gt;99;&quot;Medium HP&quot;;[.I12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81.492726160000004" table:style-name="ce6">
            <text:p>81.49272616</text:p>
          </table:table-cell>
          <table:table-cell office:value-type="float" office:value="16.8" table:style-name="ce6">
            <text:p>16.8</text:p>
          </table:table-cell>
          <table:table-cell office:value-type="float" office:value="101.1" table:style-name="ce6">
            <text:p>101.1</text:p>
          </table:table-cell>
          <table:table-cell office:value-type="float" office:value="74.5" table:style-name="ce6">
            <text:p>74.5</text:p>
          </table:table-cell>
          <table:table-cell office:value-type="float" office:value="193.4" table:style-name="ce6">
            <text:p>193.4</text:p>
          </table:table-cell>
          <table:table-cell office:value-type="float" office:value="3.492" table:style-name="ce6">
            <text:p>3.492</text:p>
          </table:table-cell>
          <table:table-cell office:value-type="date" office:date-value="2012-06-16T00:00:00" table:style-name="ce7">
            <text:p>6/16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Pontiac</text:p>
          </table:table-cell>
          <table:table-cell office:value-type="string" table:style-name="ce5">
            <text:p>Grand Prix</text:p>
          </table:table-cell>
          <table:table-cell office:value-type="float" office:value="92364" table:style-name="ce11">
            <text:p>92364</text:p>
          </table:table-cell>
          <table:table-cell office:value-type="currency" office:value="21665" table:style-name="ce12">
            <text:p>$21,665</text:p>
          </table:table-cell>
          <table:table-cell office:value-type="currency" office:value="14010" table:style-name="ce12">
            <text:p>$14,010</text:p>
          </table:table-cell>
          <table:table-cell office:value-type="percentage" office:value="0.6466651280867759" table:formula="of:=SUM([.E121]/[.D121])" table:style-name="ce13">
            <text:p>65%</text:p>
          </table:table-cell>
          <table:table-cell office:value-type="string" office:string-value="POOR" table:formula="of:=IF([.F121]&gt;69%; &quot;GOOD&quot;; &quot;POOR&quot;)" table:style-name="ce21">
            <text:p>POOR</text:p>
          </table:table-cell>
          <table:table-cell office:value-type="float" office:value="3.8" table:style-name="ce6">
            <text:p>3.8</text:p>
          </table:table-cell>
          <table:table-cell office:value-type="float" office:value="195" table:style-name="ce6">
            <text:p>195</text:p>
          </table:table-cell>
          <table:table-cell office:value-type="string" office:string-value="Medium HP" table:formula="of:=COM.MICROSOFT.IFS([.I121]&gt;299;&quot;High HP&quot;;[.I121]&gt;99;&quot;Medium HP&quot;;[.I12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78.318168130000004" table:style-name="ce6">
            <text:p>78.31816813</text:p>
          </table:table-cell>
          <table:table-cell office:value-type="float" office:value="18" table:style-name="ce6">
            <text:p>18</text:p>
          </table:table-cell>
          <table:table-cell office:value-type="float" office:value="110.5" table:style-name="ce6">
            <text:p>110.5</text:p>
          </table:table-cell>
          <table:table-cell office:value-type="float" office:value="72.7" table:style-name="ce6">
            <text:p>72.7</text:p>
          </table:table-cell>
          <table:table-cell office:value-type="float" office:value="196.5" table:style-name="ce6">
            <text:p>196.5</text:p>
          </table:table-cell>
          <table:table-cell office:value-type="float" office:value="3.3959999999999999" table:style-name="ce6">
            <text:p>3.396</text:p>
          </table:table-cell>
          <table:table-cell office:value-type="date" office:date-value="2012-10-15T00:00:00" table:style-name="ce7">
            <text:p>10/15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Pontiac</text:p>
          </table:table-cell>
          <table:table-cell office:value-type="string" table:style-name="ce5">
            <text:p>Bonneville</text:p>
          </table:table-cell>
          <table:table-cell office:value-type="float" office:value="35945" table:style-name="ce11">
            <text:p>35945</text:p>
          </table:table-cell>
          <table:table-cell office:value-type="currency" office:value="23755" table:style-name="ce12">
            <text:p>$23,755</text:p>
          </table:table-cell>
          <table:table-cell office:value-type="currency" office:value="13225" table:style-name="ce12">
            <text:p>$13,225</text:p>
          </table:table-cell>
          <table:table-cell office:value-type="percentage" office:value="0.55672490002104824" table:formula="of:=SUM([.E122]/[.D122])" table:style-name="ce13">
            <text:p>56%</text:p>
          </table:table-cell>
          <table:table-cell office:value-type="string" office:string-value="POOR" table:formula="of:=IF([.F122]&gt;69%; &quot;GOOD&quot;; &quot;POOR&quot;)" table:style-name="ce21">
            <text:p>POOR</text:p>
          </table:table-cell>
          <table:table-cell office:value-type="float" office:value="3.8" table:style-name="ce6">
            <text:p>3.8</text:p>
          </table:table-cell>
          <table:table-cell office:value-type="float" office:value="205" table:style-name="ce6">
            <text:p>205</text:p>
          </table:table-cell>
          <table:table-cell office:value-type="string" office:string-value="Medium HP" table:formula="of:=COM.MICROSOFT.IFS([.I122]&gt;299;&quot;High HP&quot;;[.I122]&gt;99;&quot;Medium HP&quot;;[.I12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82.661355599999993" table:style-name="ce6">
            <text:p>82.6613556</text:p>
          </table:table-cell>
          <table:table-cell office:value-type="float" office:value="17.5" table:style-name="ce6">
            <text:p>17.5</text:p>
          </table:table-cell>
          <table:table-cell office:value-type="float" office:value="112.2" table:style-name="ce6">
            <text:p>112.2</text:p>
          </table:table-cell>
          <table:table-cell office:value-type="float" office:value="72.599999999999994" table:style-name="ce6">
            <text:p>72.6</text:p>
          </table:table-cell>
          <table:table-cell office:value-type="float" office:value="202.5" table:style-name="ce6">
            <text:p>202.5</text:p>
          </table:table-cell>
          <table:table-cell office:value-type="float" office:value="3.59" table:style-name="ce6">
            <text:p>3.59</text:p>
          </table:table-cell>
          <table:table-cell office:value-type="date" office:date-value="2011-05-18T00:00:00" table:style-name="ce7">
            <text:p>5/18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Pontiac</text:p>
          </table:table-cell>
          <table:table-cell office:value-type="string" table:style-name="ce5">
            <text:p>Montana</text:p>
          </table:table-cell>
          <table:table-cell office:value-type="float" office:value="39572" table:style-name="ce11">
            <text:p>39572</text:p>
          </table:table-cell>
          <table:table-cell office:value-type="currency" office:value="25635" table:style-name="ce12">
            <text:p>$25,635</text:p>
          </table:table-cell>
          <table:table-cell office:value-type="currency" office:value="14215" table:style-name="ce12">
            <text:p>$14,215</text:p>
          </table:table-cell>
          <table:table-cell office:value-type="percentage" office:value="0.55451531109810803" table:formula="of:=SUM([.E123]/[.D123])" table:style-name="ce13">
            <text:p>55%</text:p>
          </table:table-cell>
          <table:table-cell office:value-type="string" office:string-value="POOR" table:formula="of:=IF([.F123]&gt;69%; &quot;GOOD&quot;; &quot;POOR&quot;)" table:style-name="ce21">
            <text:p>POOR</text:p>
          </table:table-cell>
          <table:table-cell office:value-type="float" office:value="3.4" table:style-name="ce6">
            <text:p>3.4</text:p>
          </table:table-cell>
          <table:table-cell office:value-type="float" office:value="185" table:style-name="ce6">
            <text:p>185</text:p>
          </table:table-cell>
          <table:table-cell office:value-type="string" office:string-value="Medium HP" table:formula="of:=COM.MICROSOFT.IFS([.I123]&gt;299;&quot;High HP&quot;;[.I123]&gt;99;&quot;Medium HP&quot;;[.I12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3" table:style-name="ce6">
            <text:p>23</text:p>
          </table:table-cell>
          <table:table-cell office:value-type="float" office:value="76.208439519999999" table:style-name="ce6">
            <text:p>76.20843952</text:p>
          </table:table-cell>
          <table:table-cell office:value-type="float" office:value="25" table:style-name="ce6">
            <text:p>25</text:p>
          </table:table-cell>
          <table:table-cell office:value-type="float" office:value="120" table:style-name="ce6">
            <text:p>120</text:p>
          </table:table-cell>
          <table:table-cell office:value-type="float" office:value="72.7" table:style-name="ce6">
            <text:p>72.7</text:p>
          </table:table-cell>
          <table:table-cell office:value-type="float" office:value="201.3" table:style-name="ce6">
            <text:p>201.3</text:p>
          </table:table-cell>
          <table:table-cell office:value-type="float" office:value="3.9420000000000002" table:style-name="ce6">
            <text:p>3.942</text:p>
          </table:table-cell>
          <table:table-cell office:value-type="date" office:date-value="2012-07-22T00:00:00" table:style-name="ce7">
            <text:p>7/22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Porsche</text:p>
          </table:table-cell>
          <table:table-cell office:value-type="string" table:style-name="ce5">
            <text:p>Boxter</text:p>
          </table:table-cell>
          <table:table-cell office:value-type="float" office:value="8982" table:style-name="ce11">
            <text:p>8982</text:p>
          </table:table-cell>
          <table:table-cell office:value-type="currency" office:value="41430" table:style-name="ce12">
            <text:p>$41,430</text:p>
          </table:table-cell>
          <table:table-cell office:value-type="currency" office:value="41250" table:style-name="ce12">
            <text:p>$41,250</text:p>
          </table:table-cell>
          <table:table-cell office:value-type="percentage" office:value="0.99565532223026787" table:formula="of:=SUM([.E124]/[.D124])" table:style-name="ce13">
            <text:p>100%</text:p>
          </table:table-cell>
          <table:table-cell office:value-type="string" office:string-value="GOOD" table:formula="of:=IF([.F124]&gt;69%; &quot;GOOD&quot;; &quot;POOR&quot;)" table:style-name="ce21">
            <text:p>GOOD</text:p>
          </table:table-cell>
          <table:table-cell office:value-type="float" office:value="2.7" table:style-name="ce6">
            <text:p>2.7</text:p>
          </table:table-cell>
          <table:table-cell office:value-type="float" office:value="217" table:style-name="ce6">
            <text:p>217</text:p>
          </table:table-cell>
          <table:table-cell office:value-type="string" office:string-value="Medium HP" table:formula="of:=COM.MICROSOFT.IFS([.I124]&gt;299;&quot;High HP&quot;;[.I124]&gt;99;&quot;Medium HP&quot;;[.I12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2" table:style-name="ce6">
            <text:p>22</text:p>
          </table:table-cell>
          <table:table-cell office:value-type="float" office:value="93.437330700000004" table:style-name="ce6">
            <text:p>93.4373307</text:p>
          </table:table-cell>
          <table:table-cell office:value-type="float" office:value="17" table:style-name="ce6">
            <text:p>17</text:p>
          </table:table-cell>
          <table:table-cell office:value-type="float" office:value="95.2" table:style-name="ce6">
            <text:p>95.2</text:p>
          </table:table-cell>
          <table:table-cell office:value-type="float" office:value="70.099999999999994" table:style-name="ce6">
            <text:p>70.1</text:p>
          </table:table-cell>
          <table:table-cell office:value-type="float" office:value="171" table:style-name="ce6">
            <text:p>171</text:p>
          </table:table-cell>
          <table:table-cell office:value-type="float" office:value="2.778" table:style-name="ce6">
            <text:p>2.778</text:p>
          </table:table-cell>
          <table:table-cell office:value-type="date" office:date-value="2012-02-19T00:00:00" table:style-name="ce7">
            <text:p>2/19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Porsche</text:p>
          </table:table-cell>
          <table:table-cell office:value-type="string" table:style-name="ce5">
            <text:p>Carrera Coupe</text:p>
          </table:table-cell>
          <table:table-cell office:value-type="float" office:value="1280" table:style-name="ce11">
            <text:p>1280</text:p>
          </table:table-cell>
          <table:table-cell office:value-type="currency" office:value="71020" table:style-name="ce12">
            <text:p>$71,020</text:p>
          </table:table-cell>
          <table:table-cell office:value-type="currency" office:value="60625" table:style-name="ce12">
            <text:p>$60,625</text:p>
          </table:table-cell>
          <table:table-cell office:value-type="percentage" office:value="0.85363277949873273" table:formula="of:=SUM([.E125]/[.D125])" table:style-name="ce13">
            <text:p>85%</text:p>
          </table:table-cell>
          <table:table-cell office:value-type="string" office:string-value="GOOD" table:formula="of:=IF([.F125]&gt;69%; &quot;GOOD&quot;; &quot;POOR&quot;)" table:style-name="ce21">
            <text:p>GOOD</text:p>
          </table:table-cell>
          <table:table-cell office:value-type="float" office:value="3.4" table:style-name="ce6">
            <text:p>3.4</text:p>
          </table:table-cell>
          <table:table-cell office:value-type="float" office:value="300" table:style-name="ce6">
            <text:p>300</text:p>
          </table:table-cell>
          <table:table-cell office:value-type="string" office:string-value="High HP" table:formula="of:=COM.MICROSOFT.IFS([.I125]&gt;299;&quot;High HP&quot;;[.I125]&gt;99;&quot;Medium HP&quot;;[.I125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Passenger</text:p>
          </table:table-cell>
          <table:table-cell office:value-type="float" office:value="21" table:style-name="ce6">
            <text:p>21</text:p>
          </table:table-cell>
          <table:table-cell office:value-type="float" office:value="134.3909754" table:style-name="ce6">
            <text:p>134.3909754</text:p>
          </table:table-cell>
          <table:table-cell office:value-type="float" office:value="17" table:style-name="ce6">
            <text:p>17</text:p>
          </table:table-cell>
          <table:table-cell office:value-type="float" office:value="92.6" table:style-name="ce6">
            <text:p>92.6</text:p>
          </table:table-cell>
          <table:table-cell office:value-type="float" office:value="69.5" table:style-name="ce6">
            <text:p>69.5</text:p>
          </table:table-cell>
          <table:table-cell office:value-type="float" office:value="174.5" table:style-name="ce6">
            <text:p>174.5</text:p>
          </table:table-cell>
          <table:table-cell office:value-type="float" office:value="3.032" table:style-name="ce6">
            <text:p>3.032</text:p>
          </table:table-cell>
          <table:table-cell office:value-type="date" office:date-value="2012-12-21T00:00:00" table:style-name="ce7">
            <text:p>12/21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Porsche</text:p>
          </table:table-cell>
          <table:table-cell office:value-type="string" table:style-name="ce5">
            <text:p>Carrera Cabrio</text:p>
          </table:table-cell>
          <table:table-cell office:value-type="float" office:value="1866" table:style-name="ce11">
            <text:p>1866</text:p>
          </table:table-cell>
          <table:table-cell office:value-type="currency" office:value="74970" table:style-name="ce12">
            <text:p>$74,970</text:p>
          </table:table-cell>
          <table:table-cell office:value-type="currency" office:value="67550" table:style-name="ce12">
            <text:p>$67,550</text:p>
          </table:table-cell>
          <table:table-cell office:value-type="percentage" office:value="0.90102707749766575" table:formula="of:=SUM([.E126]/[.D126])" table:style-name="ce13">
            <text:p>90%</text:p>
          </table:table-cell>
          <table:table-cell office:value-type="string" office:string-value="GOOD" table:formula="of:=IF([.F126]&gt;69%; &quot;GOOD&quot;; &quot;POOR&quot;)" table:style-name="ce21">
            <text:p>GOOD</text:p>
          </table:table-cell>
          <table:table-cell office:value-type="float" office:value="3.4" table:style-name="ce6">
            <text:p>3.4</text:p>
          </table:table-cell>
          <table:table-cell office:value-type="float" office:value="300" table:style-name="ce6">
            <text:p>300</text:p>
          </table:table-cell>
          <table:table-cell office:value-type="string" office:string-value="High HP" table:formula="of:=COM.MICROSOFT.IFS([.I126]&gt;299;&quot;High HP&quot;;[.I126]&gt;99;&quot;Medium HP&quot;;[.I126]&lt;100;&quot;Low HP&quot;)" table:number-matrix-columns-spanned="1" table:number-matrix-rows-spanned="1" table:style-name="ce6">
            <text:p>High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135.91470960000001" table:style-name="ce6">
            <text:p>135.9147096</text:p>
          </table:table-cell>
          <table:table-cell office:value-type="float" office:value="17" table:style-name="ce6">
            <text:p>17</text:p>
          </table:table-cell>
          <table:table-cell office:value-type="float" office:value="92.6" table:style-name="ce6">
            <text:p>92.6</text:p>
          </table:table-cell>
          <table:table-cell office:value-type="float" office:value="69.5" table:style-name="ce6">
            <text:p>69.5</text:p>
          </table:table-cell>
          <table:table-cell office:value-type="float" office:value="174.5" table:style-name="ce6">
            <text:p>174.5</text:p>
          </table:table-cell>
          <table:table-cell office:value-type="float" office:value="3.0750000000000002" table:style-name="ce6">
            <text:p>3.075</text:p>
          </table:table-cell>
          <table:table-cell office:value-type="date" office:date-value="2011-07-11T00:00:00" table:style-name="ce7">
            <text:p>7/11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Saab</text:p>
          </table:table-cell>
          <table:table-cell office:value-type="string" table:style-name="ce8">
            <text:p>9-5</text:p>
          </table:table-cell>
          <table:table-cell office:value-type="float" office:value="9191" table:style-name="ce11">
            <text:p>9191</text:p>
          </table:table-cell>
          <table:table-cell office:value-type="currency" office:value="33120" table:style-name="ce12">
            <text:p>$33,120</text:p>
          </table:table-cell>
          <table:table-cell office:value-type="currency" office:value="22789" table:style-name="ce12">
            <text:p>$22,789</text:p>
          </table:table-cell>
          <table:table-cell office:value-type="percentage" office:value="0.68807367149758458" table:formula="of:=SUM([.E127]/[.D127])" table:style-name="ce13">
            <text:p>69%</text:p>
          </table:table-cell>
          <table:table-cell office:value-type="string" office:string-value="POOR" table:formula="of:=IF([.F127]&gt;69%; &quot;GOOD&quot;; &quot;POOR&quot;)" table:style-name="ce21">
            <text:p>POOR</text:p>
          </table:table-cell>
          <table:table-cell office:value-type="float" office:value="2.2999999999999998" table:style-name="ce6">
            <text:p>2.3</text:p>
          </table:table-cell>
          <table:table-cell office:value-type="float" office:value="170" table:style-name="ce6">
            <text:p>170</text:p>
          </table:table-cell>
          <table:table-cell office:value-type="string" office:string-value="Medium HP" table:formula="of:=COM.MICROSOFT.IFS([.I127]&gt;299;&quot;High HP&quot;;[.I127]&gt;99;&quot;Medium HP&quot;;[.I12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73.503778190000006" table:style-name="ce6">
            <text:p>73.50377819</text:p>
          </table:table-cell>
          <table:table-cell office:value-type="float" office:value="18.5" table:style-name="ce6">
            <text:p>18.5</text:p>
          </table:table-cell>
          <table:table-cell office:value-type="float" office:value="106.4" table:style-name="ce6">
            <text:p>106.4</text:p>
          </table:table-cell>
          <table:table-cell office:value-type="float" office:value="70.599999999999994" table:style-name="ce6">
            <text:p>70.6</text:p>
          </table:table-cell>
          <table:table-cell office:value-type="float" office:value="189.2" table:style-name="ce6">
            <text:p>189.2</text:p>
          </table:table-cell>
          <table:table-cell office:value-type="float" office:value="3.28" table:style-name="ce6">
            <text:p>3.28</text:p>
          </table:table-cell>
          <table:table-cell office:value-type="date" office:date-value="2012-11-09T00:00:00" table:style-name="ce7">
            <text:p>11/9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Saab</text:p>
          </table:table-cell>
          <table:table-cell office:value-type="string" table:style-name="ce8">
            <text:p>9-3</text:p>
          </table:table-cell>
          <table:table-cell office:value-type="float" office:value="12115" table:style-name="ce11">
            <text:p>12115</text:p>
          </table:table-cell>
          <table:table-cell office:value-type="currency" office:value="26100" table:style-name="ce12">
            <text:p>$26,100</text:p>
          </table:table-cell>
          <table:table-cell office:value-type="currency" office:value="18255" table:style-name="ce12">
            <text:p>$18,255</text:p>
          </table:table-cell>
          <table:table-cell office:value-type="percentage" office:value="0.69942528735632181" table:formula="of:=SUM([.E128]/[.D128])" table:style-name="ce13">
            <text:p>70%</text:p>
          </table:table-cell>
          <table:table-cell office:value-type="string" office:string-value="GOOD" table:formula="of:=IF([.F128]&gt;69%; &quot;GOOD&quot;; &quot;POOR&quot;)" table:style-name="ce21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85" table:style-name="ce6">
            <text:p>185</text:p>
          </table:table-cell>
          <table:table-cell office:value-type="string" office:string-value="Medium HP" table:formula="of:=COM.MICROSOFT.IFS([.I128]&gt;299;&quot;High HP&quot;;[.I128]&gt;99;&quot;Medium HP&quot;;[.I12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76.02304771" table:style-name="ce6">
            <text:p>76.02304771</text:p>
          </table:table-cell>
          <table:table-cell office:value-type="float" office:value="16.899999999999999" table:style-name="ce6">
            <text:p>16.9</text:p>
          </table:table-cell>
          <table:table-cell office:value-type="float" office:value="102.6" table:style-name="ce6">
            <text:p>102.6</text:p>
          </table:table-cell>
          <table:table-cell office:value-type="float" office:value="67.400000000000006" table:style-name="ce6">
            <text:p>67.4</text:p>
          </table:table-cell>
          <table:table-cell office:value-type="float" office:value="182.2" table:style-name="ce6">
            <text:p>182.2</text:p>
          </table:table-cell>
          <table:table-cell office:value-type="float" office:value="2.99" table:style-name="ce6">
            <text:p>2.99</text:p>
          </table:table-cell>
          <table:table-cell office:value-type="date" office:date-value="2011-06-12T00:00:00" table:style-name="ce7">
            <text:p>6/12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Saturn</text:p>
          </table:table-cell>
          <table:table-cell office:value-type="string" table:style-name="ce5">
            <text:p>SL</text:p>
          </table:table-cell>
          <table:table-cell office:value-type="float" office:value="80620" table:style-name="ce11">
            <text:p>80620</text:p>
          </table:table-cell>
          <table:table-cell office:value-type="currency" office:value="10685" table:style-name="ce12">
            <text:p>$10,685</text:p>
          </table:table-cell>
          <table:table-cell office:value-type="currency" office:value="9200" table:style-name="ce12">
            <text:p>$9,200</text:p>
          </table:table-cell>
          <table:table-cell office:value-type="percentage" office:value="0.86102012166588671" table:formula="of:=SUM([.E129]/[.D129])" table:style-name="ce13">
            <text:p>86%</text:p>
          </table:table-cell>
          <table:table-cell office:value-type="string" office:string-value="GOOD" table:formula="of:=IF([.F129]&gt;69%; &quot;GOOD&quot;; &quot;POOR&quot;)" table:style-name="ce21">
            <text:p>GOOD</text:p>
          </table:table-cell>
          <table:table-cell office:value-type="float" office:value="1.9" table:style-name="ce6">
            <text:p>1.9</text:p>
          </table:table-cell>
          <table:table-cell office:value-type="float" office:value="100" table:style-name="ce6">
            <text:p>100</text:p>
          </table:table-cell>
          <table:table-cell office:value-type="string" office:string-value="Medium HP" table:formula="of:=COM.MICROSOFT.IFS([.I129]&gt;299;&quot;High HP&quot;;[.I129]&gt;99;&quot;Medium HP&quot;;[.I12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3" table:style-name="ce6">
            <text:p>33</text:p>
          </table:table-cell>
          <table:table-cell office:value-type="float" office:value="39.986424749999998" table:style-name="ce6">
            <text:p>39.98642475</text:p>
          </table:table-cell>
          <table:table-cell office:value-type="float" office:value="12.1" table:style-name="ce6">
            <text:p>12.1</text:p>
          </table:table-cell>
          <table:table-cell office:value-type="float" office:value="102.4" table:style-name="ce6">
            <text:p>102.4</text:p>
          </table:table-cell>
          <table:table-cell office:value-type="float" office:value="66.400000000000006" table:style-name="ce6">
            <text:p>66.4</text:p>
          </table:table-cell>
          <table:table-cell office:value-type="float" office:value="176.9" table:style-name="ce6">
            <text:p>176.9</text:p>
          </table:table-cell>
          <table:table-cell office:value-type="float" office:value="2.3319999999999999" table:style-name="ce6">
            <text:p>2.332</text:p>
          </table:table-cell>
          <table:table-cell office:value-type="date" office:date-value="2012-08-16T00:00:00" table:style-name="ce7">
            <text:p>8/16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Saturn</text:p>
          </table:table-cell>
          <table:table-cell office:value-type="string" table:style-name="ce5">
            <text:p>SC</text:p>
          </table:table-cell>
          <table:table-cell office:value-type="float" office:value="24546" table:style-name="ce11">
            <text:p>24546</text:p>
          </table:table-cell>
          <table:table-cell office:value-type="currency" office:value="12535" table:style-name="ce12">
            <text:p>$12,535</text:p>
          </table:table-cell>
          <table:table-cell office:value-type="currency" office:value="10590" table:style-name="ce12">
            <text:p>$10,590</text:p>
          </table:table-cell>
          <table:table-cell office:value-type="percentage" office:value="0.84483446350219382" table:formula="of:=SUM([.E130]/[.D130])" table:style-name="ce13">
            <text:p>84%</text:p>
          </table:table-cell>
          <table:table-cell office:value-type="string" office:string-value="GOOD" table:formula="of:=IF([.F130]&gt;69%; &quot;GOOD&quot;; &quot;POOR&quot;)" table:style-name="ce21">
            <text:p>GOOD</text:p>
          </table:table-cell>
          <table:table-cell office:value-type="float" office:value="1.9" table:style-name="ce6">
            <text:p>1.9</text:p>
          </table:table-cell>
          <table:table-cell office:value-type="float" office:value="100" table:style-name="ce6">
            <text:p>100</text:p>
          </table:table-cell>
          <table:table-cell office:value-type="string" office:string-value="Medium HP" table:formula="of:=COM.MICROSOFT.IFS([.I130]&gt;299;&quot;High HP&quot;;[.I130]&gt;99;&quot;Medium HP&quot;;[.I13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3" table:style-name="ce6">
            <text:p>33</text:p>
          </table:table-cell>
          <table:table-cell office:value-type="float" office:value="40.700072419999998" table:style-name="ce6">
            <text:p>40.70007242</text:p>
          </table:table-cell>
          <table:table-cell office:value-type="float" office:value="12.1" table:style-name="ce6">
            <text:p>12.1</text:p>
          </table:table-cell>
          <table:table-cell office:value-type="float" office:value="102.4" table:style-name="ce6">
            <text:p>102.4</text:p>
          </table:table-cell>
          <table:table-cell office:value-type="float" office:value="66.400000000000006" table:style-name="ce6">
            <text:p>66.4</text:p>
          </table:table-cell>
          <table:table-cell office:value-type="float" office:value="180" table:style-name="ce6">
            <text:p>180</text:p>
          </table:table-cell>
          <table:table-cell office:value-type="float" office:value="2.367" table:style-name="ce6">
            <text:p>2.367</text:p>
          </table:table-cell>
          <table:table-cell office:value-type="date" office:date-value="2011-03-16T00:00:00" table:style-name="ce7">
            <text:p>3/16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Saturn</text:p>
          </table:table-cell>
          <table:table-cell office:value-type="string" table:style-name="ce5">
            <text:p>SW</text:p>
          </table:table-cell>
          <table:table-cell office:value-type="float" office:value="5223" table:style-name="ce11">
            <text:p>5223</text:p>
          </table:table-cell>
          <table:table-cell office:value-type="currency" office:value="14290" table:style-name="ce12">
            <text:p>$14,290</text:p>
          </table:table-cell>
          <table:table-cell office:value-type="currency" office:value="10790" table:style-name="ce12">
            <text:p>$10,790</text:p>
          </table:table-cell>
          <table:table-cell office:value-type="percentage" office:value="0.75507347795661306" table:formula="of:=SUM([.E131]/[.D131])" table:style-name="ce13">
            <text:p>76%</text:p>
          </table:table-cell>
          <table:table-cell office:value-type="string" office:string-value="GOOD" table:formula="of:=IF([.F131]&gt;69%; &quot;GOOD&quot;; &quot;POOR&quot;)" table:style-name="ce21">
            <text:p>GOOD</text:p>
          </table:table-cell>
          <table:table-cell office:value-type="float" office:value="1.9" table:style-name="ce6">
            <text:p>1.9</text:p>
          </table:table-cell>
          <table:table-cell office:value-type="float" office:value="124" table:style-name="ce6">
            <text:p>124</text:p>
          </table:table-cell>
          <table:table-cell office:value-type="string" office:string-value="Medium HP" table:formula="of:=COM.MICROSOFT.IFS([.I131]&gt;299;&quot;High HP&quot;;[.I131]&gt;99;&quot;Medium HP&quot;;[.I13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1" table:style-name="ce6">
            <text:p>31</text:p>
          </table:table-cell>
          <table:table-cell office:value-type="float" office:value="49.865773670000003" table:style-name="ce6">
            <text:p>49.86577367</text:p>
          </table:table-cell>
          <table:table-cell office:value-type="float" office:value="12.1" table:style-name="ce6">
            <text:p>12.1</text:p>
          </table:table-cell>
          <table:table-cell office:value-type="float" office:value="102.4" table:style-name="ce6">
            <text:p>102.4</text:p>
          </table:table-cell>
          <table:table-cell office:value-type="float" office:value="66.400000000000006" table:style-name="ce6">
            <text:p>66.4</text:p>
          </table:table-cell>
          <table:table-cell office:value-type="float" office:value="176.9" table:style-name="ce6">
            <text:p>176.9</text:p>
          </table:table-cell>
          <table:table-cell office:value-type="float" office:value="2.452" table:style-name="ce6">
            <text:p>2.452</text:p>
          </table:table-cell>
          <table:table-cell office:value-type="date" office:date-value="2011-01-15T00:00:00" table:style-name="ce7">
            <text:p>1/15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Saturn</text:p>
          </table:table-cell>
          <table:table-cell office:value-type="string" table:style-name="ce5">
            <text:p>LW</text:p>
          </table:table-cell>
          <table:table-cell office:value-type="float" office:value="8472" table:style-name="ce11">
            <text:p>8472</text:p>
          </table:table-cell>
          <table:table-cell office:value-type="currency" office:value="18835" table:style-name="ce12">
            <text:p>$18,835</text:p>
          </table:table-cell>
          <table:table-cell office:value-type="currency" office:value="13700" table:style-name="ce12">
            <text:p>$13,700</text:p>
          </table:table-cell>
          <table:table-cell office:value-type="percentage" office:value="0.72736925935757901" table:formula="of:=SUM([.E132]/[.D132])" table:style-name="ce13">
            <text:p>73%</text:p>
          </table:table-cell>
          <table:table-cell office:value-type="string" office:string-value="GOOD" table:formula="of:=IF([.F132]&gt;69%; &quot;GOOD&quot;; &quot;POOR&quot;)" table:style-name="ce21">
            <text:p>GOOD</text:p>
          </table:table-cell>
          <table:table-cell office:value-type="float" office:value="2.2000000000000002" table:style-name="ce6">
            <text:p>2.2</text:p>
          </table:table-cell>
          <table:table-cell office:value-type="float" office:value="137" table:style-name="ce6">
            <text:p>137</text:p>
          </table:table-cell>
          <table:table-cell office:value-type="string" office:string-value="Medium HP" table:formula="of:=COM.MICROSOFT.IFS([.I132]&gt;299;&quot;High HP&quot;;[.I132]&gt;99;&quot;Medium HP&quot;;[.I13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56.295243040000003" table:style-name="ce6">
            <text:p>56.29524304</text:p>
          </table:table-cell>
          <table:table-cell office:value-type="float" office:value="13.1" table:style-name="ce6">
            <text:p>13.1</text:p>
          </table:table-cell>
          <table:table-cell office:value-type="float" office:value="106.5" table:style-name="ce6">
            <text:p>106.5</text:p>
          </table:table-cell>
          <table:table-cell office:value-type="float" office:value="69" table:style-name="ce6">
            <text:p>69</text:p>
          </table:table-cell>
          <table:table-cell office:value-type="float" office:value="190.4" table:style-name="ce6">
            <text:p>190.4</text:p>
          </table:table-cell>
          <table:table-cell office:value-type="float" office:value="3.0750000000000002" table:style-name="ce6">
            <text:p>3.075</text:p>
          </table:table-cell>
          <table:table-cell office:value-type="date" office:date-value="2011-08-05T00:00:00" table:style-name="ce7">
            <text:p>8/5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Saturn</text:p>
          </table:table-cell>
          <table:table-cell office:value-type="string" table:style-name="ce5">
            <text:p>LS</text:p>
          </table:table-cell>
          <table:table-cell office:value-type="float" office:value="49989" table:style-name="ce11">
            <text:p>49989</text:p>
          </table:table-cell>
          <table:table-cell office:value-type="currency" office:value="15010" table:style-name="ce12">
            <text:p>$15,010</text:p>
          </table:table-cell>
          <table:table-cell office:value-type="currency" office:value="9900" table:style-name="ce12">
            <text:p>$9,900</text:p>
          </table:table-cell>
          <table:table-cell office:value-type="percentage" office:value="0.65956029313790809" table:formula="of:=SUM([.E133]/[.D133])" table:style-name="ce13">
            <text:p>66%</text:p>
          </table:table-cell>
          <table:table-cell office:value-type="string" office:string-value="POOR" table:formula="of:=IF([.F133]&gt;69%; &quot;GOOD&quot;; &quot;POOR&quot;)" table:style-name="ce21">
            <text:p>POOR</text:p>
          </table:table-cell>
          <table:table-cell office:value-type="float" office:value="2.2000000000000002" table:style-name="ce6">
            <text:p>2.2</text:p>
          </table:table-cell>
          <table:table-cell office:value-type="float" office:value="137" table:style-name="ce6">
            <text:p>137</text:p>
          </table:table-cell>
          <table:table-cell office:value-type="string" office:string-value="Medium HP" table:formula="of:=COM.MICROSOFT.IFS([.I133]&gt;299;&quot;High HP&quot;;[.I133]&gt;99;&quot;Medium HP&quot;;[.I13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8" table:style-name="ce6">
            <text:p>28</text:p>
          </table:table-cell>
          <table:table-cell office:value-type="float" office:value="54.819728249999997" table:style-name="ce6">
            <text:p>54.81972825</text:p>
          </table:table-cell>
          <table:table-cell office:value-type="float" office:value="13.1" table:style-name="ce6">
            <text:p>13.1</text:p>
          </table:table-cell>
          <table:table-cell office:value-type="float" office:value="106.5" table:style-name="ce6">
            <text:p>106.5</text:p>
          </table:table-cell>
          <table:table-cell office:value-type="float" office:value="69" table:style-name="ce6">
            <text:p>69</text:p>
          </table:table-cell>
          <table:table-cell office:value-type="float" office:value="190.4" table:style-name="ce6">
            <text:p>190.4</text:p>
          </table:table-cell>
          <table:table-cell office:value-type="float" office:value="2.91" table:style-name="ce6">
            <text:p>2.91</text:p>
          </table:table-cell>
          <table:table-cell office:value-type="date" office:date-value="2012-12-04T00:00:00" table:style-name="ce7">
            <text:p>12/4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Subaru</text:p>
          </table:table-cell>
          <table:table-cell office:value-type="string" table:style-name="ce5">
            <text:p>Outback</text:p>
          </table:table-cell>
          <table:table-cell office:value-type="float" office:value="47107" table:style-name="ce11">
            <text:p>47107</text:p>
          </table:table-cell>
          <table:table-cell office:value-type="currency" office:value="22695" table:style-name="ce12">
            <text:p>$22,695</text:p>
          </table:table-cell>
          <table:table-cell office:value-type="currency" office:value="16770" table:style-name="ce12">
            <text:p>$16,770</text:p>
          </table:table-cell>
          <table:table-cell office:value-type="percentage" office:value="0.73892927957699939" table:formula="of:=SUM([.E134]/[.D134])" table:style-name="ce13">
            <text:p>74%</text:p>
          </table:table-cell>
          <table:table-cell office:value-type="string" office:string-value="GOOD" table:formula="of:=IF([.F134]&gt;69%; &quot;GOOD&quot;; &quot;POOR&quot;)" table:style-name="ce21">
            <text:p>GOOD</text:p>
          </table:table-cell>
          <table:table-cell office:value-type="float" office:value="2.5" table:style-name="ce6">
            <text:p>2.5</text:p>
          </table:table-cell>
          <table:table-cell office:value-type="float" office:value="165" table:style-name="ce6">
            <text:p>165</text:p>
          </table:table-cell>
          <table:table-cell office:value-type="string" office:string-value="Medium HP" table:formula="of:=COM.MICROSOFT.IFS([.I134]&gt;299;&quot;High HP&quot;;[.I134]&gt;99;&quot;Medium HP&quot;;[.I13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67.765907600000006" table:style-name="ce6">
            <text:p>67.7659076</text:p>
          </table:table-cell>
          <table:table-cell office:value-type="float" office:value="16.899999999999999" table:style-name="ce6">
            <text:p>16.9</text:p>
          </table:table-cell>
          <table:table-cell office:value-type="float" office:value="103.5" table:style-name="ce6">
            <text:p>103.5</text:p>
          </table:table-cell>
          <table:table-cell office:value-type="float" office:value="67.5" table:style-name="ce6">
            <text:p>67.5</text:p>
          </table:table-cell>
          <table:table-cell office:value-type="float" office:value="185.8" table:style-name="ce6">
            <text:p>185.8</text:p>
          </table:table-cell>
          <table:table-cell office:value-type="float" office:value="3.415" table:style-name="ce6">
            <text:p>3.415</text:p>
          </table:table-cell>
          <table:table-cell office:value-type="date" office:date-value="2011-07-07T00:00:00" table:style-name="ce7">
            <text:p>7/7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Subaru</text:p>
          </table:table-cell>
          <table:table-cell office:value-type="string" table:style-name="ce5">
            <text:p>Forester</text:p>
          </table:table-cell>
          <table:table-cell office:value-type="float" office:value="33028" table:style-name="ce11">
            <text:p>33028</text:p>
          </table:table-cell>
          <table:table-cell office:value-type="currency" office:value="20095" table:style-name="ce12">
            <text:p>$20,095</text:p>
          </table:table-cell>
          <table:table-cell office:value-type="currency" office:value="14832" table:style-name="ce12">
            <text:p>$14,832</text:p>
          </table:table-cell>
          <table:table-cell office:value-type="percentage" office:value="0.73809405324707644" table:formula="of:=SUM([.E135]/[.D135])" table:style-name="ce13">
            <text:p>74%</text:p>
          </table:table-cell>
          <table:table-cell office:value-type="string" office:string-value="GOOD" table:formula="of:=IF([.F135]&gt;69%; &quot;GOOD&quot;; &quot;POOR&quot;)" table:style-name="ce21">
            <text:p>GOOD</text:p>
          </table:table-cell>
          <table:table-cell office:value-type="float" office:value="2.5" table:style-name="ce6">
            <text:p>2.5</text:p>
          </table:table-cell>
          <table:table-cell office:value-type="float" office:value="165" table:style-name="ce6">
            <text:p>165</text:p>
          </table:table-cell>
          <table:table-cell office:value-type="string" office:string-value="Medium HP" table:formula="of:=COM.MICROSOFT.IFS([.I135]&gt;299;&quot;High HP&quot;;[.I135]&gt;99;&quot;Medium HP&quot;;[.I13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4" table:style-name="ce6">
            <text:p>24</text:p>
          </table:table-cell>
          <table:table-cell office:value-type="float" office:value="66.762943309999997" table:style-name="ce6">
            <text:p>66.76294331</text:p>
          </table:table-cell>
          <table:table-cell office:value-type="float" office:value="15.9" table:style-name="ce6">
            <text:p>15.9</text:p>
          </table:table-cell>
          <table:table-cell office:value-type="float" office:value="99.4" table:style-name="ce6">
            <text:p>99.4</text:p>
          </table:table-cell>
          <table:table-cell office:value-type="float" office:value="68.3" table:style-name="ce6">
            <text:p>68.3</text:p>
          </table:table-cell>
          <table:table-cell office:value-type="float" office:value="175.2" table:style-name="ce6">
            <text:p>175.2</text:p>
          </table:table-cell>
          <table:table-cell office:value-type="float" office:value="3.125" table:style-name="ce6">
            <text:p>3.125</text:p>
          </table:table-cell>
          <table:table-cell office:value-type="date" office:date-value="2012-09-10T00:00:00" table:style-name="ce7">
            <text:p>9/10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4Runner</text:p>
          </table:table-cell>
          <table:table-cell office:value-type="float" office:value="68411" table:style-name="ce11">
            <text:p>68411</text:p>
          </table:table-cell>
          <table:table-cell office:value-type="currency" office:value="22288" table:style-name="ce12">
            <text:p>$22,288</text:p>
          </table:table-cell>
          <table:table-cell office:value-type="currency" office:value="19425" table:style-name="ce12">
            <text:p>$19,425</text:p>
          </table:table-cell>
          <table:table-cell office:value-type="percentage" office:value="0.87154522613065322" table:formula="of:=SUM([.E136]/[.D136])" table:style-name="ce13">
            <text:p>87%</text:p>
          </table:table-cell>
          <table:table-cell office:value-type="string" office:string-value="GOOD" table:formula="of:=IF([.F136]&gt;69%; &quot;GOOD&quot;; &quot;POOR&quot;)" table:style-name="ce21">
            <text:p>GOOD</text:p>
          </table:table-cell>
          <table:table-cell office:value-type="float" office:value="2.7" table:style-name="ce6">
            <text:p>2.7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136]&gt;299;&quot;High HP&quot;;[.I136]&gt;99;&quot;Medium HP&quot;;[.I13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3" table:style-name="ce6">
            <text:p>23</text:p>
          </table:table-cell>
          <table:table-cell office:value-type="float" office:value="62.35557713" table:style-name="ce6">
            <text:p>62.35557713</text:p>
          </table:table-cell>
          <table:table-cell office:value-type="float" office:value="18.5" table:style-name="ce6">
            <text:p>18.5</text:p>
          </table:table-cell>
          <table:table-cell office:value-type="float" office:value="105.3" table:style-name="ce6">
            <text:p>105.3</text:p>
          </table:table-cell>
          <table:table-cell office:value-type="float" office:value="66.5" table:style-name="ce6">
            <text:p>66.5</text:p>
          </table:table-cell>
          <table:table-cell office:value-type="float" office:value="183.3" table:style-name="ce6">
            <text:p>183.3</text:p>
          </table:table-cell>
          <table:table-cell office:value-type="float" office:value="3.44" table:style-name="ce6">
            <text:p>3.44</text:p>
          </table:table-cell>
          <table:table-cell office:value-type="date" office:date-value="2011-03-07T00:00:00" table:style-name="ce7">
            <text:p>3/7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Avalon</text:p>
          </table:table-cell>
          <table:table-cell office:value-type="float" office:value="63849" table:style-name="ce11">
            <text:p>63849</text:p>
          </table:table-cell>
          <table:table-cell office:value-type="currency" office:value="25545" table:style-name="ce12">
            <text:p>$25,545</text:p>
          </table:table-cell>
          <table:table-cell office:value-type="currency" office:value="18140" table:style-name="ce12">
            <text:p>$18,140</text:p>
          </table:table-cell>
          <table:table-cell office:value-type="percentage" office:value="0.71011939714229788" table:formula="of:=SUM([.E137]/[.D137])" table:style-name="ce13">
            <text:p>71%</text:p>
          </table:table-cell>
          <table:table-cell office:value-type="string" office:string-value="GOOD" table:formula="of:=IF([.F137]&gt;69%; &quot;GOOD&quot;; &quot;POOR&quot;)" table:style-name="ce21">
            <text:p>GOOD</text:p>
          </table:table-cell>
          <table:table-cell office:value-type="float" office:value="3" table:style-name="ce6">
            <text:p>3</text:p>
          </table:table-cell>
          <table:table-cell office:value-type="float" office:value="210" table:style-name="ce6">
            <text:p>210</text:p>
          </table:table-cell>
          <table:table-cell office:value-type="string" office:string-value="Medium HP" table:formula="of:=COM.MICROSOFT.IFS([.I137]&gt;299;&quot;High HP&quot;;[.I137]&gt;99;&quot;Medium HP&quot;;[.I13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84.911898260000001" table:style-name="ce6">
            <text:p>84.91189826</text:p>
          </table:table-cell>
          <table:table-cell office:value-type="float" office:value="18.5" table:style-name="ce6">
            <text:p>18.5</text:p>
          </table:table-cell>
          <table:table-cell office:value-type="float" office:value="107.1" table:style-name="ce6">
            <text:p>107.1</text:p>
          </table:table-cell>
          <table:table-cell office:value-type="float" office:value="71.7" table:style-name="ce6">
            <text:p>71.7</text:p>
          </table:table-cell>
          <table:table-cell office:value-type="float" office:value="191.9" table:style-name="ce6">
            <text:p>191.9</text:p>
          </table:table-cell>
          <table:table-cell office:value-type="float" office:value="3.4169999999999998" table:style-name="ce6">
            <text:p>3.417</text:p>
          </table:table-cell>
          <table:table-cell office:value-type="date" office:date-value="2011-08-31T00:00:00" table:style-name="ce7">
            <text:p>8/3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Camry</text:p>
          </table:table-cell>
          <table:table-cell office:value-type="float" office:value="247994" table:style-name="ce11">
            <text:p>247994</text:p>
          </table:table-cell>
          <table:table-cell office:value-type="currency" office:value="17518" table:style-name="ce12">
            <text:p>$17,518</text:p>
          </table:table-cell>
          <table:table-cell office:value-type="currency" office:value="13245" table:style-name="ce12">
            <text:p>$13,245</text:p>
          </table:table-cell>
          <table:table-cell office:value-type="percentage" office:value="0.75607946112569924" table:formula="of:=SUM([.E138]/[.D138])" table:style-name="ce13">
            <text:p>76%</text:p>
          </table:table-cell>
          <table:table-cell office:value-type="string" office:string-value="GOOD" table:formula="of:=IF([.F138]&gt;69%; &quot;GOOD&quot;; &quot;POOR&quot;)" table:style-name="ce21">
            <text:p>GOOD</text:p>
          </table:table-cell>
          <table:table-cell office:value-type="float" office:value="2.2000000000000002" table:style-name="ce6">
            <text:p>2.2</text:p>
          </table:table-cell>
          <table:table-cell office:value-type="float" office:value="133" table:style-name="ce6">
            <text:p>133</text:p>
          </table:table-cell>
          <table:table-cell office:value-type="string" office:string-value="Medium HP" table:formula="of:=COM.MICROSOFT.IFS([.I138]&gt;299;&quot;High HP&quot;;[.I138]&gt;99;&quot;Medium HP&quot;;[.I13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54.372419649999998" table:style-name="ce6">
            <text:p>54.37241965</text:p>
          </table:table-cell>
          <table:table-cell office:value-type="float" office:value="18.5" table:style-name="ce6">
            <text:p>18.5</text:p>
          </table:table-cell>
          <table:table-cell office:value-type="float" office:value="105.2" table:style-name="ce6">
            <text:p>105.2</text:p>
          </table:table-cell>
          <table:table-cell office:value-type="float" office:value="70.099999999999994" table:style-name="ce6">
            <text:p>70.1</text:p>
          </table:table-cell>
          <table:table-cell office:value-type="float" office:value="188.5" table:style-name="ce6">
            <text:p>188.5</text:p>
          </table:table-cell>
          <table:table-cell office:value-type="float" office:value="2.9980000000000002" table:style-name="ce6">
            <text:p>2.998</text:p>
          </table:table-cell>
          <table:table-cell office:value-type="date" office:date-value="2011-02-10T00:00:00" table:style-name="ce7">
            <text:p>2/10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Celica</text:p>
          </table:table-cell>
          <table:table-cell office:value-type="float" office:value="33269" table:style-name="ce11">
            <text:p>33269</text:p>
          </table:table-cell>
          <table:table-cell office:value-type="currency" office:value="16875" table:style-name="ce12">
            <text:p>$16,875</text:p>
          </table:table-cell>
          <table:table-cell office:value-type="currency" office:value="15445" table:style-name="ce12">
            <text:p>$15,445</text:p>
          </table:table-cell>
          <table:table-cell office:value-type="percentage" office:value="0.91525925925925922" table:formula="of:=SUM([.E139]/[.D139])" table:style-name="ce13">
            <text:p>92%</text:p>
          </table:table-cell>
          <table:table-cell office:value-type="string" office:string-value="GOOD" table:formula="of:=IF([.F139]&gt;69%; &quot;GOOD&quot;; &quot;POOR&quot;)" table:style-name="ce21">
            <text:p>GOOD</text:p>
          </table:table-cell>
          <table:table-cell office:value-type="float" office:value="1.8" table:style-name="ce6">
            <text:p>1.8</text:p>
          </table:table-cell>
          <table:table-cell office:value-type="float" office:value="140" table:style-name="ce6">
            <text:p>140</text:p>
          </table:table-cell>
          <table:table-cell office:value-type="string" office:string-value="Medium HP" table:formula="of:=COM.MICROSOFT.IFS([.I139]&gt;299;&quot;High HP&quot;;[.I139]&gt;99;&quot;Medium HP&quot;;[.I13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1" table:style-name="ce6">
            <text:p>31</text:p>
          </table:table-cell>
          <table:table-cell office:value-type="float" office:value="56.496030339999997" table:style-name="ce6">
            <text:p>56.49603034</text:p>
          </table:table-cell>
          <table:table-cell office:value-type="float" office:value="14.5" table:style-name="ce6">
            <text:p>14.5</text:p>
          </table:table-cell>
          <table:table-cell office:value-type="float" office:value="102.4" table:style-name="ce6">
            <text:p>102.4</text:p>
          </table:table-cell>
          <table:table-cell office:value-type="float" office:value="68.3" table:style-name="ce6">
            <text:p>68.3</text:p>
          </table:table-cell>
          <table:table-cell office:value-type="float" office:value="170.5" table:style-name="ce6">
            <text:p>170.5</text:p>
          </table:table-cell>
          <table:table-cell office:value-type="float" office:value="2.4249999999999998" table:style-name="ce6">
            <text:p>2.425</text:p>
          </table:table-cell>
          <table:table-cell office:value-type="date" office:date-value="2012-12-29T00:00:00" table:style-name="ce7">
            <text:p>12/29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Corolla</text:p>
          </table:table-cell>
          <table:table-cell office:value-type="float" office:value="142535" table:style-name="ce11">
            <text:p>142535</text:p>
          </table:table-cell>
          <table:table-cell office:value-type="currency" office:value="13108" table:style-name="ce12">
            <text:p>$13,108</text:p>
          </table:table-cell>
          <table:table-cell office:value-type="currency" office:value="10025" table:style-name="ce12">
            <text:p>$10,025</text:p>
          </table:table-cell>
          <table:table-cell office:value-type="percentage" office:value="0.76480012206286241" table:formula="of:=SUM([.E140]/[.D140])" table:style-name="ce13">
            <text:p>76%</text:p>
          </table:table-cell>
          <table:table-cell office:value-type="string" office:string-value="GOOD" table:formula="of:=IF([.F140]&gt;69%; &quot;GOOD&quot;; &quot;POOR&quot;)" table:style-name="ce21">
            <text:p>GOOD</text:p>
          </table:table-cell>
          <table:table-cell office:value-type="float" office:value="1.8" table:style-name="ce6">
            <text:p>1.8</text:p>
          </table:table-cell>
          <table:table-cell office:value-type="float" office:value="120" table:style-name="ce6">
            <text:p>120</text:p>
          </table:table-cell>
          <table:table-cell office:value-type="string" office:string-value="Medium HP" table:formula="of:=COM.MICROSOFT.IFS([.I140]&gt;299;&quot;High HP&quot;;[.I140]&gt;99;&quot;Medium HP&quot;;[.I14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33" table:style-name="ce6">
            <text:p>33</text:p>
          </table:table-cell>
          <table:table-cell office:value-type="float" office:value="47.96897242" table:style-name="ce6">
            <text:p>47.96897242</text:p>
          </table:table-cell>
          <table:table-cell office:value-type="float" office:value="13.2" table:style-name="ce6">
            <text:p>13.2</text:p>
          </table:table-cell>
          <table:table-cell office:value-type="float" office:value="97" table:style-name="ce6">
            <text:p>97</text:p>
          </table:table-cell>
          <table:table-cell office:value-type="float" office:value="66.7" table:style-name="ce6">
            <text:p>66.7</text:p>
          </table:table-cell>
          <table:table-cell office:value-type="float" office:value="174" table:style-name="ce6">
            <text:p>174</text:p>
          </table:table-cell>
          <table:table-cell office:value-type="float" office:value="2.42" table:style-name="ce6">
            <text:p>2.42</text:p>
          </table:table-cell>
          <table:table-cell office:value-type="date" office:date-value="2011-04-11T00:00:00" table:style-name="ce7">
            <text:p>4/11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Land Cruiser</text:p>
          </table:table-cell>
          <table:table-cell office:value-type="float" office:value="9835" table:style-name="ce11">
            <text:p>9835</text:p>
          </table:table-cell>
          <table:table-cell office:value-type="currency" office:value="51728" table:style-name="ce12">
            <text:p>$51,728</text:p>
          </table:table-cell>
          <table:table-cell office:value-type="currency" office:value="34080" table:style-name="ce12">
            <text:p>$34,080</text:p>
          </table:table-cell>
          <table:table-cell office:value-type="percentage" office:value="0.65883080729972165" table:formula="of:=SUM([.E141]/[.D141])" table:style-name="ce13">
            <text:p>66%</text:p>
          </table:table-cell>
          <table:table-cell office:value-type="string" office:string-value="POOR" table:formula="of:=IF([.F141]&gt;69%; &quot;GOOD&quot;; &quot;POOR&quot;)" table:style-name="ce21">
            <text:p>POOR</text:p>
          </table:table-cell>
          <table:table-cell office:value-type="float" office:value="4.7" table:style-name="ce6">
            <text:p>4.7</text:p>
          </table:table-cell>
          <table:table-cell office:value-type="float" office:value="230" table:style-name="ce6">
            <text:p>230</text:p>
          </table:table-cell>
          <table:table-cell office:value-type="string" office:string-value="Medium HP" table:formula="of:=COM.MICROSOFT.IFS([.I141]&gt;299;&quot;High HP&quot;;[.I141]&gt;99;&quot;Medium HP&quot;;[.I14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15" table:style-name="ce6">
            <text:p>15</text:p>
          </table:table-cell>
          <table:table-cell office:value-type="float" office:value="102.5289842" table:style-name="ce6">
            <text:p>102.5289842</text:p>
          </table:table-cell>
          <table:table-cell office:value-type="float" office:value="25.4" table:style-name="ce6">
            <text:p>25.4</text:p>
          </table:table-cell>
          <table:table-cell office:value-type="float" office:value="112.2" table:style-name="ce6">
            <text:p>112.2</text:p>
          </table:table-cell>
          <table:table-cell office:value-type="float" office:value="76.400000000000006" table:style-name="ce6">
            <text:p>76.4</text:p>
          </table:table-cell>
          <table:table-cell office:value-type="float" office:value="192.5" table:style-name="ce6">
            <text:p>192.5</text:p>
          </table:table-cell>
          <table:table-cell office:value-type="float" office:value="5.1150000000000002" table:style-name="ce6">
            <text:p>5.115</text:p>
          </table:table-cell>
          <table:table-cell office:value-type="date" office:date-value="2011-09-25T00:00:00" table:style-name="ce7">
            <text:p>9/25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RAV4</text:p>
          </table:table-cell>
          <table:table-cell office:value-type="float" office:value="25106" table:style-name="ce11">
            <text:p>25106</text:p>
          </table:table-cell>
          <table:table-cell office:value-type="currency" office:value="16888" table:style-name="ce12">
            <text:p>$16,888</text:p>
          </table:table-cell>
          <table:table-cell office:value-type="currency" office:value="13325" table:style-name="ce12">
            <text:p>$13,325</text:p>
          </table:table-cell>
          <table:table-cell office:value-type="percentage" office:value="0.78902179062055899" table:formula="of:=SUM([.E142]/[.D142])" table:style-name="ce13">
            <text:p>79%</text:p>
          </table:table-cell>
          <table:table-cell office:value-type="string" office:string-value="GOOD" table:formula="of:=IF([.F142]&gt;69%; &quot;GOOD&quot;; &quot;POOR&quot;)" table:style-name="ce21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27" table:style-name="ce6">
            <text:p>127</text:p>
          </table:table-cell>
          <table:table-cell office:value-type="string" office:string-value="Medium HP" table:formula="of:=COM.MICROSOFT.IFS([.I142]&gt;299;&quot;High HP&quot;;[.I142]&gt;99;&quot;Medium HP&quot;;[.I14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7" table:style-name="ce6">
            <text:p>27</text:p>
          </table:table-cell>
          <table:table-cell office:value-type="float" office:value="51.955108869999997" table:style-name="ce6">
            <text:p>51.95510887</text:p>
          </table:table-cell>
          <table:table-cell office:value-type="float" office:value="15.3" table:style-name="ce6">
            <text:p>15.3</text:p>
          </table:table-cell>
          <table:table-cell office:value-type="float" office:value="94.9" table:style-name="ce6">
            <text:p>94.9</text:p>
          </table:table-cell>
          <table:table-cell office:value-type="float" office:value="66.7" table:style-name="ce6">
            <text:p>66.7</text:p>
          </table:table-cell>
          <table:table-cell office:value-type="float" office:value="163.80000000000001" table:style-name="ce6">
            <text:p>163.8</text:p>
          </table:table-cell>
          <table:table-cell office:value-type="float" office:value="2.6680000000000001" table:style-name="ce6">
            <text:p>2.668</text:p>
          </table:table-cell>
          <table:table-cell office:value-type="date" office:date-value="2011-05-06T00:00:00" table:style-name="ce7">
            <text:p>5/6/20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Sienna</text:p>
          </table:table-cell>
          <table:table-cell office:value-type="float" office:value="65119" table:style-name="ce11">
            <text:p>65119</text:p>
          </table:table-cell>
          <table:table-cell office:value-type="currency" office:value="22368" table:style-name="ce12">
            <text:p>$22,368</text:p>
          </table:table-cell>
          <table:table-cell office:value-type="currency" office:value="18689" table:style-name="ce12">
            <text:p>$18,689</text:p>
          </table:table-cell>
          <table:table-cell office:value-type="percentage" office:value="0.83552396280400576" table:formula="of:=SUM([.E143]/[.D143])" table:style-name="ce13">
            <text:p>84%</text:p>
          </table:table-cell>
          <table:table-cell office:value-type="string" office:string-value="GOOD" table:formula="of:=IF([.F143]&gt;69%; &quot;GOOD&quot;; &quot;POOR&quot;)" table:style-name="ce21">
            <text:p>GOOD</text:p>
          </table:table-cell>
          <table:table-cell office:value-type="float" office:value="3" table:style-name="ce6">
            <text:p>3</text:p>
          </table:table-cell>
          <table:table-cell office:value-type="float" office:value="194" table:style-name="ce6">
            <text:p>194</text:p>
          </table:table-cell>
          <table:table-cell office:value-type="string" office:string-value="Medium HP" table:formula="of:=COM.MICROSOFT.IFS([.I143]&gt;299;&quot;High HP&quot;;[.I143]&gt;99;&quot;Medium HP&quot;;[.I14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2" table:style-name="ce6">
            <text:p>22</text:p>
          </table:table-cell>
          <table:table-cell office:value-type="float" office:value="78.027219470000006" table:style-name="ce6">
            <text:p>78.02721947</text:p>
          </table:table-cell>
          <table:table-cell office:value-type="float" office:value="20.9" table:style-name="ce6">
            <text:p>20.9</text:p>
          </table:table-cell>
          <table:table-cell office:value-type="float" office:value="114.2" table:style-name="ce6">
            <text:p>114.2</text:p>
          </table:table-cell>
          <table:table-cell office:value-type="float" office:value="73.400000000000006" table:style-name="ce6">
            <text:p>73.4</text:p>
          </table:table-cell>
          <table:table-cell office:value-type="float" office:value="193.5" table:style-name="ce6">
            <text:p>193.5</text:p>
          </table:table-cell>
          <table:table-cell office:value-type="float" office:value="3.7589999999999999" table:style-name="ce6">
            <text:p>3.759</text:p>
          </table:table-cell>
          <table:table-cell office:value-type="date" office:date-value="2012-10-05T00:00:00" table:style-name="ce7">
            <text:p>10/5/201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5">
            <text:p>Tacoma</text:p>
          </table:table-cell>
          <table:table-cell office:value-type="float" office:value="84087" table:style-name="ce11">
            <text:p>84087</text:p>
          </table:table-cell>
          <table:table-cell office:value-type="currency" office:value="11528" table:style-name="ce12">
            <text:p>$11,528</text:p>
          </table:table-cell>
          <table:table-cell office:value-type="currency" office:value="9575" table:style-name="ce12">
            <text:p>$9,575</text:p>
          </table:table-cell>
          <table:table-cell office:value-type="percentage" office:value="0.83058639833448988" table:formula="of:=SUM([.E144]/[.D144])" table:style-name="ce13">
            <text:p>83%</text:p>
          </table:table-cell>
          <table:table-cell office:value-type="string" office:string-value="GOOD" table:formula="of:=IF([.F144]&gt;69%; &quot;GOOD&quot;; &quot;POOR&quot;)" table:style-name="ce21">
            <text:p>GOOD</text:p>
          </table:table-cell>
          <table:table-cell office:value-type="float" office:value="2.4" table:style-name="ce6">
            <text:p>2.4</text:p>
          </table:table-cell>
          <table:table-cell office:value-type="float" office:value="142" table:style-name="ce6">
            <text:p>142</text:p>
          </table:table-cell>
          <table:table-cell office:value-type="string" office:string-value="Medium HP" table:formula="of:=COM.MICROSOFT.IFS([.I144]&gt;299;&quot;High HP&quot;;[.I144]&gt;99;&quot;Medium HP&quot;;[.I14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Car</text:p>
          </table:table-cell>
          <table:table-cell office:value-type="float" office:value="23" table:style-name="ce6">
            <text:p>23</text:p>
          </table:table-cell>
          <table:table-cell office:value-type="float" office:value="55.297116580000001" table:style-name="ce6">
            <text:p>55.29711658</text:p>
          </table:table-cell>
          <table:table-cell office:value-type="float" office:value="15.1" table:style-name="ce6">
            <text:p>15.1</text:p>
          </table:table-cell>
          <table:table-cell office:value-type="float" office:value="103.3" table:style-name="ce6">
            <text:p>103.3</text:p>
          </table:table-cell>
          <table:table-cell office:value-type="float" office:value="66.5" table:style-name="ce6">
            <text:p>66.5</text:p>
          </table:table-cell>
          <table:table-cell office:value-type="float" office:value="178.7" table:style-name="ce6">
            <text:p>178.7</text:p>
          </table:table-cell>
          <table:table-cell office:value-type="float" office:value="2.58" table:style-name="ce6">
            <text:p>2.58</text:p>
          </table:table-cell>
          <table:table-cell office:value-type="date" office:date-value="2011-08-01T00:00:00" table:style-name="ce7">
            <text:p>8/1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Volkswagen</text:p>
          </table:table-cell>
          <table:table-cell office:value-type="string" table:style-name="ce5">
            <text:p>Golf</text:p>
          </table:table-cell>
          <table:table-cell office:value-type="float" office:value="9761" table:style-name="ce11">
            <text:p>9761</text:p>
          </table:table-cell>
          <table:table-cell office:value-type="currency" office:value="14900" table:style-name="ce12">
            <text:p>$14,900</text:p>
          </table:table-cell>
          <table:table-cell office:value-type="currency" office:value="11425" table:style-name="ce12">
            <text:p>$11,425</text:p>
          </table:table-cell>
          <table:table-cell office:value-type="percentage" office:value="0.76677852348993292" table:formula="of:=SUM([.E145]/[.D145])" table:style-name="ce13">
            <text:p>77%</text:p>
          </table:table-cell>
          <table:table-cell office:value-type="string" office:string-value="GOOD" table:formula="of:=IF([.F145]&gt;69%; &quot;GOOD&quot;; &quot;POOR&quot;)" table:style-name="ce21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6">
            <text:p>115</text:p>
          </table:table-cell>
          <table:table-cell office:value-type="string" office:string-value="Medium HP" table:formula="of:=COM.MICROSOFT.IFS([.I145]&gt;299;&quot;High HP&quot;;[.I145]&gt;99;&quot;Medium HP&quot;;[.I14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46.943876760000002" table:style-name="ce6">
            <text:p>46.94387676</text:p>
          </table:table-cell>
          <table:table-cell office:value-type="float" office:value="14.5" table:style-name="ce6">
            <text:p>14.5</text:p>
          </table:table-cell>
          <table:table-cell office:value-type="float" office:value="98.9" table:style-name="ce6">
            <text:p>98.9</text:p>
          </table:table-cell>
          <table:table-cell office:value-type="float" office:value="68.3" table:style-name="ce6">
            <text:p>68.3</text:p>
          </table:table-cell>
          <table:table-cell office:value-type="float" office:value="163.30000000000001" table:style-name="ce6">
            <text:p>163.3</text:p>
          </table:table-cell>
          <table:table-cell office:value-type="float" office:value="2.7669999999999999" table:style-name="ce6">
            <text:p>2.767</text:p>
          </table:table-cell>
          <table:table-cell office:value-type="date" office:date-value="2011-01-24T00:00:00" table:style-name="ce7">
            <text:p>1/24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Volkswagen</text:p>
          </table:table-cell>
          <table:table-cell office:value-type="string" table:style-name="ce5">
            <text:p>Jetta</text:p>
          </table:table-cell>
          <table:table-cell office:value-type="float" office:value="83721" table:style-name="ce11">
            <text:p>83721</text:p>
          </table:table-cell>
          <table:table-cell office:value-type="currency" office:value="16700" table:style-name="ce12">
            <text:p>$16,700</text:p>
          </table:table-cell>
          <table:table-cell office:value-type="currency" office:value="13240" table:style-name="ce12">
            <text:p>$13,240</text:p>
          </table:table-cell>
          <table:table-cell office:value-type="percentage" office:value="0.792814371257485" table:formula="of:=SUM([.E146]/[.D146])" table:style-name="ce13">
            <text:p>79%</text:p>
          </table:table-cell>
          <table:table-cell office:value-type="string" office:string-value="GOOD" table:formula="of:=IF([.F146]&gt;69%; &quot;GOOD&quot;; &quot;POOR&quot;)" table:style-name="ce21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6">
            <text:p>115</text:p>
          </table:table-cell>
          <table:table-cell office:value-type="string" office:string-value="Medium HP" table:formula="of:=COM.MICROSOFT.IFS([.I146]&gt;299;&quot;High HP&quot;;[.I146]&gt;99;&quot;Medium HP&quot;;[.I14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47.638236659999997" table:style-name="ce6">
            <text:p>47.63823666</text:p>
          </table:table-cell>
          <table:table-cell office:value-type="float" office:value="14.5" table:style-name="ce6">
            <text:p>14.5</text:p>
          </table:table-cell>
          <table:table-cell office:value-type="float" office:value="98.9" table:style-name="ce6">
            <text:p>98.9</text:p>
          </table:table-cell>
          <table:table-cell office:value-type="float" office:value="68.3" table:style-name="ce6">
            <text:p>68.3</text:p>
          </table:table-cell>
          <table:table-cell office:value-type="float" office:value="172.3" table:style-name="ce6">
            <text:p>172.3</text:p>
          </table:table-cell>
          <table:table-cell office:value-type="float" office:value="2.8530000000000002" table:style-name="ce6">
            <text:p>2.853</text:p>
          </table:table-cell>
          <table:table-cell office:value-type="date" office:date-value="2011-08-27T00:00:00" table:style-name="ce7">
            <text:p>8/27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Volkswagen</text:p>
          </table:table-cell>
          <table:table-cell office:value-type="string" table:style-name="ce5">
            <text:p>Passat</text:p>
          </table:table-cell>
          <table:table-cell office:value-type="float" office:value="51102" table:style-name="ce11">
            <text:p>51102</text:p>
          </table:table-cell>
          <table:table-cell office:value-type="currency" office:value="21200" table:style-name="ce12">
            <text:p>$21,200</text:p>
          </table:table-cell>
          <table:table-cell office:value-type="currency" office:value="16725" table:style-name="ce12">
            <text:p>$16,725</text:p>
          </table:table-cell>
          <table:table-cell office:value-type="percentage" office:value="0.78891509433962259" table:formula="of:=SUM([.E147]/[.D147])" table:style-name="ce13">
            <text:p>79%</text:p>
          </table:table-cell>
          <table:table-cell office:value-type="string" office:string-value="GOOD" table:formula="of:=IF([.F147]&gt;69%; &quot;GOOD&quot;; &quot;POOR&quot;)" table:style-name="ce21">
            <text:p>GOOD</text:p>
          </table:table-cell>
          <table:table-cell office:value-type="float" office:value="1.8" table:style-name="ce6">
            <text:p>1.8</text:p>
          </table:table-cell>
          <table:table-cell office:value-type="float" office:value="150" table:style-name="ce6">
            <text:p>150</text:p>
          </table:table-cell>
          <table:table-cell office:value-type="string" office:string-value="Medium HP" table:formula="of:=COM.MICROSOFT.IFS([.I147]&gt;299;&quot;High HP&quot;;[.I147]&gt;99;&quot;Medium HP&quot;;[.I147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7" table:style-name="ce6">
            <text:p>27</text:p>
          </table:table-cell>
          <table:table-cell office:value-type="float" office:value="61.701381359999999" table:style-name="ce6">
            <text:p>61.70138136</text:p>
          </table:table-cell>
          <table:table-cell office:value-type="float" office:value="16.399999999999999" table:style-name="ce6">
            <text:p>16.4</text:p>
          </table:table-cell>
          <table:table-cell office:value-type="float" office:value="106.4" table:style-name="ce6">
            <text:p>106.4</text:p>
          </table:table-cell>
          <table:table-cell office:value-type="float" office:value="68.5" table:style-name="ce6">
            <text:p>68.5</text:p>
          </table:table-cell>
          <table:table-cell office:value-type="float" office:value="184.1" table:style-name="ce6">
            <text:p>184.1</text:p>
          </table:table-cell>
          <table:table-cell office:value-type="float" office:value="3.0430000000000001" table:style-name="ce6">
            <text:p>3.043</text:p>
          </table:table-cell>
          <table:table-cell office:value-type="date" office:date-value="2012-10-30T00:00:00" table:style-name="ce7">
            <text:p>10/30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Volkswagen</text:p>
          </table:table-cell>
          <table:table-cell office:value-type="string" table:style-name="ce5">
            <text:p>Cabrio</text:p>
          </table:table-cell>
          <table:table-cell office:value-type="float" office:value="9569" table:style-name="ce11">
            <text:p>9569</text:p>
          </table:table-cell>
          <table:table-cell office:value-type="currency" office:value="19990" table:style-name="ce12">
            <text:p>$19,990</text:p>
          </table:table-cell>
          <table:table-cell office:value-type="currency" office:value="16575" table:style-name="ce12">
            <text:p>$16,575</text:p>
          </table:table-cell>
          <table:table-cell office:value-type="percentage" office:value="0.82916458229114554" table:formula="of:=SUM([.E148]/[.D148])" table:style-name="ce13">
            <text:p>83%</text:p>
          </table:table-cell>
          <table:table-cell office:value-type="string" office:string-value="GOOD" table:formula="of:=IF([.F148]&gt;69%; &quot;GOOD&quot;; &quot;POOR&quot;)" table:style-name="ce21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6">
            <text:p>115</text:p>
          </table:table-cell>
          <table:table-cell office:value-type="string" office:string-value="Medium HP" table:formula="of:=COM.MICROSOFT.IFS([.I148]&gt;299;&quot;High HP&quot;;[.I148]&gt;99;&quot;Medium HP&quot;;[.I148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48.907372250000002" table:style-name="ce6">
            <text:p>48.90737225</text:p>
          </table:table-cell>
          <table:table-cell office:value-type="float" office:value="13.7" table:style-name="ce6">
            <text:p>13.7</text:p>
          </table:table-cell>
          <table:table-cell office:value-type="float" office:value="97.4" table:style-name="ce6">
            <text:p>97.4</text:p>
          </table:table-cell>
          <table:table-cell office:value-type="float" office:value="66.7" table:style-name="ce6">
            <text:p>66.7</text:p>
          </table:table-cell>
          <table:table-cell office:value-type="float" office:value="160.4" table:style-name="ce6">
            <text:p>160.4</text:p>
          </table:table-cell>
          <table:table-cell office:value-type="float" office:value="3.0790000000000002" table:style-name="ce6">
            <text:p>3.079</text:p>
          </table:table-cell>
          <table:table-cell office:value-type="date" office:date-value="2011-05-31T00:00:00" table:style-name="ce7">
            <text:p>5/31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Volkswagen</text:p>
          </table:table-cell>
          <table:table-cell office:value-type="string" table:style-name="ce5">
            <text:p>GTI</text:p>
          </table:table-cell>
          <table:table-cell office:value-type="float" office:value="5596" table:style-name="ce11">
            <text:p>5596</text:p>
          </table:table-cell>
          <table:table-cell office:value-type="currency" office:value="17500" table:style-name="ce12">
            <text:p>$17,500</text:p>
          </table:table-cell>
          <table:table-cell office:value-type="currency" office:value="13760" table:style-name="ce12">
            <text:p>$13,760</text:p>
          </table:table-cell>
          <table:table-cell office:value-type="percentage" office:value="0.78628571428571425" table:formula="of:=SUM([.E149]/[.D149])" table:style-name="ce13">
            <text:p>79%</text:p>
          </table:table-cell>
          <table:table-cell office:value-type="string" office:string-value="GOOD" table:formula="of:=IF([.F149]&gt;69%; &quot;GOOD&quot;; &quot;POOR&quot;)" table:style-name="ce21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6">
            <text:p>115</text:p>
          </table:table-cell>
          <table:table-cell office:value-type="string" office:string-value="Medium HP" table:formula="of:=COM.MICROSOFT.IFS([.I149]&gt;299;&quot;High HP&quot;;[.I149]&gt;99;&quot;Medium HP&quot;;[.I149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47.946841059999997" table:style-name="ce6">
            <text:p>47.94684106</text:p>
          </table:table-cell>
          <table:table-cell office:value-type="float" office:value="14.6" table:style-name="ce6">
            <text:p>14.6</text:p>
          </table:table-cell>
          <table:table-cell office:value-type="float" office:value="98.9" table:style-name="ce6">
            <text:p>98.9</text:p>
          </table:table-cell>
          <table:table-cell office:value-type="float" office:value="68.3" table:style-name="ce6">
            <text:p>68.3</text:p>
          </table:table-cell>
          <table:table-cell office:value-type="float" office:value="163.30000000000001" table:style-name="ce6">
            <text:p>163.3</text:p>
          </table:table-cell>
          <table:table-cell office:value-type="float" office:value="2.762" table:style-name="ce6">
            <text:p>2.762</text:p>
          </table:table-cell>
          <table:table-cell office:value-type="date" office:date-value="2011-04-01T00:00:00" table:style-name="ce7">
            <text:p>4/1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Volkswagen</text:p>
          </table:table-cell>
          <table:table-cell office:value-type="string" table:style-name="ce5">
            <text:p>Beetle</text:p>
          </table:table-cell>
          <table:table-cell office:value-type="float" office:value="49463" table:style-name="ce11">
            <text:p>49463</text:p>
          </table:table-cell>
          <table:table-cell office:value-type="currency" office:value="15900" table:style-name="ce12">
            <text:p>$15,900</text:p>
          </table:table-cell>
          <table:table-cell office:value-type="currency" office:value="11986" table:style-name="ce12">
            <text:p>$11,986</text:p>
          </table:table-cell>
          <table:table-cell office:value-type="percentage" office:value="0.75383647798742137" table:formula="of:=SUM([.E150]/[.D150])" table:style-name="ce13">
            <text:p>75%</text:p>
          </table:table-cell>
          <table:table-cell office:value-type="string" office:string-value="GOOD" table:formula="of:=IF([.F150]&gt;69%; &quot;GOOD&quot;; &quot;POOR&quot;)" table:style-name="ce21">
            <text:p>GOOD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6">
            <text:p>115</text:p>
          </table:table-cell>
          <table:table-cell office:value-type="string" office:string-value="Medium HP" table:formula="of:=COM.MICROSOFT.IFS([.I150]&gt;299;&quot;High HP&quot;;[.I150]&gt;99;&quot;Medium HP&quot;;[.I150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6" table:style-name="ce6">
            <text:p>26</text:p>
          </table:table-cell>
          <table:table-cell office:value-type="float" office:value="47.329632259999997" table:style-name="ce6">
            <text:p>47.32963226</text:p>
          </table:table-cell>
          <table:table-cell office:value-type="float" office:value="14.5" table:style-name="ce6">
            <text:p>14.5</text:p>
          </table:table-cell>
          <table:table-cell office:value-type="float" office:value="98.9" table:style-name="ce6">
            <text:p>98.9</text:p>
          </table:table-cell>
          <table:table-cell office:value-type="float" office:value="67.900000000000006" table:style-name="ce6">
            <text:p>67.9</text:p>
          </table:table-cell>
          <table:table-cell office:value-type="float" office:value="161.1" table:style-name="ce6">
            <text:p>161.1</text:p>
          </table:table-cell>
          <table:table-cell office:value-type="float" office:value="2.7690000000000001" table:style-name="ce6">
            <text:p>2.769</text:p>
          </table:table-cell>
          <table:table-cell office:value-type="date" office:date-value="2011-10-20T00:00:00" table:style-name="ce7">
            <text:p>10/20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Volvo</text:p>
          </table:table-cell>
          <table:table-cell office:value-type="string" table:style-name="ce5">
            <text:p>S40</text:p>
          </table:table-cell>
          <table:table-cell office:value-type="float" office:value="16957" table:style-name="ce11">
            <text:p>16957</text:p>
          </table:table-cell>
          <table:table-cell office:value-type="currency" office:value="23400" table:style-name="ce12">
            <text:p>$23,400</text:p>
          </table:table-cell>
          <table:table-cell office:value-type="currency" office:value="14334" table:style-name="ce12">
            <text:p>$14,334</text:p>
          </table:table-cell>
          <table:table-cell office:value-type="percentage" office:value="0.61256410256410254" table:formula="of:=SUM([.E151]/[.D151])" table:style-name="ce13">
            <text:p>61%</text:p>
          </table:table-cell>
          <table:table-cell office:value-type="string" office:string-value="POOR" table:formula="of:=IF([.F151]&gt;69%; &quot;GOOD&quot;; &quot;POOR&quot;)" table:style-name="ce21">
            <text:p>POOR</text:p>
          </table:table-cell>
          <table:table-cell office:value-type="float" office:value="1.9" table:style-name="ce6">
            <text:p>1.9</text:p>
          </table:table-cell>
          <table:table-cell office:value-type="float" office:value="160" table:style-name="ce6">
            <text:p>160</text:p>
          </table:table-cell>
          <table:table-cell office:value-type="string" office:string-value="Medium HP" table:formula="of:=COM.MICROSOFT.IFS([.I151]&gt;299;&quot;High HP&quot;;[.I151]&gt;99;&quot;Medium HP&quot;;[.I151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66.113056799999995" table:style-name="ce6">
            <text:p>66.1130568</text:p>
          </table:table-cell>
          <table:table-cell office:value-type="float" office:value="15.8" table:style-name="ce6">
            <text:p>15.8</text:p>
          </table:table-cell>
          <table:table-cell office:value-type="float" office:value="100.5" table:style-name="ce6">
            <text:p>100.5</text:p>
          </table:table-cell>
          <table:table-cell office:value-type="float" office:value="67.599999999999994" table:style-name="ce6">
            <text:p>67.6</text:p>
          </table:table-cell>
          <table:table-cell office:value-type="float" office:value="176.6" table:style-name="ce6">
            <text:p>176.6</text:p>
          </table:table-cell>
          <table:table-cell office:value-type="float" office:value="2.9980000000000002" table:style-name="ce6">
            <text:p>2.998</text:p>
          </table:table-cell>
          <table:table-cell office:value-type="date" office:date-value="2011-02-18T00:00:00" table:style-name="ce7">
            <text:p>2/18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Volvo</text:p>
          </table:table-cell>
          <table:table-cell office:value-type="string" table:style-name="ce5">
            <text:p>V40</text:p>
          </table:table-cell>
          <table:table-cell office:value-type="float" office:value="3545" table:style-name="ce11">
            <text:p>3545</text:p>
          </table:table-cell>
          <table:table-cell office:value-type="currency" office:value="24400" table:style-name="ce12">
            <text:p>$24,400</text:p>
          </table:table-cell>
          <table:table-cell office:value-type="currency" office:value="15252" table:style-name="ce12">
            <text:p>$15,252</text:p>
          </table:table-cell>
          <table:table-cell office:value-type="percentage" office:value="0.62508196721311471" table:formula="of:=SUM([.E152]/[.D152])" table:style-name="ce13">
            <text:p>63%</text:p>
          </table:table-cell>
          <table:table-cell office:value-type="string" office:string-value="POOR" table:formula="of:=IF([.F152]&gt;69%; &quot;GOOD&quot;; &quot;POOR&quot;)" table:style-name="ce21">
            <text:p>POOR</text:p>
          </table:table-cell>
          <table:table-cell office:value-type="float" office:value="1.9" table:style-name="ce6">
            <text:p>1.9</text:p>
          </table:table-cell>
          <table:table-cell office:value-type="float" office:value="160" table:style-name="ce6">
            <text:p>160</text:p>
          </table:table-cell>
          <table:table-cell office:value-type="string" office:string-value="Medium HP" table:formula="of:=COM.MICROSOFT.IFS([.I152]&gt;299;&quot;High HP&quot;;[.I152]&gt;99;&quot;Medium HP&quot;;[.I152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66.498812299999997" table:style-name="ce6">
            <text:p>66.4988123</text:p>
          </table:table-cell>
          <table:table-cell office:value-type="float" office:value="15.8" table:style-name="ce6">
            <text:p>15.8</text:p>
          </table:table-cell>
          <table:table-cell office:value-type="float" office:value="100.5" table:style-name="ce6">
            <text:p>100.5</text:p>
          </table:table-cell>
          <table:table-cell office:value-type="float" office:value="67.599999999999994" table:style-name="ce6">
            <text:p>67.6</text:p>
          </table:table-cell>
          <table:table-cell office:value-type="float" office:value="176.6" table:style-name="ce6">
            <text:p>176.6</text:p>
          </table:table-cell>
          <table:table-cell office:value-type="float" office:value="3.0419999999999998" table:style-name="ce6">
            <text:p>3.042</text:p>
          </table:table-cell>
          <table:table-cell office:value-type="date" office:date-value="2011-09-21T00:00:00" table:style-name="ce7">
            <text:p>9/21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Volvo</text:p>
          </table:table-cell>
          <table:table-cell office:value-type="string" table:style-name="ce5">
            <text:p>S70</text:p>
          </table:table-cell>
          <table:table-cell office:value-type="float" office:value="15245" table:style-name="ce11">
            <text:p>15245</text:p>
          </table:table-cell>
          <table:table-cell office:value-type="currency" office:value="27500" table:style-name="ce12">
            <text:p>$27,500</text:p>
          </table:table-cell>
          <table:table-cell office:value-type="currency" office:value="18900" table:style-name="ce12">
            <text:p>$18,900</text:p>
          </table:table-cell>
          <table:table-cell office:value-type="percentage" office:value="0.68727272727272726" table:formula="of:=SUM([.E153]/[.D153])" table:style-name="ce13">
            <text:p>69%</text:p>
          </table:table-cell>
          <table:table-cell office:value-type="string" office:string-value="POOR" table:formula="of:=IF([.F153]&gt;69%; &quot;GOOD&quot;; &quot;POOR&quot;)" table:style-name="ce21">
            <text:p>POOR</text:p>
          </table:table-cell>
          <table:table-cell office:value-type="float" office:value="2.4" table:style-name="ce6">
            <text:p>2.4</text:p>
          </table:table-cell>
          <table:table-cell office:value-type="float" office:value="168" table:style-name="ce6">
            <text:p>168</text:p>
          </table:table-cell>
          <table:table-cell office:value-type="string" office:string-value="Medium HP" table:formula="of:=COM.MICROSOFT.IFS([.I153]&gt;299;&quot;High HP&quot;;[.I153]&gt;99;&quot;Medium HP&quot;;[.I153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70.654495449999999" table:style-name="ce6">
            <text:p>70.65449545</text:p>
          </table:table-cell>
          <table:table-cell office:value-type="float" office:value="17.899999999999999" table:style-name="ce6">
            <text:p>17.9</text:p>
          </table:table-cell>
          <table:table-cell office:value-type="float" office:value="104.9" table:style-name="ce6">
            <text:p>104.9</text:p>
          </table:table-cell>
          <table:table-cell office:value-type="float" office:value="69.3" table:style-name="ce6">
            <text:p>69.3</text:p>
          </table:table-cell>
          <table:table-cell office:value-type="float" office:value="185.9" table:style-name="ce6">
            <text:p>185.9</text:p>
          </table:table-cell>
          <table:table-cell office:value-type="float" office:value="3.2080000000000002" table:style-name="ce6">
            <text:p>3.208</text:p>
          </table:table-cell>
          <table:table-cell office:value-type="date" office:date-value="2012-11-24T00:00:00" table:style-name="ce7">
            <text:p>11/24/2012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Volvo</text:p>
          </table:table-cell>
          <table:table-cell office:value-type="string" table:style-name="ce5">
            <text:p>V70</text:p>
          </table:table-cell>
          <table:table-cell office:value-type="float" office:value="17531" table:style-name="ce11">
            <text:p>17531</text:p>
          </table:table-cell>
          <table:table-cell office:value-type="currency" office:value="28800" table:style-name="ce12">
            <text:p>$28,800</text:p>
          </table:table-cell>
          <table:table-cell office:value-type="currency" office:value="20223" table:style-name="ce12">
            <text:p>$20,223</text:p>
          </table:table-cell>
          <table:table-cell office:value-type="percentage" office:value="0.70218749999999996" table:formula="of:=SUM([.E154]/[.D154])" table:style-name="ce13">
            <text:p>70%</text:p>
          </table:table-cell>
          <table:table-cell office:value-type="string" office:string-value="GOOD" table:formula="of:=IF([.F154]&gt;69%; &quot;GOOD&quot;; &quot;POOR&quot;)" table:style-name="ce21">
            <text:p>GOOD</text:p>
          </table:table-cell>
          <table:table-cell office:value-type="float" office:value="2.4" table:style-name="ce6">
            <text:p>2.4</text:p>
          </table:table-cell>
          <table:table-cell office:value-type="float" office:value="168" table:style-name="ce6">
            <text:p>168</text:p>
          </table:table-cell>
          <table:table-cell office:value-type="string" office:string-value="Medium HP" table:formula="of:=COM.MICROSOFT.IFS([.I154]&gt;299;&quot;High HP&quot;;[.I154]&gt;99;&quot;Medium HP&quot;;[.I154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5" table:style-name="ce6">
            <text:p>25</text:p>
          </table:table-cell>
          <table:table-cell office:value-type="float" office:value="71.1559776" table:style-name="ce6">
            <text:p>71.1559776</text:p>
          </table:table-cell>
          <table:table-cell office:value-type="float" office:value="17.899999999999999" table:style-name="ce6">
            <text:p>17.9</text:p>
          </table:table-cell>
          <table:table-cell office:value-type="float" office:value="104.9" table:style-name="ce6">
            <text:p>104.9</text:p>
          </table:table-cell>
          <table:table-cell office:value-type="float" office:value="69.3" table:style-name="ce6">
            <text:p>69.3</text:p>
          </table:table-cell>
          <table:table-cell office:value-type="float" office:value="186.2" table:style-name="ce6">
            <text:p>186.2</text:p>
          </table:table-cell>
          <table:table-cell office:value-type="float" office:value="3.2589999999999999" table:style-name="ce6">
            <text:p>3.259</text:p>
          </table:table-cell>
          <table:table-cell office:value-type="date" office:date-value="2011-06-25T00:00:00" table:style-name="ce7">
            <text:p>6/25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Volvo</text:p>
          </table:table-cell>
          <table:table-cell office:value-type="string" table:style-name="ce5">
            <text:p>C70</text:p>
          </table:table-cell>
          <table:table-cell office:value-type="float" office:value="3493" table:style-name="ce11">
            <text:p>3493</text:p>
          </table:table-cell>
          <table:table-cell office:value-type="currency" office:value="45500" table:style-name="ce12">
            <text:p>$45,500</text:p>
          </table:table-cell>
          <table:table-cell office:value-type="currency" office:value="34175" table:style-name="ce12">
            <text:p>$34,175</text:p>
          </table:table-cell>
          <table:table-cell office:value-type="percentage" office:value="0.75109890109890109" table:formula="of:=SUM([.E155]/[.D155])" table:style-name="ce13">
            <text:p>75%</text:p>
          </table:table-cell>
          <table:table-cell office:value-type="string" office:string-value="GOOD" table:formula="of:=IF([.F155]&gt;69%; &quot;GOOD&quot;; &quot;POOR&quot;)" table:style-name="ce21">
            <text:p>GOOD</text:p>
          </table:table-cell>
          <table:table-cell office:value-type="float" office:value="2.2999999999999998" table:style-name="ce6">
            <text:p>2.3</text:p>
          </table:table-cell>
          <table:table-cell office:value-type="float" office:value="236" table:style-name="ce6">
            <text:p>236</text:p>
          </table:table-cell>
          <table:table-cell office:value-type="string" office:string-value="Medium HP" table:formula="of:=COM.MICROSOFT.IFS([.I155]&gt;299;&quot;High HP&quot;;[.I155]&gt;99;&quot;Medium HP&quot;;[.I155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3" table:style-name="ce6">
            <text:p>23</text:p>
          </table:table-cell>
          <table:table-cell office:value-type="float" office:value="101.6233572" table:style-name="ce6">
            <text:p>101.6233572</text:p>
          </table:table-cell>
          <table:table-cell office:value-type="float" office:value="18.5" table:style-name="ce6">
            <text:p>18.5</text:p>
          </table:table-cell>
          <table:table-cell office:value-type="float" office:value="104.9" table:style-name="ce6">
            <text:p>104.9</text:p>
          </table:table-cell>
          <table:table-cell office:value-type="float" office:value="71.5" table:style-name="ce6">
            <text:p>71.5</text:p>
          </table:table-cell>
          <table:table-cell office:value-type="float" office:value="185.7" table:style-name="ce6">
            <text:p>185.7</text:p>
          </table:table-cell>
          <table:table-cell office:value-type="float" office:value="3.601" table:style-name="ce6">
            <text:p>3.601</text:p>
          </table:table-cell>
          <table:table-cell office:value-type="date" office:date-value="2011-04-26T00:00:00" table:style-name="ce7">
            <text:p>4/26/2011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4">
            <text:p>Volvo</text:p>
          </table:table-cell>
          <table:table-cell office:value-type="string" table:style-name="ce5">
            <text:p>S80</text:p>
          </table:table-cell>
          <table:table-cell office:value-type="float" office:value="18969" table:style-name="ce11">
            <text:p>18969</text:p>
          </table:table-cell>
          <table:table-cell office:value-type="currency" office:value="36000" table:style-name="ce12">
            <text:p>$36,000</text:p>
          </table:table-cell>
          <table:table-cell office:value-type="currency" office:value="26403" table:style-name="ce12">
            <text:p>$26,403</text:p>
          </table:table-cell>
          <table:table-cell office:value-type="percentage" office:value="0.73341666666666672" table:formula="of:=SUM([.E156]/[.D156])" table:style-name="ce13">
            <text:p>73%</text:p>
          </table:table-cell>
          <table:table-cell office:value-type="string" office:string-value="GOOD" table:formula="of:=IF([.F156]&gt;69%; &quot;GOOD&quot;; &quot;POOR&quot;)" table:style-name="ce21">
            <text:p>GOOD</text:p>
          </table:table-cell>
          <table:table-cell office:value-type="float" office:value="2.9" table:style-name="ce6">
            <text:p>2.9</text:p>
          </table:table-cell>
          <table:table-cell office:value-type="float" office:value="201" table:style-name="ce6">
            <text:p>201</text:p>
          </table:table-cell>
          <table:table-cell office:value-type="string" office:string-value="Medium HP" table:formula="of:=COM.MICROSOFT.IFS([.I156]&gt;299;&quot;High HP&quot;;[.I156]&gt;99;&quot;Medium HP&quot;;[.I156]&lt;100;&quot;Low HP&quot;)" table:number-matrix-columns-spanned="1" table:number-matrix-rows-spanned="1" table:style-name="ce6">
            <text:p>Medium HP</text:p>
          </table:table-cell>
          <table:table-cell office:value-type="string" table:style-name="ce6">
            <text:p>Passenger</text:p>
          </table:table-cell>
          <table:table-cell office:value-type="float" office:value="24" table:style-name="ce6">
            <text:p>24</text:p>
          </table:table-cell>
          <table:table-cell office:value-type="float" office:value="85.735654510000003" table:style-name="ce6">
            <text:p>85.73565451</text:p>
          </table:table-cell>
          <table:table-cell office:value-type="float" office:value="21.1" table:style-name="ce6">
            <text:p>21.1</text:p>
          </table:table-cell>
          <table:table-cell office:value-type="float" office:value="109.9" table:style-name="ce6">
            <text:p>109.9</text:p>
          </table:table-cell>
          <table:table-cell office:value-type="float" office:value="72.099999999999994" table:style-name="ce6">
            <text:p>72.1</text:p>
          </table:table-cell>
          <table:table-cell office:value-type="float" office:value="189.8" table:style-name="ce6">
            <text:p>189.8</text:p>
          </table:table-cell>
          <table:table-cell office:value-type="float" office:value="3.6" table:style-name="ce6">
            <text:p>3.6</text:p>
          </table:table-cell>
          <table:table-cell office:value-type="date" office:date-value="2011-11-14T00:00:00" table:style-name="ce7">
            <text:p>11/14/2011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Chart 13" svg:x="0.48264in" svg:y="0.17361in" svg:width="4.48611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4" draw:id="id2" draw:style-name="a2" draw:name="Chart 1" svg:x="1.01736in" svg:y="0.17361in" svg:width="4.38194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number-rows-repeated="1048398" table:style-name="ro1">
          <table:table-cell table:number-columns-repeated="16384"/>
        </table:table-row>
      </table:table>
      <table:table table:name="Dashboard" table:style-name="ta2">
        <table:table-column table:style-name="co24" table:number-columns-repeated="16384" table:default-cell-style-name="ce1"/>
        <table:table-row table:style-name="ro1">
          <table:table-cell table:style-name="ce1">
            <draw:frame draw:z-index="5" draw:id="id5" draw:style-name="a5" draw:name="Chart 5" svg:x="-0.01042in" svg:y="-0.01042in" svg:width="6.21875in" svg:height="3.4062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1"/>
          <table:table-cell table:number-columns-repeated="3"/>
          <table:table-cell table:style-name="ce1">
            <draw:frame draw:z-index="2" draw:id="id4" draw:style-name="a4" draw:name="Chart 2" svg:x="0in" svg:y="0in" svg:width="4.82292in" svg:height="3.3541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>
            <draw:frame draw:z-index="1" draw:id="id3" draw:style-name="a3" draw:name="Chart 1" svg:x="0.0625in" svg:y="0.19792in" svg:width="5.40625in" svg:height="3.45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/>
          <table:table-cell table:number-columns-repeated="16375"/>
        </table:table-row>
        <table:table-row table:number-rows-repeated="1048560" table:style-name="ro1">
          <table:table-cell table:number-columns-repeated="16384"/>
        </table:table-row>
      </table:table>
      <table:named-expressions>
        <table:named-expression table:name="Slicer_Manufacturer" table:expression="of:=&quot;&quot;" table:base-cell-address="Car_sales.$A$1"/>
        <table:named-expression table:name="Slicer_Model" table:expression="of:=&quot;&quot;" table:base-cell-address="Car_sales.$A$1"/>
      </table:named-expressions>
      <table:database-ranges>
        <table:database-range table:target-range-address="Car_sales.A1:Car_sales.S156" table:name="Table1" table:display-filter-buttons="true"/>
        <table:database-range table:target-range-address="Column,_Pie,_Sunburst_Chart.A1:Column,_Pie,_Sunburst_Chart.S156" table:name="Table14" table:display-filter-buttons="true">
          <table:filter>
            <table:filter-condition table:field-number="0" table:value="Toyota" table:operator="="/>
          </table:filter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  <style:font-face style:name="Arial" svg:font-family="Arial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text-style style:name="N30">
      <number:text-content/>
    </number:text-style>
    <number:currency-style style:name="N36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38P0" number:language="en" number:country="US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8P1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38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">
      <number:currency-symbol>$</number:currency-symbol>
      <number:number number:decimal-places="2" number:min-decimal-places="2" number:min-integer-digits="1" number:grouping="true"/>
    </number:currency-style>
    <number:date-style style:name="N40">
      <number:day number:style="long"/>
      <number:text>/</number:text>
      <number:month number:style="long"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style style:name="cf1" style:family="table-cell">
      <style:table-cell-properties fo:background-color="#C6E0B4"/>
      <style:text-properties fo:color="#375623" fo:font-weight="bold" style:font-weight-asian="bold" style:font-weight-complex="bold"/>
    </style:style>
    <style:style style:name="cf2" style:family="table-cell">
      <style:table-cell-properties fo:background-color="#FFCCCC"/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Steve Ryan</meta:initial-creator>
    <dc:creator/>
    <meta:creation-date>2020-10-30T14:29:40Z</meta:creation-date>
    <dc:date>2026-07-07T13:40:5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decimal-places="2" number:min-integer-digits="1" number:grouping="true"/>
    </number:currency-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85%" draw:stroke="solid" svg:stroke-width="0.01042in" svg:stroke-color="#ffffff" svg:stroke-opacity="5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85%" draw:stroke="solid" svg:stroke-width="0.01042in" svg:stroke-color="#ffffff" svg:stroke-opacity="5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svg:stroke-width="0.01042in" svg:stroke-color="#bfbfbf" svg:stroke-opacity="36%" draw:stroke-linejoin="round" svg:stroke-linecap="butt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1" style:data-style-name="N36">
      <style:chart-properties chart:gap-width="65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52.25pt" svg:width="582.75pt" chart:style-name="Crt0"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Average of Year Resale Value</text:p>
              </table:table-cell>
              <table:table-cell office:value-type="string">
                <text:p>Average of Price</text:p>
              </table:table-cell>
            </table:table-row>
          </table:table-header-rows>
          <table:table-row>
            <table:table-cell office:value-type="string">
              <text:p>Audi</text:p>
            </table:table-cell>
            <table:table-cell office:value-type="float" office:value="28270"/>
            <table:table-cell office:value-type="float" office:value="39980"/>
          </table:table-row>
          <table:table-row>
            <table:table-cell office:value-type="string">
              <text:p>BMW</text:p>
            </table:table-cell>
            <table:table-cell office:value-type="float" office:value="29766.666666666668"/>
            <table:table-cell office:value-type="float" office:value="33096.666666666664"/>
          </table:table-row>
          <table:table-row>
            <table:table-cell office:value-type="string">
              <text:p>Mercedes-B</text:p>
            </table:table-cell>
            <table:table-cell office:value-type="float" office:value="39876.555555555555"/>
            <table:table-cell office:value-type="float" office:value="52916.666666666664"/>
          </table:table-row>
          <table:table-row>
            <table:table-cell office:value-type="string">
              <text:p>Porsche</text:p>
            </table:table-cell>
            <table:table-cell office:value-type="float" office:value="56475"/>
            <table:table-cell office:value-type="float" office:value="62473.333333333336"/>
          </table:table-row>
          <table:table-row>
            <table:table-cell office:value-type="string">
              <text:p>Volkswagen</text:p>
            </table:table-cell>
            <table:table-cell office:value-type="float" office:value="13951.833333333334"/>
            <table:table-cell office:value-type="float" office:value="17698.33333333333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solid" draw:fill-color="#f2f2f2" draw:opacity="100%" draw:stroke="none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gap-width="65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85%" draw:stroke="solid" svg:stroke-width="0.01042in" svg:stroke-color="#2f5597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6.0pt" svg:width="323.0pt" chart:style-name="Crt0">
        <chart:title chart:style-name="CT00">
          <text:p text:style-name="a1" text:class-names="" text:cond-style-name="">Power Perf Factor</text:p>
        </chart:title>
        <chart:plot-area chart:style-name="Plt0" dr3d:transform="matrix (0.90630677104982404 0 -0.42262044052464098 -7.3387636277161994E-2 0.98480759991797095 -0.15737930609027401 0.416199821709347 0.17364904590525401 0.89253779598698402 0cm 0cm 0cm)" dr3d:vrp="(8509.5844880323402 4956.5024955452527 11868.248399605545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Column,_Pie,_Sunburst_Chart.$B$2:.$B$156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Column,_Pie,_Sunburst_Chart.$M$1" chart:values-cell-range-address="Column,_Pie,_Sunburst_Chart.$M$2:.$M$156" chart:class="chart:bar" chart:attached-axis="primary-y" chart:style-name="G0S0">
            <chart:data-point chart:repeated="9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4472c4" draw:opacity="100%" draw:stroke="none" draw:shadow="visible" draw:shadow-offset-x="0in" draw:shadow-offset-y="0in" draw:shadow-color="#000000" draw:shadow-opacity="20%"/>
    </style:style>
    <style:style style:family="chart" style:name="G0S0P1">
      <style:graphic-properties draw:fill="solid" draw:fill-color="#ed7d31" draw:opacity="100%" draw:stroke="none" draw:shadow="visible" draw:shadow-offset-x="0in" draw:shadow-offset-y="0in" draw:shadow-color="#000000" draw:shadow-opacity="20%"/>
    </style:style>
    <style:style style:family="chart" style:name="G0S0P2">
      <style:graphic-properties draw:fill="solid" draw:fill-color="#a5a5a5" draw:opacity="100%" draw:stroke="none" draw:shadow="visible" draw:shadow-offset-x="0in" draw:shadow-offset-y="0in" draw:shadow-color="#000000" draw:shadow-opacity="20%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none" draw:shadow="visible" draw:shadow-offset-x="0in" draw:shadow-offset-y="0in" draw:shadow-color="#000000" draw:shadow-opacity="20%"/>
    </style:style>
    <style:style style:family="chart" style:name="G0S0P4">
      <style:graphic-properties draw:fill="solid" draw:fill-color="#5b9bd5" draw:opacity="100%" draw:stroke="none" draw:shadow="visible" draw:shadow-offset-x="0in" draw:shadow-offset-y="0in" draw:shadow-color="#000000" draw:shadow-opacity="2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center" chart:data-label-series="false">
        <chart:label-separator>
          <text:p text:style-name="a2" text:class-names="" text:cond-style-name="">
</text:p>
        </chart:label-separator>
      </style:chart-properties>
      <style:graphic-properties draw:fill="solid" draw:fill-color="#4472c4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5">
      <style:graphic-properties draw:fill="solid" draw:fill-color="#70ad47" draw:opacity="100%" draw:stroke="none" draw:shadow="visible" draw:shadow-offset-x="0in" draw:shadow-offset-y="0in" draw:shadow-color="#000000" draw:shadow-opacity="20%"/>
    </style:style>
    <style:style style:family="chart" style:name="DL00">
      <style:graphic-properties draw:fill="bitmap" draw:fill-image-name="a3" style:repeat="repea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264478" draw:opacity="100%" draw:stroke="none" draw:shadow="visible" draw:shadow-offset-x="0in" draw:shadow-offset-y="0in" draw:shadow-color="#000000" draw:shadow-opacity="20%"/>
    </style:style>
    <style:style style:family="chart" style:name="G0S0P7">
      <style:graphic-properties draw:fill="solid" draw:fill-color="#9e480e" draw:opacity="100%" draw:stroke="none" draw:shadow="visible" draw:shadow-offset-x="0in" draw:shadow-offset-y="0in" draw:shadow-color="#000000" draw:shadow-opacity="20%"/>
    </style:style>
    <style:style style:family="chart" style:name="G0S0P8">
      <style:graphic-properties draw:fill="solid" draw:fill-color="#636363" draw:opacity="100%" draw:stroke="none" draw:shadow="visible" draw:shadow-offset-x="0in" draw:shadow-offset-y="0in" draw:shadow-color="#000000" draw:shadow-opacity="20%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216.0pt" svg:width="315.5pt" chart:style-name="Crt0">
        <chart:title chart:style-name="CT00">
          <text:p text:style-name="a1" text:class-names="" text:cond-style-name="">Retention %</text:p>
        </chart:title>
        <chart:legend chart:legend-position="end" chart:legend-align="center" chart:style-name="Lgnd"/>
        <chart:plot-area chart:style-name="Plt0" dr3d:transform="matrix (0.90630677104982404 0 -0.42262044052464098 -0.32374628231395164 0.64278692641620028 -0.69427178533792522 0.27165489400549431 0.76604501645034806 0.582562143753307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Column,_Pie,_Sunburst_Chart.$B$2:.$B$156"/>
          </chart:axis>
          <chart:axis chart:dimension="y"/>
          <chart:series chart:label-cell-address="Column,_Pie,_Sunburst_Chart.$F$1" chart:values-cell-range-address="Column,_Pie,_Sunburst_Chart.$F$2:.$F$15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  <draw:fill-image xmlns:xlink="http://www.w3.org/1999/xlink" draw:name="a3" xlink:href="" xlink:show="embed" xlink:actuate="onLoad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solid" draw:fill-color="#f2f2f2" draw:opacity="100%" draw:stroke="none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gap-width="65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85%" draw:stroke="solid" svg:stroke-width="0.01042in" svg:stroke-color="#2f5597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49.0pt" svg:width="389.25pt" chart:style-name="Crt0">
        <chart:title chart:style-name="CT00">
          <text:p text:style-name="a1" text:class-names="" text:cond-style-name="">Power Perf Factor</text:p>
        </chart:title>
        <chart:plot-area chart:style-name="Plt0" dr3d:transform="matrix (0.90630677104982404 0 -0.42262044052464098 -7.3387636277161994E-2 0.98480759991797095 -0.15737930609027401 0.416199821709347 0.17364904590525401 0.89253779598698402 0cm 0cm 0cm)" dr3d:vrp="(8509.5844880323402 4956.5024955452527 11868.248399605545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Column,_Pie,_Sunburst_Chart.$B$2:.$B$156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Column,_Pie,_Sunburst_Chart.$M$1" chart:values-cell-range-address="Column,_Pie,_Sunburst_Chart.$M$2:.$M$156" chart:class="chart:bar" chart:attached-axis="primary-y" chart:style-name="G0S0">
            <chart:data-point chart:repeated="9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4472c4" draw:opacity="100%" draw:stroke="none" draw:shadow="visible" draw:shadow-offset-x="0in" draw:shadow-offset-y="0in" draw:shadow-color="#000000" draw:shadow-opacity="20%"/>
    </style:style>
    <style:style style:family="chart" style:name="G0S0P1">
      <style:graphic-properties draw:fill="solid" draw:fill-color="#ed7d31" draw:opacity="100%" draw:stroke="none" draw:shadow="visible" draw:shadow-offset-x="0in" draw:shadow-offset-y="0in" draw:shadow-color="#000000" draw:shadow-opacity="20%"/>
    </style:style>
    <style:style style:family="chart" style:name="G0S0P2">
      <style:graphic-properties draw:fill="solid" draw:fill-color="#a5a5a5" draw:opacity="100%" draw:stroke="none" draw:shadow="visible" draw:shadow-offset-x="0in" draw:shadow-offset-y="0in" draw:shadow-color="#000000" draw:shadow-opacity="20%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none" draw:shadow="visible" draw:shadow-offset-x="0in" draw:shadow-offset-y="0in" draw:shadow-color="#000000" draw:shadow-opacity="20%"/>
    </style:style>
    <style:style style:family="chart" style:name="G0S0P4">
      <style:graphic-properties draw:fill="solid" draw:fill-color="#5b9bd5" draw:opacity="100%" draw:stroke="none" draw:shadow="visible" draw:shadow-offset-x="0in" draw:shadow-offset-y="0in" draw:shadow-color="#000000" draw:shadow-opacity="2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center" chart:data-label-series="false">
        <chart:label-separator>
          <text:p text:style-name="a2" text:class-names="" text:cond-style-name="">
</text:p>
        </chart:label-separator>
      </style:chart-properties>
      <style:graphic-properties draw:fill="solid" draw:fill-color="#4472c4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5">
      <style:graphic-properties draw:fill="solid" draw:fill-color="#70ad47" draw:opacity="100%" draw:stroke="none" draw:shadow="visible" draw:shadow-offset-x="0in" draw:shadow-offset-y="0in" draw:shadow-color="#000000" draw:shadow-opacity="20%"/>
    </style:style>
    <style:style style:family="chart" style:name="DL00">
      <style:graphic-properties draw:fill="bitmap" draw:fill-image-name="a3" style:repeat="repea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264478" draw:opacity="100%" draw:stroke="none" draw:shadow="visible" draw:shadow-offset-x="0in" draw:shadow-offset-y="0in" draw:shadow-color="#000000" draw:shadow-opacity="20%"/>
    </style:style>
    <style:style style:family="chart" style:name="G0S0P7">
      <style:graphic-properties draw:fill="solid" draw:fill-color="#9e480e" draw:opacity="100%" draw:stroke="none" draw:shadow="visible" draw:shadow-offset-x="0in" draw:shadow-offset-y="0in" draw:shadow-color="#000000" draw:shadow-opacity="20%"/>
    </style:style>
    <style:style style:family="chart" style:name="G0S0P8">
      <style:graphic-properties draw:fill="solid" draw:fill-color="#636363" draw:opacity="100%" draw:stroke="none" draw:shadow="visible" draw:shadow-offset-x="0in" draw:shadow-offset-y="0in" draw:shadow-color="#000000" draw:shadow-opacity="20%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241.5pt" svg:width="347.25pt" chart:style-name="Crt0">
        <chart:title chart:style-name="CT00">
          <text:p text:style-name="a1" text:class-names="" text:cond-style-name="">Retention %</text:p>
        </chart:title>
        <chart:legend chart:legend-position="end" chart:legend-align="center" chart:style-name="Lgnd"/>
        <chart:plot-area chart:style-name="Plt0" dr3d:transform="matrix (0.90630677104982404 0 -0.42262044052464098 -0.32374628231395164 0.64278692641620028 -0.69427178533792522 0.27165489400549431 0.76604501645034806 0.582562143753307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Column,_Pie,_Sunburst_Chart.$B$2:.$B$156"/>
          </chart:axis>
          <chart:axis chart:dimension="y"/>
          <chart:series chart:label-cell-address="Column,_Pie,_Sunburst_Chart.$F$1" chart:values-cell-range-address="Column,_Pie,_Sunburst_Chart.$F$2:.$F$15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  <draw:fill-image xmlns:xlink="http://www.w3.org/1999/xlink" draw:name="a3" xlink:href="" xlink:show="embed" xlink:actuate="onLoad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decimal-places="2" number:min-integer-digits="1" number:grouping="true"/>
    </number:currency-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4472c4" draw:opacity="85%" draw:stroke="solid" svg:stroke-width="0.01042in" svg:stroke-color="#ffffff" svg:stroke-opacity="5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85%" draw:stroke="solid" svg:stroke-width="0.01042in" svg:stroke-color="#ffffff" svg:stroke-opacity="5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svg:stroke-width="0.01042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1" style:data-style-name="N36">
      <style:chart-properties chart:gap-width="65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5.25pt" svg:width="447.75pt" chart:style-name="Crt0">
        <chart:title chart:style-name="CT00">
          <text:p text:style-name="a1" text:class-names="" text:cond-style-name="">Average Price and Year Resale Value of German Car Model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Average of Year Resale Value</text:p>
              </table:table-cell>
              <table:table-cell office:value-type="string">
                <text:p>Average of Price</text:p>
              </table:table-cell>
            </table:table-row>
          </table:table-header-rows>
          <table:table-row>
            <table:table-cell office:value-type="string">
              <text:p>Audi</text:p>
            </table:table-cell>
            <table:table-cell office:value-type="float" office:value="28270"/>
            <table:table-cell office:value-type="float" office:value="39980"/>
          </table:table-row>
          <table:table-row>
            <table:table-cell office:value-type="string">
              <text:p>BMW</text:p>
            </table:table-cell>
            <table:table-cell office:value-type="float" office:value="29766.666666666668"/>
            <table:table-cell office:value-type="float" office:value="33096.666666666664"/>
          </table:table-row>
          <table:table-row>
            <table:table-cell office:value-type="string">
              <text:p>Mercedes-B</text:p>
            </table:table-cell>
            <table:table-cell office:value-type="float" office:value="39876.555555555555"/>
            <table:table-cell office:value-type="float" office:value="52916.666666666664"/>
          </table:table-row>
          <table:table-row>
            <table:table-cell office:value-type="string">
              <text:p>Porsche</text:p>
            </table:table-cell>
            <table:table-cell office:value-type="float" office:value="56475"/>
            <table:table-cell office:value-type="float" office:value="62473.333333333336"/>
          </table:table-row>
          <table:table-row>
            <table:table-cell office:value-type="string">
              <text:p>Volkswagen</text:p>
            </table:table-cell>
            <table:table-cell office:value-type="float" office:value="13951.833333333334"/>
            <table:table-cell office:value-type="float" office:value="17698.333333333332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